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4.55mm"/>
    </style:style>
    <style:style style:name="co3" style:family="table-column">
      <style:table-column-properties fo:break-before="auto" style:column-width="44.06mm"/>
    </style:style>
    <style:style style:name="co4" style:family="table-column">
      <style:table-column-properties fo:break-before="auto" style:column-width="7.73mm"/>
    </style:style>
    <style:style style:name="co5" style:family="table-column">
      <style:table-column-properties fo:break-before="auto" style:column-width="40.4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4" style:family="table-cell" style:parent-style-name="Default">
      <style:table-cell-properties fo:wrap-option="wrap" fo:border="0.06pt solid #000000" style:vertical-align="middle"/>
    </style:style>
    <style:style style:name="ce5" style:family="table-cell" style:parent-style-name="Default">
      <style:table-cell-properties fo:wrap-option="wrap" fo:border="0.06pt solid #000000" style:vertical-align="middle"/>
      <style:text-properties fo:color="#ff0000"/>
    </style:style>
    <style:style style:name="ce6" style:family="table-cell" style:parent-style-name="Default">
      <style:table-cell-properties fo:wrap-option="wrap" fo:border="0.06pt solid #000000" style:vertical-align="middl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1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 table:number-columns-spanned="6" table:number-rows-spanned="1">
            <text:p>Workshop Sub-panel – Sep/01/2020</text:p>
          </table:table-cell>
          <table:covered-table-cell table:number-columns-repeated="5" table:style-name="Default"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orkshop normal plugs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FI for lathe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string" calcext:value-type="string">
            <text:p>Laundry room washer?</text:p>
          </table:table-cell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Laundry room dryer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aundry room washer?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undry room dryer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string" calcext:value-type="string">
            <text:p>?</text:p>
          </table:table-cell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Spare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ne cellar fridge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orkshop heat/AC</text:p>
          </table:table-cell>
        </table:table-row>
        <table:table-row table:style-name="ro2">
          <table:covered-table-cell/>
          <table:table-cell office:value-type="string" calcext:value-type="string">
            <text:p>B</text:p>
          </table:table-cell>
          <table:table-cell table:style-name="ce6" office:value-type="string" calcext:value-type="string">
            <text:p>Workshop/wine cellar/basement hall lights</text:p>
          </table:table-cell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Workshop heat/AC</text:p>
          </table:table-cell>
        </table:table-row>
        <table:table-row table:style-name="ro1"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?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orkshop heat/AC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Dehumidifier &amp; sump pump</text:p>
          </table:table-cell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Workshop heat/AC</text:p>
          </table:table-cell>
        </table:table-row>
        <table:table-row table:style-name="ro1">
          <table:table-cell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r table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Lathe main power</text:p>
          </table:table-cell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Table saw</text:p>
          </table:table-cell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he main power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ble saw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Mill main power</text:p>
          </table:table-cell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Bathroom lights/fan</text:p>
          </table:table-cell>
        </table:table-row>
        <table:table-row table:style-name="ro1">
          <table:table-cell table:style-name="ce3" office:value-type="string" calcext:value-type="string" table:number-columns-spanned="6" table:number-rows-spanned="1">
            <text:p>? = check laundry room, garage &amp; outside power/lights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2:52:38.981264162</meta:creation-date>
    <meta:print-date>2020-09-01T14:29:13.245127640</meta:print-date>
    <dc:date>2020-09-01T14:29:24.691540134</dc:date>
    <meta:editing-duration>PT55M12S</meta:editing-duration>
    <meta:editing-cycles>5</meta:editing-cycles>
    <meta:generator>LibreOffice/6.2.8.2$MacOSX_X86_64 LibreOffice_project/f82ddfca21ebc1e222a662a32b25c0c9d20169ee</meta:generator>
    <meta:document-statistic meta:table-count="1" meta:cell-count="62" meta:object-count="0"/>
  </office:meta>
</office:document-meta>
</file>