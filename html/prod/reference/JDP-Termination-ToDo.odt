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text-properties officeooo:rsid="000fc849" officeooo:paragraph-rsid="000fc849"/>
    </style:style>
    <style:style style:name="P2" style:family="paragraph" style:parent-style-name="Heading_20_1">
      <style:text-properties fo:color="#000000" loext:opacity="100%" style:font-name="sans-serif" officeooo:rsid="0010ce7a" officeooo:paragraph-rsid="0010ce7a" fo:background-color="transparent"/>
    </style:style>
    <style:style style:name="P3" style:family="paragraph" style:parent-style-name="Text_20_body">
      <style:text-properties fo:color="#000000" loext:opacity="100%" style:font-name="sans-serif" officeooo:rsid="0010ce7a" officeooo:paragraph-rsid="0010ce7a"/>
    </style:style>
    <style:style style:name="P4" style:family="paragraph" style:parent-style-name="Text_20_body">
      <style:text-properties fo:color="#000000" loext:opacity="100%" style:font-name="sans-serif" officeooo:rsid="0010ce7a"/>
    </style:style>
    <style:style style:name="P5" style:family="paragraph" style:parent-style-name="Text_20_body">
      <style:text-properties fo:color="#000000" loext:opacity="100%" officeooo:rsid="000fc849" officeooo:paragraph-rsid="0010ce7a" fo:background-color="transparent"/>
    </style:style>
    <style:style style:name="P6"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7"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officeooo:rsid="000fc849" fo:background-color="transparent"/>
    </style:style>
    <style:style style:name="P8"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font-weight="bold" officeooo:rsid="00127512" officeooo:paragraph-rsid="00127512" fo:background-color="transparent"/>
    </style:style>
    <style:style style:name="P9"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officeooo:rsid="000fc849" fo:background-color="transparent"/>
    </style:style>
    <style:style style:name="P10"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officeooo:rsid="000fc849" fo:background-color="transparent"/>
    </style:style>
    <style:style style:name="P11" style:family="paragraph" style:parent-style-name="Text_20_body" style:list-style-name="L3">
      <loext:graphic-properties draw:fill="none" draw:fill-color="#ffffff"/>
      <style:paragraph-properties fo:margin-top="0cm" fo:margin-bottom="0cm" style:contextual-spacing="false" fo:background-color="transparent" style:writing-mode="lr-tb"/>
      <style:text-properties fo:color="#000000" loext:opacity="100%" style:font-name="sans-serif" officeooo:rsid="000fc849" fo:background-color="transparent"/>
    </style:style>
    <style:style style:name="P12" style:family="paragraph" style:parent-style-name="Text_20_body" style:list-style-name="L4">
      <loext:graphic-properties draw:fill="none" draw:fill-color="#ffffff"/>
      <style:paragraph-properties fo:margin-top="0cm" fo:margin-bottom="0cm" style:contextual-spacing="false" fo:background-color="transparent" style:writing-mode="lr-tb"/>
      <style:text-properties fo:color="#000000" loext:opacity="100%" style:font-name="sans-serif" officeooo:rsid="000fc849" fo:background-color="transparent"/>
    </style:style>
    <style:style style:name="P13" style:family="paragraph" style:parent-style-name="Text_20_body" style:list-style-name="L5">
      <loext:graphic-properties draw:fill="none" draw:fill-color="#ffffff"/>
      <style:paragraph-properties fo:margin-top="0cm" fo:margin-bottom="0cm" style:contextual-spacing="false" fo:background-color="transparent" style:writing-mode="lr-tb"/>
      <style:text-properties fo:color="#000000" loext:opacity="100%" style:font-name="sans-serif" officeooo:rsid="000fc849" fo:background-color="transparent"/>
    </style:style>
    <style:style style:name="P14" style:family="paragraph" style:parent-style-name="Text_20_body" style:list-style-name="L6">
      <loext:graphic-properties draw:fill="none" draw:fill-color="#ffffff"/>
      <style:paragraph-properties fo:margin-top="0cm" fo:margin-bottom="0cm" style:contextual-spacing="false" fo:background-color="transparent" style:writing-mode="lr-tb"/>
      <style:text-properties fo:color="#000000" loext:opacity="100%" style:font-name="sans-serif" officeooo:rsid="000fc849" fo:background-color="transparent"/>
    </style:style>
    <style:style style:name="T1" style:family="text">
      <style:text-properties officeooo:rsid="0010ce7a"/>
    </style:style>
    <style:style style:name="T2" style:family="text">
      <style:text-properties fo:background-color="transparent" loext:char-shading-value="0"/>
    </style:style>
    <style:style style:name="T3" style:family="text">
      <style:text-properties fo:font-weight="bold" fo:background-color="transparent" loext:char-shading-value="0"/>
    </style:style>
    <style:style style:name="T4" style:family="text">
      <style:text-properties fo:font-weight="bold"/>
    </style:style>
    <style:style style:name="T5" style:family="text">
      <style:text-properties style:font-name="sans-serif"/>
    </style:style>
    <style:style style:name="T6" style:family="text">
      <style:text-properties fo:color="#000000" loext:opacity="100%" officeooo:rsid="000fc849" fo:background-color="transparent" loext:char-shading-value="0"/>
    </style:style>
    <style:style style:name="T7" style:family="text">
      <style:text-properties fo:color="#000000" loext:opacity="100%" style:font-name="sans-serif" officeooo:rsid="000fc849" fo:background-color="transparent" loext:char-shading-value="0"/>
    </style:style>
    <style:style style:name="T8" style:family="text">
      <style:text-properties fo:font-weight="bold" style:font-weight-asian="bold" style:font-weight-complex="bold"/>
    </style:style>
    <text:list-style style:name="L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tuff I need to do after Termination</text:span></text:p>
      <text:p text:style-name="Subtitle">JD Power Edition</text:p>
      <text:p text:style-name="P1"/>
      <text:h text:style-name="P2" text:outline-level="1">Return gear</text:h>
      <text:p text:style-name="P3"><text:span text:style-name="T2">Return laptop, docking station only no later than </text:span><text:span text:style-name="T3">August </text:span><text:span text:style-name="T4">14, 2026</text:span>. </text:p>
      <text:p text:style-name="P3">Send by courier via <text:span text:style-name="T4">FedEx </text:span>using our account number <text:span text:style-name="T4">(151300154)</text:span> to:</text:p>
      <text:p text:style-name="P4">J.D. Power Attn: Craig Moore, Help Desk</text:p>
      <text:p text:style-name="P4">100 Dundas Street, Suite 500</text:p>
      <text:p text:style-name="P4">London, ON Canada N6A 5B6</text:p>
      <text:p text:style-name="P5"><text:span text:style-name="T5"/></text:p>
      <text:h text:style-name="Heading_20_2" text:outline-level="2">EI / Record of Employment (ROE)</text:h>
      <text:list text:style-name="L1">
        <text:list-item>
          <text:p text:style-name="P6"><text:span text:style-name="T6">“</text:span><text:span text:style-name="T7">When will you issue my Record of Employment (ROE) to Service Canada, and when will I be able to access it? Will it be issued within the required 5 calendar days after the end of the pay period (electronic) or sooner?”</text:span></text:p>
        </text:list-item>
        <text:list-item>
          <text:p text:style-name="P7">“<text:span text:style-name="T5">What code will be used on the ROE (e.g., A for shortage of work/layoff, or M for dismissal)?”<text:line-break/>(This directly answers your question about when they notify the government for EI purposes — the ROE is the official notification.)</text:span></text:p>
        </text:list-item>
      </text:list>
      <text:h text:style-name="Heading_20_2" text:outline-level="2">Bonus &amp; Final Pay</text:h>
      <text:list text:style-name="L2">
        <text:list-item>
          <text:p text:style-name="P8">Last Day is Friday July 31, 2026</text:p>
        </text:list-item>
        <text:list-item>
          <text:p text:style-name="P9"><text:span text:style-name="T4">$23,404.38</text:span> as a lump sum payment, less applicable deductions, representing six (6) weeks of salary</text:p>
        </text:list-item>
      </text:list>
      <text:h text:style-name="Heading_20_1" text:outline-level="1">Applying for EI</text:h>
      <text:p text:style-name="P10">In Ontario, Canada (as in the rest of the country), unemployment benefits are handled federally through Employment Insurance (EI) regular benefits via Service Canada, not a provincial program. If you've been laid off (e.g., due to shortage of work, through no fault of your own), the key paperwork you need from your former employer is the Record of Employment (ROE).</text:p>
      <text:p text:style-name="P10"/>
      <text:h text:style-name="Heading_20_2" text:outline-level="2"><text:soft-page-break/>The Main Document: Record of Employment (ROE)</text:h>
      <text:list text:style-name="L3">
        <text:list-item>
          <text:p text:style-name="P11">The <text:span text:style-name="T8">ROE</text:span> is the single most important document for applying for EI benefits. It details your employment history with that employer, including insurable hours, earnings, last day paid, reason for separation (e.g., code A for layoff/shortage of work), and other required info.</text:p>
        </text:list-item>
        <text:list-item>
          <text:p text:style-name="P11">Your employer is legally required to issue the ROE when there's an interruption of earnings (like a layoff).</text:p>
        </text:list-item>
      </text:list>
      <text:h text:style-name="Heading_20_3" text:outline-level="3">How it's provided:</text:h>
      <text:list text:style-name="L4">
        <text:list-item>
          <text:p text:style-name="P12">Most employers submit it electronically directly to Service Canada (this is the common method now). In this case, you don't need a paper copy from your employer—you don't have to request or submit it yourself. Service Canada accesses it automatically for your claim.</text:p>
        </text:list-item>
        <text:list-item>
          <text:p text:style-name="P12">If your employer issues a paper ROE, they must give you the original (Part 1). You then need to submit it to Service Canada (e.g., upload it during your online application, mail it, or drop it off).</text:p>
        </text:list-item>
        <text:list-item>
          <text:p text:style-name="P12">Employers generally have 5 calendar days after the end of the pay period in which the interruption occurs to issue/submit the ROE.</text:p>
        </text:list-item>
      </text:list>
      <text:p text:style-name="P10"/>
      <text:h text:style-name="Heading_20_2" text:outline-level="2">Applying for EI – You Don't Need the ROE to Start</text:h>
      <text:list text:style-name="L5">
        <text:list-item>
          <text:p text:style-name="P13">Apply for EI as soon as possible after your layoff—ideally right away, even if you haven't received the ROE yet. Delaying more than 4 weeks after your last day of work can cause you to lose benefits.</text:p>
        </text:list-item>
        <text:list-item>
          <text:p text:style-name="P13">You can (and should) start the online application at the official Service Canada site: canada.ca/en/services/benefits/ei/ei-regular-benefit/apply.html.</text:p>
        </text:list-item>
        <text:list-item>
          <text:p text:style-name="P13">During the application, you'll provide details like your Social Insurance Number (SIN), bank info for direct deposit, employer names/addresses/dates/reason for separation over the last 52 weeks, etc.</text:p>
        </text:list-item>
        <text:list-item>
          <text:p text:style-name="P13">If the ROE is electronic, Service Canada will pull it. If paper, request it from your employer and submit it promptly after applying.</text:p>
        </text:list-item>
      </text:list>
      <text:p text:style-name="P10"/>
      <text:h text:style-name="Heading_20_2" text:outline-level="2">Other Potential Items from Your Employer</text:h>
      <text:list text:style-name="L6">
        <text:list-item>
          <text:p text:style-name="P14">In most cases, the ROE is the only specific paperwork required from your former employer for the EI application itself.</text:p>
        </text:list-item>
        <text:list-item>
          <text:p text:style-name="P14">You may want to keep supporting documents like recent pay stubs, your final pay statement (showing any vacation pay, severance, or pay in lieu of notice), or T4 slips—these can help if Service Canada needs more proof of earnings/hours, but they're not mandatory upfront like the ROE.</text:p>
        </text:list-item>
        <text:list-item>
          <text:p text:style-name="P14"><text:soft-page-break/>If there are complications (e.g., severance payments affecting your claim), your employer might provide additional details, but this isn't standard paperwork for the initial application.</text:p>
        </text:list-item>
      </text:list>
      <text:p text:style-name="P10"/>
      <text:p text:style-name="P10">For the most up-to-date details or to apply, visit the official Government of Canada EI page linked above or call Service Canada at 1-800-O-Canada (1-800-622-6232). You can also create a My Service Canada Account to check your ROE status online once issued. Good luck—apply soon to avoid any delays in payments!</text:p>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0T14:43:34.326585000</meta:creation-date>
    <dc:date>2026-05-25T10:50:28.974099000</dc:date>
    <meta:editing-duration>PT1H15M38S</meta:editing-duration>
    <meta:editing-cycles>3</meta:editing-cycles>
    <meta:generator>LibreOffice/25.2.2.2$MacOSX_AARCH64 LibreOffice_project/7370d4be9e3cf6031a51beef54ff3bda878e3fac</meta:generator>
    <meta:document-statistic meta:table-count="0" meta:image-count="0" meta:object-count="0" meta:page-count="3" meta:paragraph-count="33" meta:word-count="678" meta:character-count="4020" meta:non-whitespace-character-count="3392"/>
  </office:meta>
</office:document-meta>
</file>