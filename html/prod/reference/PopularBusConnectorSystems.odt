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8.117cm" table:align="left" fo:background-color="transparent">
        <style:background-image/>
      </style:table-properties>
    </style:style>
    <style:style style:name="Table1.A" style:family="table-column">
      <style:table-column-properties style:column-width="3.882cm"/>
    </style:style>
    <style:style style:name="Table1.B" style:family="table-column">
      <style:table-column-properties style:column-width="3.034cm"/>
    </style:style>
    <style:style style:name="Table1.E" style:family="table-column">
      <style:table-column-properties style:column-width="2.02cm"/>
    </style:style>
    <style:style style:name="Table1.F" style:family="table-column">
      <style:table-column-properties style:column-width="3.113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49cm" fo:border="0.75pt solid #cfd9de">
        <style:background-image/>
      </style:table-cell-properties>
    </style:style>
    <style:style style:name="P1" style:family="paragraph" style:parent-style-name="Standard">
      <style:text-properties fo:color="#000000" loext:opacity="100%" style:font-name="sans-serif" officeooo:rsid="001ea434" officeooo:paragraph-rsid="0021331b" fo:background-color="transparent"/>
    </style:style>
    <style:style style:name="P2" style:family="paragraph" style:parent-style-name="Text_20_body">
      <style:paragraph-properties fo:margin-left="0cm" fo:margin-right="0cm" fo:text-indent="0cm" style:auto-text-indent="false"/>
      <style:text-properties fo:color="#000000" loext:opacity="100%" style:font-name="sans-serif" officeooo:rsid="001ea434" fo:background-color="transparent"/>
    </style:style>
    <style:style style:name="P3" style:family="paragraph" style:parent-style-name="Text_20_body">
      <style:paragraph-properties fo:margin-left="0cm" fo:margin-right="0cm" fo:text-indent="0cm" style:auto-text-indent="false"/>
      <style:text-properties fo:color="#000000" loext:opacity="100%" style:font-name="sans-serif" officeooo:rsid="001ea434" officeooo:paragraph-rsid="0021331b" fo:background-color="transparent"/>
    </style:style>
    <style:style style:name="P4"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5" style:family="paragraph" style:parent-style-name="Text_20_body">
      <style:paragraph-properties fo:margin-left="0cm" fo:margin-right="0cm" fo:text-indent="0cm" style:auto-text-indent="false"/>
      <style:text-properties fo:color="#000000" loext:opacity="100%" style:font-name="sans-serif" officeooo:rsid="001ea434" officeooo:paragraph-rsid="0022e85f" fo:background-color="transparent"/>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7"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8"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9" style:family="paragraph" style:parent-style-name="Text_20_body">
      <style:paragraph-properties fo:margin-left="0cm" fo:margin-right="0cm" fo:margin-top="0cm" fo:margin-bottom="0cm" style:contextual-spacing="false" fo:text-indent="0cm" style:auto-text-indent="false"/>
      <style:text-properties fo:color="#000000" loext:opacity="100%" style:font-name="sans-serif" officeooo:rsid="001ea434" fo:background-color="transparent"/>
    </style:style>
    <style:style style:name="P10" style:family="paragraph" style:parent-style-name="Table_20_Heading">
      <style:paragraph-properties fo:margin-left="0cm" fo:margin-right="0cm" fo:text-indent="0cm" style:auto-text-indent="false"/>
      <style:text-properties fo:color="#000000" loext:opacity="100%" style:font-name="sans-serif" fo:font-weight="bold" fo:background-color="transparent"/>
    </style:style>
    <style:style style:name="P11" style:family="paragraph" style:parent-style-name="Table_20_Contents">
      <style:paragraph-properties fo:margin-left="0cm" fo:margin-right="0cm" fo:text-indent="0cm" style:auto-text-indent="false"/>
      <style:text-properties fo:color="#000000" loext:opacity="100%" style:font-name="sans-serif" fo:background-color="transparent"/>
    </style:style>
    <style:style style:name="P12" style:family="paragraph" style:parent-style-name="Horizontal_20_Line">
      <style:text-properties fo:color="#000000" loext:opacity="100%" style:font-name="sans-serif" officeooo:rsid="001ea434" fo:background-color="transparent"/>
    </style:style>
    <style:style style:name="P13"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14"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15" style:family="paragraph" style:parent-style-name="Text_20_body" style:list-style-name="L6">
      <loext:graphic-properties draw:fill="none" draw:fill-color="#ffffff"/>
      <style:paragraph-properties fo:margin-top="0cm" fo:margin-bottom="0cm" style:contextual-spacing="false" fo:background-color="transparent" style:writing-mode="lr-tb"/>
      <style:text-properties fo:color="#000000" loext:opacity="100%" style:font-name="sans-serif" officeooo:rsid="001ea434" fo:background-color="transparent"/>
    </style:style>
    <style:style style:name="P16"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17"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18"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officeooo:rsid="001ea434"/>
    </style:style>
    <style:style style:name="P19"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1ea434" fo:background-color="transparent"/>
    </style:style>
    <style:style style:name="P20" style:family="paragraph" style:parent-style-name="Text_20_body">
      <style:paragraph-properties fo:margin-left="0cm" fo:margin-right="0cm" fo:margin-top="0cm" fo:margin-bottom="0cm" style:contextual-spacing="false" fo:text-indent="0cm" style:auto-text-indent="false"/>
      <style:text-properties fo:color="#000000" loext:opacity="100%" style:font-name="sans-serif" officeooo:rsid="001ea434" officeooo:paragraph-rsid="0022e85f" fo:background-color="transparent"/>
    </style:style>
    <style:style style:name="P21" style:family="paragraph" style:parent-style-name="Standard">
      <style:text-properties officeooo:rsid="001ea434" officeooo:paragraph-rsid="001ea434"/>
    </style:style>
    <style:style style:name="T1" style:family="text">
      <style:text-properties fo:color="#000000" loext:opacity="100%" style:font-name="sans-serif" officeooo:rsid="001ea434" fo:background-color="transparent" loext:char-shading-value="0"/>
    </style:style>
    <style:style style:name="T2" style:family="text">
      <style:text-properties fo:color="#000000" loext:opacity="100%" style:font-name="sans-serif" fo:font-weight="bold" style:font-name-asian="sans-serif" style:font-weight-asian="bold" style:font-name-complex="sans-serif" style:font-weight-complex="bold"/>
    </style:style>
    <style:style style:name="T3" style:family="text">
      <style:text-properties fo:color="#000000" loext:opacity="100%" style:font-name="sans-serif" style:font-name-asian="sans-serif" style:font-name-complex="sans-serif"/>
    </style:style>
    <style:style style:name="T4" style:family="text">
      <style:text-properties fo:color="#000000" loext:opacity="100%" style:font-name="sans-serif" fo:background-color="transparent" loext:char-shading-value="0"/>
    </style:style>
    <style:style style:name="T5" style:family="text">
      <style:text-properties fo:color="#000080" loext:opacity="100%" style:font-name="sans-serif" fo:background-color="transparent" loext:char-shading-value="0"/>
    </style:style>
    <text:list-style style:name="L1">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pular Connector Systems</text:p>
      <text:p text:style-name="Subtitle">SparkFun Qwiic and Adafruit STEMMA Connector Systems</text:p>
      <text:p text:style-name="P1"/>
      <text:h text:style-name="Heading_20_1" text:outline-level="1">Introduction</text:h>
      <text:p text:style-name="P1">For electronics hobbyists, creating prototypes quickly and reliably is key to bringing ideas to life. The SparkFun Qwiic Connect System and Adafruit STEMMA/STEMMA QT are two innovative connector ecosystems designed to simplify prototyping by eliminating soldering and ensuring compatibility across a wide range of development boards, sensors, and accessories. This document provides a detailed overview of these systems, their technical specifications, use cases, and practical considerations for hobbyists. It also includes additional information gathered from web sources to enhance understanding and inspire creative projects.</text:p>
      <text:p text:style-name="P2"/>
      <text:h text:style-name="Heading_20_1" text:outline-level="1">Overview of Connector Systems</text:h>
      <text:p text:style-name="P3">Both SparkFun Qwiic and Adafruit STEMMA systems are designed to streamline prototyping by using standardized connectors and the Inter-integrated Circuit (I2C) protocol for most applications, with some variations for other signal types. These systems allow hobbyists to connect components quickly, reduce wiring errors, and build modular, scalable projects.</text:p>
      <text:h text:style-name="Heading_20_1" text:outline-level="1">SparkFun Qwiic Connect System</text:h>
      <text:p text:style-name="P3">The SparkFun Qwiic Connect System is a plug-and-play ecosystem that uses a 1mm pitch, 4-pin JST connector to interface development boards with sensors, LCDs, relays, and other peripherals. It leverages the I2C protocol, which requires only two signal wires (SDA for data and SCL for clock) plus power and ground, making it ideal for rapid prototyping.</text:p>
      <text:h text:style-name="Heading_20_2" text:outline-level="2">Key Features:</text:h>
      <text:list text:style-name="L1">
        <text:list-item>
          <text:p text:style-name="P4">No Soldering Required: Qwiic cables plug directly into compatible boards, enabling fast setup and modifications.</text:p>
        </text:list-item>
        <text:list-item>
          <text:p text:style-name="P4">Polarized Connectors: The 4-pin JST connectors are polarized, ensuring correct wiring every time and preventing damage from misconnection.</text:p>
        </text:list-item>
        <text:list-item>
          <text:p text:style-name="P4">Daisy-Chain Capability: Most Qwiic boards feature multiple connectors, allowing multiple devices to be connected on the same I2C bus, expanding functionality without complex wiring.</text:p>
        </text:list-item>
        <text:list-item>
          <text:p text:style-name="P4"><text:soft-page-break/>Cable Options: SparkFun offers Qwiic cables in various lengths (50mm, 100mm, 200mm) and breadboard-friendly jumpers to connect Qwiic boards to non-Qwiic systems.</text:p>
        </text:list-item>
        <text:list-item>
          <text:p text:style-name="P4">I2C Protocol: Uses two wires for communication, supporting multiple slave devices (sensors, displays, etc.) controlled by a master device (e.g., a microcontroller like Arduino).</text:p>
        </text:list-item>
      </text:list>
      <text:h text:style-name="Heading_20_1" text:outline-level="1">SparkFun Qwiic Micro Connect System</text:h>
      <text:p text:style-name="P5">The Qwiic Micro Connect System is a compact version of the Qwiic ecosystem, designed for space-constrained projects such as wearables or small IoT devices.</text:p>
      <text:h text:style-name="Heading_20_2" text:outline-level="2">Key Features:</text:h>
      <text:list text:style-name="L2">
        <text:list-item>
          <text:p text:style-name="P6">Ultra-Small Form Factor: Qwiic Micro boards measure 0.75in x 0.30in (19.05mm x 7.62mm), reducing the footprint by over a third compared to standard Qwiic boards.</text:p>
        </text:list-item>
        <text:list-item>
          <text:p text:style-name="P6">Single Qwiic Connector: Includes one 1mm pitch, 4-pin JST connector for I2C communication.</text:p>
        </text:list-item>
        <text:list-item>
          <text:p text:style-name="P6">Standoff Hole: Allows secure mounting in compact designs.</text:p>
        </text:list-item>
        <text:list-item>
          <text:p text:style-name="P6">I2C Compatibility: Maintains full compatibility with the broader Qwiic ecosystem.</text:p>
        </text:list-item>
      </text:list>
      <text:h text:style-name="Heading_20_1" text:outline-level="1">Adafruit STEMMA and STEMMA QT</text:h>
      <text:p text:style-name="P5">Adafruit’s STEMMA and STEMMA QT systems offer a similar plug-and-play experience but cater to a broader range of signal types and are designed for cross-compatibility with other ecosystems like Grove and Gravity.</text:p>
      <text:h text:style-name="Heading_20_2" text:outline-level="2">Key Features:</text:h>
      <text:list text:style-name="L3">
        <text:list-item>
          <text:p text:style-name="P7"><text:span text:style-name="T1">STEMMA (4-Pin JST PH):</text:span></text:p>
          <text:list>
            <text:list-item>
              <text:p text:style-name="P8">Uses 2.0mm pitch, 4-pin JST PH connectors for I2C communication.</text:p>
            </text:list-item>
            <text:list-item>
              <text:p text:style-name="P8">Cross-compatible with Grove and Gravity systems, allowing integration with a wider range of components.</text:p>
            </text:list-item>
            <text:list-item>
              <text:p text:style-name="P8">Includes built-in level shifting and voltage regulation, supporting safe operation across different voltage levels (e.g., 3.3V or 5V systems).</text:p>
            </text:list-item>
          </text:list>
        </text:list-item>
        <text:list-item>
          <text:p text:style-name="P8">STEMMA (3-Pin JST PH):</text:p>
          <text:list>
            <text:list-item>
              <text:p text:style-name="P8">Uses 2.0mm pitch, 3-pin JST PH connectors for PWM, analog, or digital signals.</text:p>
            </text:list-item>
            <text:list-item>
              <text:p text:style-name="P8">Ideal for connecting actuators, LEDs, or other non-I2C peripherals.</text:p>
            </text:list-item>
          </text:list>
        </text:list-item>
        <text:list-item>
          <text:p text:style-name="P8">STEMMA QT (4-Pin JST SH):</text:p>
          <text:list>
            <text:list-item>
              <text:p text:style-name="P8">Uses 1.0mm pitch, 4-pin JST SH connectors, identical to SparkFun’s Qwiic connectors, ensuring cross-compatibility between STEMMA QT and Qwiic devices.</text:p>
            </text:list-item>
            <text:list-item>
              <text:p text:style-name="P8"><text:soft-page-break/>Designed for smaller breakout boards and wearables where 2.0mm JST PH connectors are too large.</text:p>
            </text:list-item>
            <text:list-item>
              <text:p text:style-name="P8">Includes level shifting and voltage regulation for safe use with controllers operating at different voltages.</text:p>
            </text:list-item>
          </text:list>
        </text:list-item>
      </text:list>
      <text:h text:style-name="Heading_20_1" text:outline-level="1">Technical Comparison</text:h>
      <text:p text:style-name="P9"/>
      <table:table table:name="Table1" table:style-name="Table1">
        <table:table-column table:style-name="Table1.A"/>
        <table:table-column table:style-name="Table1.B" table:number-columns-repeated="3"/>
        <table:table-column table:style-name="Table1.E"/>
        <table:table-column table:style-name="Table1.F"/>
        <table:table-row table:style-name="Table1.1">
          <table:table-cell table:style-name="Table1.A1" office:value-type="string">
            <text:p text:style-name="P10">Feature<text:span text:style-name="T2"/></text:p>
          </table:table-cell>
          <table:table-cell table:style-name="Table1.A1" office:value-type="string">
            <text:p text:style-name="P10">SparkFun Qwiic<text:span text:style-name="T2"/></text:p>
          </table:table-cell>
          <table:table-cell table:style-name="Table1.A1" office:value-type="string">
            <text:p text:style-name="P10">SparkFun Qwiic Micro<text:span text:style-name="T2"/></text:p>
          </table:table-cell>
          <table:table-cell table:style-name="Table1.A1" office:value-type="string">
            <text:p text:style-name="P10">Adafruit STEMMA (4-Pin)<text:span text:style-name="T2"/></text:p>
          </table:table-cell>
          <table:table-cell table:style-name="Table1.A1" office:value-type="string">
            <text:p text:style-name="P10">Adafruit STEMMA (3-Pin)<text:span text:style-name="T2"/></text:p>
          </table:table-cell>
          <table:table-cell table:style-name="Table1.A1" office:value-type="string">
            <text:p text:style-name="P10">Adafruit STEMMA QT<text:span text:style-name="T2"/></text:p>
          </table:table-cell>
        </table:table-row>
        <table:table-row table:style-name="Table1.1">
          <table:table-cell table:style-name="Table1.A1" office:value-type="string">
            <text:p text:style-name="P11">Connector Type<text:span text:style-name="T3"/></text:p>
          </table:table-cell>
          <table:table-cell table:style-name="Table1.A1" office:value-type="string">
            <text:p text:style-name="P11">1mm pitch, 4-pin JST SH<text:span text:style-name="T3"/></text:p>
          </table:table-cell>
          <table:table-cell table:style-name="Table1.A1" office:value-type="string">
            <text:p text:style-name="P11">1mm pitch, 4-pin JST SH<text:span text:style-name="T3"/></text:p>
          </table:table-cell>
          <table:table-cell table:style-name="Table1.A1" office:value-type="string">
            <text:p text:style-name="P11">2.0mm pitch, 4-pin JST PH<text:span text:style-name="T3"/></text:p>
          </table:table-cell>
          <table:table-cell table:style-name="Table1.A1" office:value-type="string">
            <text:p text:style-name="P11">2.0mm pitch, 3-pin JST PH<text:span text:style-name="T3"/></text:p>
          </table:table-cell>
          <table:table-cell table:style-name="Table1.A1" office:value-type="string">
            <text:p text:style-name="P11">1mm pitch, 4-pin JST SH<text:span text:style-name="T3"/></text:p>
          </table:table-cell>
        </table:table-row>
        <table:table-row table:style-name="Table1.1">
          <table:table-cell table:style-name="Table1.A1" office:value-type="string">
            <text:p text:style-name="P11">Primary Use<text:span text:style-name="T3"/></text:p>
          </table:table-cell>
          <table:table-cell table:style-name="Table1.A1" office:value-type="string">
            <text:p text:style-name="P11">I2C communication<text:span text:style-name="T3"/></text:p>
          </table:table-cell>
          <table:table-cell table:style-name="Table1.A1" office:value-type="string">
            <text:p text:style-name="P11">I2C communication<text:span text:style-name="T3"/></text:p>
          </table:table-cell>
          <table:table-cell table:style-name="Table1.A1" office:value-type="string">
            <text:p text:style-name="P11">I2C communication<text:span text:style-name="T3"/></text:p>
          </table:table-cell>
          <table:table-cell table:style-name="Table1.A1" office:value-type="string">
            <text:p text:style-name="P11">PWM/Analog/Digital signals<text:span text:style-name="T3"/></text:p>
          </table:table-cell>
          <table:table-cell table:style-name="Table1.A1" office:value-type="string">
            <text:p text:style-name="P11">I2C communication<text:span text:style-name="T3"/></text:p>
          </table:table-cell>
        </table:table-row>
        <table:table-row table:style-name="Table1.1">
          <table:table-cell table:style-name="Table1.A1" office:value-type="string">
            <text:p text:style-name="P11">Polarized Connector<text:span text:style-name="T3"/></text:p>
          </table:table-cell>
          <table:table-cell table:style-name="Table1.A1" office:value-type="string">
            <text:p text:style-name="P11">Yes<text:span text:style-name="T3"/></text:p>
          </table:table-cell>
          <table:table-cell table:style-name="Table1.A1" office:value-type="string">
            <text:p text:style-name="P11">Yes<text:span text:style-name="T3"/></text:p>
          </table:table-cell>
          <table:table-cell table:style-name="Table1.A1" office:value-type="string">
            <text:p text:style-name="P11">Yes<text:span text:style-name="T3"/></text:p>
          </table:table-cell>
          <table:table-cell table:style-name="Table1.A1" office:value-type="string">
            <text:p text:style-name="P11">Yes<text:span text:style-name="T3"/></text:p>
          </table:table-cell>
          <table:table-cell table:style-name="Table1.A1" office:value-type="string">
            <text:p text:style-name="P11">Yes<text:span text:style-name="T3"/></text:p>
          </table:table-cell>
        </table:table-row>
        <table:table-row table:style-name="Table1.1">
          <table:table-cell table:style-name="Table1.A1" office:value-type="string">
            <text:p text:style-name="P11">Daisy-Chainable<text:span text:style-name="T3"/></text:p>
          </table:table-cell>
          <table:table-cell table:style-name="Table1.A1" office:value-type="string">
            <text:p text:style-name="P11">Yes (most boards)<text:span text:style-name="T3"/></text:p>
          </table:table-cell>
          <table:table-cell table:style-name="Table1.A1" office:value-type="string">
            <text:p text:style-name="P11">No (single connector)<text:span text:style-name="T3"/></text:p>
          </table:table-cell>
          <table:table-cell table:style-name="Table1.A1" office:value-type="string">
            <text:p text:style-name="P11">Yes (most boards)<text:span text:style-name="T3"/></text:p>
          </table:table-cell>
          <table:table-cell table:style-name="Table1.A1" office:value-type="string">
            <text:p text:style-name="P11">No<text:span text:style-name="T3"/></text:p>
          </table:table-cell>
          <table:table-cell table:style-name="Table1.A1" office:value-type="string">
            <text:p text:style-name="P11">Yes (most boards)<text:span text:style-name="T3"/></text:p>
          </table:table-cell>
        </table:table-row>
        <table:table-row table:style-name="Table1.1">
          <table:table-cell table:style-name="Table1.A1" office:value-type="string">
            <text:p text:style-name="P11">Board Size<text:span text:style-name="T3"/></text:p>
          </table:table-cell>
          <table:table-cell table:style-name="Table1.A1" office:value-type="string">
            <text:p text:style-name="P11">Standard (~1in x 1in)<text:span text:style-name="T3"/></text:p>
          </table:table-cell>
          <table:table-cell table:style-name="Table1.A1" office:value-type="string">
            <text:p text:style-name="P11">0.75in x 0.30in<text:span text:style-name="T3"/></text:p>
          </table:table-cell>
          <table:table-cell table:style-name="Table1.A1" office:value-type="string">
            <text:p text:style-name="P11">Varies<text:span text:style-name="T3"/></text:p>
          </table:table-cell>
          <table:table-cell table:style-name="Table1.A1" office:value-type="string">
            <text:p text:style-name="P11">Varies<text:span text:style-name="T3"/></text:p>
          </table:table-cell>
          <table:table-cell table:style-name="Table1.A1" office:value-type="string">
            <text:p text:style-name="P11">Varies (smaller for wearables)<text:span text:style-name="T3"/></text:p>
          </table:table-cell>
        </table:table-row>
        <table:table-row table:style-name="Table1.1">
          <table:table-cell table:style-name="Table1.A1" office:value-type="string">
            <text:p text:style-name="P11">Cross-Compatibility<text:span text:style-name="T3"/></text:p>
          </table:table-cell>
          <table:table-cell table:style-name="Table1.A1" office:value-type="string">
            <text:p text:style-name="P11">STEMMA QT, limited Grove/Gravity<text:span text:style-name="T3"/></text:p>
          </table:table-cell>
          <table:table-cell table:style-name="Table1.A1" office:value-type="string">
            <text:p text:style-name="P11">STEMMA QT, limited Grove/Gravity<text:span text:style-name="T3"/></text:p>
          </table:table-cell>
          <table:table-cell table:style-name="Table1.A1" office:value-type="string">
            <text:p text:style-name="P11">Grove, Gravity<text:span text:style-name="T3"/></text:p>
          </table:table-cell>
          <table:table-cell table:style-name="Table1.A1" office:value-type="string">
            <text:p text:style-name="P11">Grove, Gravity<text:span text:style-name="T3"/></text:p>
          </table:table-cell>
          <table:table-cell table:style-name="Table1.A1" office:value-type="string">
            <text:p text:style-name="P11">Qwiic, Grove, Gravity<text:span text:style-name="T3"/></text:p>
          </table:table-cell>
        </table:table-row>
        <table:table-row table:style-name="Table1.1">
          <table:table-cell table:style-name="Table1.A1" office:value-type="string">
            <text:p text:style-name="P11">Level Shifting<text:span text:style-name="T3"/></text:p>
          </table:table-cell>
          <table:table-cell table:style-name="Table1.A1" office:value-type="string">
            <text:p text:style-name="P11">Varies by board<text:span text:style-name="T3"/></text:p>
          </table:table-cell>
          <table:table-cell table:style-name="Table1.A1" office:value-type="string">
            <text:p text:style-name="P11">Varies by board<text:span text:style-name="T3"/></text:p>
          </table:table-cell>
          <table:table-cell table:style-name="Table1.A1" office:value-type="string">
            <text:p text:style-name="P11">Built-in<text:span text:style-name="T3"/></text:p>
          </table:table-cell>
          <table:table-cell table:style-name="Table1.A1" office:value-type="string">
            <text:p text:style-name="P11">Built-in<text:span text:style-name="T3"/></text:p>
          </table:table-cell>
          <table:table-cell table:style-name="Table1.A1" office:value-type="string">
            <text:p text:style-name="P11">Built-in<text:span text:style-name="T3"/></text:p>
          </table:table-cell>
        </table:table-row>
        <table:table-row table:style-name="Table1.1">
          <table:table-cell table:style-name="Table1.A1" office:value-type="string">
            <text:p text:style-name="P11">Voltage Support<text:span text:style-name="T3"/></text:p>
          </table:table-cell>
          <table:table-cell table:style-name="Table1.A1" office:value-type="string">
            <text:p text:style-name="P11">Typically 3.3V, some 5V<text:span text:style-name="T3"/></text:p>
          </table:table-cell>
          <table:table-cell table:style-name="Table1.A1" office:value-type="string">
            <text:p text:style-name="P11">Typically 3.3V<text:span text:style-name="T3"/></text:p>
          </table:table-cell>
          <table:table-cell table:style-name="Table1.A1" office:value-type="string">
            <text:p text:style-name="P11">3.3V–5V (with level shifting)<text:span text:style-name="T3"/></text:p>
          </table:table-cell>
          <table:table-cell table:style-name="Table1.A1" office:value-type="string">
            <text:p text:style-name="P11">3.3V–5V (with level shifting)<text:span text:style-name="T3"/></text:p>
          </table:table-cell>
          <table:table-cell table:style-name="Table1.A1" office:value-type="string">
            <text:p text:style-name="P11">3.3V–5V (with level shifting)<text:span text:style-name="T3"/></text:p>
          </table:table-cell>
        </table:table-row>
      </table:table>
      <text:p text:style-name="P12"/>
      <text:h text:style-name="Heading_20_1" text:outline-level="1">Practical Considerations </text:h>
      <text:h text:style-name="Heading_20_2" text:outline-level="2">Choosing the Right System</text:h>
      <text:list text:style-name="L4">
        <text:list-item>
          <text:p text:style-name="P13">SparkFun Qwiic: Ideal for hobbyists focused on I2C-based projects who want a simple, compact, and affordable ecosystem. Best for beginners due to its ease of use and polarized connectors.</text:p>
        </text:list-item>
        <text:list-item>
          <text:p text:style-name="P13"><text:soft-page-break/>SparkFun Qwiic Micro: Perfect for projects where size is a constraint, such as wearables or tiny IoT devices. However, it sacrifices daisy-chain capability for compactness.</text:p>
        </text:list-item>
        <text:list-item>
          <text:p text:style-name="P13">Adafruit STEMMA: Suited for projects requiring flexibility across I2C, PWM, analog, or digital signals. The 2.0mm JST PH connectors are more robust but larger, making them less ideal for wearables.</text:p>
        </text:list-item>
        <text:list-item>
          <text:p text:style-name="P13">Adafruit STEMMA QT: The best choice for compact I2C projects and for hobbyists who want cross-compatibility with Qwiic devices. The built-in level shifting makes it versatile for mixed-voltage systems.</text:p>
        </text:list-item>
      </text:list>
      <text:h text:style-name="Heading_20_2" text:outline-level="2">Cross-Compatibility</text:h>
      <text:list text:style-name="L5">
        <text:list-item>
          <text:p text:style-name="P14">Qwiic and STEMMA QT: The shared 1mm pitch, 4-pin JST SH connector ensures seamless compatibility, allowing hobbyists to mix and match components from both ecosystems.</text:p>
        </text:list-item>
        <text:list-item>
          <text:p text:style-name="P14">STEMMA and Grove/Gravity: The 2.0mm JST PH connectors are compatible with Grove and Gravity, expanding the range of available components but requiring adapters for Qwiic or STEMMA QT integration.</text:p>
        </text:list-item>
      </text:list>
      <text:h text:style-name="Heading_20_2" text:outline-level="2">Wiring and Setup Tips</text:h>
      <text:list text:style-name="L6">
        <text:list-item>
          <text:p text:style-name="P15">Check Voltage Compatibility: While STEMMA boards include level shifting, some Qwiic boards are designed for 3.3V only. Verify the voltage requirements of your microcontroller and peripherals to avoid damage.</text:p>
        </text:list-item>
        <text:list-item>
          <text:p text:style-name="P15">Use I2C Addresses: When daisy-chaining multiple I2C devices, ensure each device has a unique I2C address to avoid conflicts. Most Qwiic and STEMMA boards allow address configuration via jumpers or software.</text:p>
        </text:list-item>
        <text:list-item>
          <text:p text:style-name="P15">Cable Length: For Qwiic, choose appropriate cable lengths (50mm, 100mm, or 200mm) based on your project’s layout. Long cables may introduce signal noise in I2C communication, so keep lengths minimal when possible.</text:p>
        </text:list-item>
        <text:list-item>
          <text:p text:style-name="P15">Breadboard Integration: Use Qwiic or STEMMA jumper cables to connect to non-compatible systems (e.g., breadboards or Arduino pins).</text:p>
        </text:list-item>
      </text:list>
      <text:h text:style-name="Heading_20_2" text:outline-level="2">Debugging Common Issues</text:h>
      <text:list text:style-name="L7">
        <text:list-item>
          <text:p text:style-name="P16">No Communication: Check for loose connections, mismatched I2C addresses, or incorrect voltage levels. Use a multimeter to verify power and ground connections.</text:p>
        </text:list-item>
        <text:list-item>
          <text:p text:style-name="P16">Signal Noise: Long I2C cables or high-speed communication can introduce noise. Add pull-up resistors (typically 4.7kΩ) to the SDA and SCL lines if not already present on the board.</text:p>
        </text:list-item>
        <text:list-item>
          <text:p text:style-name="P16">Polarity Errors: Although connectors are polarized, double-check cable orientation, especially when using custom or third-party cables.</text:p>
        </text:list-item>
      </text:list>
      <text:p text:style-name="P17"/>
      <text:p text:style-name="P17"/>
      <text:h text:style-name="Heading_20_1" text:outline-level="1"><text:soft-page-break/>Additional Resources</text:h>
      <text:list text:style-name="L8">
        <text:list-item>
          <text:p text:style-name="P18"><text:span text:style-name="T4">SparkFun Qwiic Tutorials: SparkFun’s website </text:span><text:a xlink:type="simple" xlink:href="https://www.sparkfun.com/qwiic" office:target-frame-name="_blank" xlink:show="new" text:style-name="Internet_20_link" text:visited-style-name="Visited_20_Internet_20_Link"><text:span text:style-name="T5">(https://www.sparkfun.com/qwiic)</text:span></text:a><text:span text:style-name="T4"> offers guides on setting up Qwiic projects, including Arduino and Python code examples.</text:span></text:p>
        </text:list-item>
        <text:list-item>
          <text:p text:style-name="P18"><text:span text:style-name="T4">Adafruit Learning System: Adafruit’s learning platform </text:span><text:a xlink:type="simple" xlink:href="https://learn.adafruit.com/" office:target-frame-name="_blank" xlink:show="new" text:style-name="Internet_20_link" text:visited-style-name="Visited_20_Internet_20_Link"><text:span text:style-name="T5">(https://learn.adafruit.com)</text:span></text:a><text:span text:style-name="T4"> provides detailed tutorials on STEMMA and STEMMA QT, including circuit diagrams and code.</text:span></text:p>
        </text:list-item>
        <text:list-item>
          <text:p text:style-name="P18"><text:span text:style-name="T4">I2C Protocol Basics: For a deeper understanding of I2C, check out SparkFun’s I2C tutorial </text:span><text:a xlink:type="simple" xlink:href="https://learn.sparkfun.com/tutorials/i2c" office:target-frame-name="_blank" xlink:show="new" text:style-name="Internet_20_link" text:visited-style-name="Visited_20_Internet_20_Link"><text:span text:style-name="T5">(https://learn.sparkfun.com/tutorials/i2c)</text:span></text:a><text:span text:style-name="T4"> or Adafruit’s guide </text:span><text:a xlink:type="simple" xlink:href="https://learn.adafruit.com/i2c-addresses" office:target-frame-name="_blank" xlink:show="new" text:style-name="Internet_20_link" text:visited-style-name="Visited_20_Internet_20_Link"><text:span text:style-name="T5">(https://learn.adafruit.com/i2c-addresses)</text:span></text:a><text:span text:style-name="T4">.</text:span></text:p>
        </text:list-item>
        <text:list-item>
          <text:p text:style-name="P19">Community Projects: Search for “Qwiic projects” or “STEMMA projects” on platforms like Hackster.io or Instructables for inspiration.</text:p>
        </text:list-item>
      </text:list>
      <text:p text:style-name="P17"/>
      <text:h text:style-name="Heading_20_1" text:outline-level="1">Conclusion</text:h>
      <text:p text:style-name="P20">The SparkFun Qwiic and Adafruit STEMMA/STEMMA QT systems are game-changers for hobbyists, offering plug-and-play simplicity, cross-compatibility, and flexibility for a wide range of projects. Whether you’re building a compact wearable with Qwiic Micro, a mixed-signal robot with STEMMA, or a modular sensor network with Qwiic and STEMMA QT, these ecosystems make prototyping faster, more reliable, and accessible to all skill levels. By understanding their features and limitations, hobbyists can choose the right system for their needs and create innovative projects with ease.</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1:22:56.519937000</meta:creation-date>
    <dc:date>2025-08-31T23:03:01.059164000</dc:date>
    <meta:editing-duration>PT53M6S</meta:editing-duration>
    <meta:editing-cycles>1</meta:editing-cycles>
    <meta:document-statistic meta:table-count="1" meta:image-count="0" meta:object-count="0" meta:page-count="5" meta:paragraph-count="115" meta:word-count="1263" meta:character-count="8673" meta:non-whitespace-character-count="7564"/>
    <meta:generator>LibreOffice/25.2.2.2$MacOSX_AARCH64 LibreOffice_project/7370d4be9e3cf6031a51beef54ff3bda878e3fac</meta:generator>
  </office:meta>
</office:document-meta>
</file>