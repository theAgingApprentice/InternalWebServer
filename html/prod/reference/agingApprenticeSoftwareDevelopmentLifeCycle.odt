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ans-serif"/>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ans-serif"/>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Segoe UI" fo:font-size="13.5pt" fo:letter-spacing="normal" fo:font-style="normal" fo:font-weight="bold" officeooo:rsid="001236fc" officeooo:paragraph-rsid="001236fc"/>
    </style:style>
    <style:style style:name="P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Segoe UI" fo:font-size="10.5pt" fo:letter-spacing="normal" fo:font-style="normal" fo:font-weight="normal"/>
    </style:style>
    <style:style style:name="P3" style:family="paragraph" style:parent-style-name="Text_20_body" style:list-style-name="L1">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officeooo:paragraph-rsid="001236fc"/>
    </style:style>
    <style:style style:name="P4" style:family="paragraph" style:parent-style-name="Text_20_body" style:list-style-name="L1">
      <style:paragraph-properties fo:margin-top="0cm" fo:margin-bottom="0cm" style:contextual-spacing="false" style:line-height-at-least="0.529cm"/>
      <style:text-properties fo:font-variant="normal" fo:text-transform="none" fo:color="#000000" loext:opacity="100%" style:font-name="Segoe UI" fo:font-size="10.5pt" fo:letter-spacing="normal" fo:font-style="normal" fo:font-weight="normal" officeooo:paragraph-rsid="001236fc"/>
    </style:style>
    <style:style style:name="P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Segoe UI" fo:font-size="10.5pt" fo:letter-spacing="normal" fo:font-style="normal" fo:font-weight="normal" officeooo:rsid="001236fc" officeooo:paragraph-rsid="001236fc"/>
    </style:style>
    <style:style style:name="P6" style:family="paragraph" style:parent-style-name="Text_20_body" style:list-style-name="L2">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7" style:family="paragraph" style:parent-style-name="Text_20_body" style:list-style-name="L3">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8" style:family="paragraph" style:parent-style-name="Text_20_body" style:list-style-name="L4">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9" style:family="paragraph" style:parent-style-name="Text_20_body" style:list-style-name="L5">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10" style:family="paragraph" style:parent-style-name="Text_20_body" style:list-style-name="L6">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11" style:family="paragraph" style:parent-style-name="Text_20_body" style:list-style-name="L7">
      <style:paragraph-properties fo:margin-top="0cm" fo:margin-bottom="0cm" style:contextual-spacing="false" style:line-height-at-least="0.529cm"/>
      <style:text-properties fo:font-variant="normal" fo:text-transform="none" fo:color="#000000" loext:opacity="100%" style:font-name="Aptos" fo:font-size="12pt" fo:letter-spacing="normal" fo:font-style="normal" fo:font-weight="normal"/>
    </style:style>
    <style:style style:name="P1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Segoe UI" fo:font-size="13.5pt" fo:letter-spacing="normal" fo:font-style="normal" fo:font-weight="bold"/>
    </style:style>
    <style:style style:name="P13" style:family="paragraph" style:parent-style-name="Text_20_body" style:list-style-name="L8">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14" style:family="paragraph" style:parent-style-name="Text_20_body" style:list-style-name="L9">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15" style:family="paragraph" style:parent-style-name="Text_20_body" style:list-style-name="L10">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16" style:family="paragraph" style:parent-style-name="Text_20_body" style:list-style-name="L11">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17" style:family="paragraph" style:parent-style-name="Text_20_body" style:list-style-name="L12">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Segoe UI" fo:font-size="10.5pt" fo:letter-spacing="normal" fo:font-style="normal" fo:font-weight="bold"/>
    </style:style>
    <style:style style:name="P18" style:family="paragraph" style:parent-style-name="Text_20_body" style:list-style-name="L12">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19" style:family="paragraph" style:parent-style-name="Text_20_body" style:list-style-name="L13">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0"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fo:letter-spacing="normal"/>
    </style:style>
    <style:style style:name="P21" style:family="paragraph" style:parent-style-name="Text_20_body" style:list-style-name="L14">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Segoe UI" fo:font-size="10.5pt" fo:letter-spacing="normal" fo:font-style="normal" fo:font-weight="bold"/>
    </style:style>
    <style:style style:name="P22" style:family="paragraph" style:parent-style-name="Text_20_body" style:list-style-name="L14">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3"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Aptos" fo:font-size="12pt" fo:letter-spacing="normal" fo:font-style="normal" fo:font-weight="normal"/>
    </style:style>
    <style:style style:name="P2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Courier New" fo:font-size="10pt" fo:letter-spacing="normal" fo:font-style="normal" fo:font-weight="normal"/>
    </style:style>
    <style:style style:name="P25" style:family="paragraph" style:parent-style-name="Text_20_body" style:list-style-name="L15">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6" style:family="paragraph" style:parent-style-name="Text_20_body" style:list-style-name="L16">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7" style:family="paragraph" style:parent-style-name="Text_20_body" style:list-style-name="L17">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8" style:family="paragraph" style:parent-style-name="Text_20_body" style:list-style-name="L18">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29" style:family="paragraph" style:parent-style-name="Text_20_body" style:list-style-name="L19">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P30" style:family="paragraph" style:parent-style-name="Text_20_body" style:list-style-name="L20">
      <style:paragraph-properties fo:margin-left="0cm" fo:margin-right="0cm" fo:margin-top="0cm" fo:margin-bottom="0cm" style:contextual-spacing="false" style:line-height-at-least="0.529cm" fo:text-indent="0cm" style:auto-text-indent="false"/>
      <style:text-properties fo:font-variant="normal" fo:text-transform="none" fo:color="#000000" loext:opacity="100%" style:font-name="Aptos" fo:font-size="12pt" fo:letter-spacing="normal" fo:font-style="normal" fo:font-weight="normal"/>
    </style:style>
    <style:style style:name="T1" style:family="text">
      <style:text-properties officeooo:rsid="001236fc"/>
    </style:style>
    <style:style style:name="T2" style:family="text">
      <style:text-properties fo:font-weight="bold"/>
    </style:style>
    <style:style style:name="T3" style:family="text">
      <style:text-properties style:font-name="Segoe UI" fo:font-size="10.5pt" fo:font-weight="bold"/>
    </style:style>
    <style:style style:name="T4" style:family="text">
      <style:text-properties style:font-name="Segoe UI" fo:font-size="10.5pt"/>
    </style:style>
    <style:style style:name="T5" style:family="text">
      <style:text-properties style:font-name="Courier New" fo:font-size="10pt"/>
    </style:style>
    <style:style style:name="T6" style:family="text">
      <style:text-properties style:font-name="Courier New" fo:font-size="10pt" fo:font-weight="bold"/>
    </style:style>
    <style:style style:name="T7" style:family="text">
      <style:text-properties style:font-name="Segoe UI" fo:font-size="13.5pt" fo:font-weight="bold"/>
    </style:style>
    <style:style style:name="T8" style:family="text">
      <style:text-properties style:font-name="Courier New" fo:font-size="10pt"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ing Apprentice Software Development Lifecycle</text:p>
      <text:p text:style-name="Subtitle">Standards and best practices</text:p>
      <text:p text:style-name="P1"/>
      <text:h text:style-name="Heading_20_1" text:outline-level="1">Development Environment <text:span text:style-name="T1">Terminology</text:span></text:h>
      <text:p text:style-name="P2"><text:span text:style-name="T1">I </text:span>refer to <text:span text:style-name="T1">the my development </text:span><text:s/>setup as <text:span text:style-name="T1">the</text:span> <text:span text:style-name="T2">development environment</text:span> or <text:span text:style-name="T2">development workflow</text:span>. This encompasses all the tools and processes use<text:span text:style-name="T1">d</text:span> for coding, version control, project management, and documentation.</text:p>
      <text:list text:style-name="L1">
        <text:list-item>
          <text:p text:style-name="P3"><text:span text:style-name="T3">Local Tools</text:span><text:span text:style-name="T4">: </text:span></text:p>
          <text:list>
            <text:list-item>
              <text:p text:style-name="P4">Visual Studio Code, </text:p>
            </text:list-item>
            <text:list-item>
              <text:p text:style-name="P4">Git</text:p>
            </text:list-item>
          </text:list>
        </text:list-item>
        <text:list-item>
          <text:p text:style-name="P3"><text:span text:style-name="T3">Remote Tools</text:span><text:span text:style-name="T4">: </text:span></text:p>
          <text:list>
            <text:list-item>
              <text:p text:style-name="P4">GitHub (repositories, projects, wikis)</text:p>
            </text:list-item>
          </text:list>
        </text:list-item>
      </text:list>
      <text:p text:style-name="P2"/>
      <text:h text:style-name="Heading_20_1" text:outline-level="1"><text:span text:style-name="T1">Guidelines</text:span>:</text:h>
      <text:p text:style-name="P5">This is how to set up a new project.</text:p>
      <text:p text:style-name="P5"/>
      <text:h text:style-name="Heading_20_2" text:outline-level="2">1. Create a Clear Repository Structure</text:h>
      <text:list text:style-name="L2">
        <text:list-item>
          <text:p text:style-name="P6"><text:span text:style-name="T3">Organize Files</text:span><text:span text:style-name="T4">: Use folders to categorize different types of files (e.g., </text:span><text:span text:style-name="T5">src</text:span> <text:span text:style-name="T4">for source code, </text:span><text:span text:style-name="T5">docs</text:span> <text:span text:style-name="T4">for documentation).</text:span></text:p>
        </text:list-item>
        <text:list-item>
          <text:p text:style-name="P6"><text:span text:style-name="T3">README.md</text:span><text:span text:style-name="T4">: Write a detailed README file to explain the purpose of your project, how to set it up, and any other relevant information.</text:span></text:p>
        </text:list-item>
      </text:list>
      <text:h text:style-name="Heading_20_2" text:outline-level="2" text:is-list-header="true">2. Use Issues and Labels</text:h>
      <text:list text:style-name="L3">
        <text:list-item>
          <text:p text:style-name="P7"><text:span text:style-name="T3">Track Tasks</text:span><text:span text:style-name="T4">: Create issues for tasks, bugs, and features. This helps you keep track of what needs to be done.</text:span></text:p>
        </text:list-item>
        <text:list-item>
          <text:p text:style-name="P7"><text:span text:style-name="T3">Labeling</text:span><text:span text:style-name="T4">: Use labels to categorize issues (e.g., </text:span><text:span text:style-name="T5">bug</text:span><text:span text:style-name="T4">, </text:span><text:span text:style-name="T5">enhancement</text:span><text:span text:style-name="T4">, </text:span><text:span text:style-name="T5">question</text:span><text:span text:style-name="T4">). This makes it easier to prioritize and manage tasks.</text:span></text:p>
        </text:list-item>
      </text:list>
      <text:h text:style-name="Heading_20_2" text:outline-level="2" text:is-list-header="true">3. Utilize Project Boards</text:h>
      <text:list text:style-name="L4">
        <text:list-item>
          <text:p text:style-name="P8"><text:span text:style-name="T3">Kanban Style</text:span><text:span text:style-name="T4">: Use GitHub's project boards to visualize your workflow. You can create columns like </text:span><text:span text:style-name="T5">To Do</text:span><text:span text:style-name="T4">, </text:span><text:span text:style-name="T5">In Progress</text:span><text:span text:style-name="T4">, and </text:span><text:span text:style-name="T5">Done</text:span> <text:span text:style-name="T4">to track the status of tasks.</text:span></text:p>
        </text:list-item>
        <text:list-item>
          <text:p text:style-name="P8"><text:span text:style-name="T3">Flexibility</text:span><text:span text:style-name="T4">: This is great for uncommitted resources as you can move tasks around based on availability and priority.</text:span></text:p>
        </text:list-item>
      </text:list>
      <text:h text:style-name="Heading_20_2" text:outline-level="2" text:is-list-header="true"><text:soft-page-break/>4. Branching Strategy</text:h>
      <text:list text:style-name="L5">
        <text:list-item>
          <text:p text:style-name="P9"><text:span text:style-name="T3">Main Branch</text:span><text:span text:style-name="T4">: Keep your main branch stable and use feature branches for new developments.</text:span></text:p>
        </text:list-item>
        <text:list-item>
          <text:p text:style-name="P9"><text:span text:style-name="T3">Pull Requests</text:span><text:span text:style-name="T4">: Use pull requests to review and merge changes. This helps maintain code quality and allows you to track changes.</text:span></text:p>
        </text:list-item>
      </text:list>
      <text:h text:style-name="Heading_20_2" text:outline-level="2" text:is-list-header="true">5. Documentation</text:h>
      <text:list text:style-name="L6">
        <text:list-item>
          <text:p text:style-name="P10"><text:span text:style-name="T3">Wiki</text:span><text:span text:style-name="T4">: Use GitHub's wiki feature to create detailed documentation for your project.</text:span></text:p>
        </text:list-item>
        <text:list-item>
          <text:p text:style-name="P10"><text:span text:style-name="T3">Code Comments</text:span><text:span text:style-name="T4">: Write comments in your code to explain complex logic and decisions.</text:span></text:p>
        </text:list-item>
      </text:list>
      <text:h text:style-name="Heading_20_2" text:outline-level="2" text:is-list-header="true">6. Automation</text:h>
      <text:list text:style-name="L7">
        <text:list-item>
          <text:p text:style-name="P11"><text:span text:style-name="T3">GitHub Actions</text:span><text:span text:style-name="T4">: Set up GitHub Actions for automated testing, building, and deployment. This can save time and ensure consistency.</text:span></text:p>
        </text:list-item>
      </text:list>
      <text:p text:style-name="P12">7. Community Engagement</text:p>
      <text:list text:style-name="L8">
        <text:list-item>
          <text:p text:style-name="P13"><text:span text:style-name="T3">Collaborators</text:span><text:span text:style-name="T4">: If you want others to contribute, add collaborators and encourage them to participate.</text:span></text:p>
        </text:list-item>
        <text:list-item>
          <text:p text:style-name="P13"><text:span text:style-name="T3">Discussions</text:span><text:span text:style-name="T4">: Use GitHub Discussions to engage with the community, ask questions, and share ideas.</text:span></text:p>
        </text:list-item>
      </text:list>
      <text:p text:style-name="P12">8. Regular Updates</text:p>
      <text:list text:style-name="L9">
        <text:list-item>
          <text:p text:style-name="P14"><text:span text:style-name="T3">Commit Regularly</text:span><text:span text:style-name="T4">: Make regular commits to keep track of progress and changes.</text:span></text:p>
        </text:list-item>
        <text:list-item>
          <text:p text:style-name="P14"><text:span text:style-name="T3">Changelog</text:span><text:span text:style-name="T4">: Maintain a changelog to document major updates and changes.</text:span></text:p>
        </text:list-item>
      </text:list>
      <text:p text:style-name="P2">By following these tips, you can effectively manage your hobby project on GitHub, even with uncommitted resources. Do you have any specific goals or features in mind for your project?</text:p>
      <text:p text:style-name="P12">Development Workflow</text:p>
      <text:list text:style-name="L10">
        <text:list-item>
          <text:p text:style-name="P15"><text:span text:style-name="T3">Processes</text:span><text:span text:style-name="T4">: Branching strategy, committing changes, pull requests, continuous integration</text:span></text:p>
        </text:list-item>
      </text:list>
      <text:p text:style-name="P2">Using Visual Studio Code with Git locally and GitHub remotely is a great setup! Here's a branching strategy and process that can help you manage your project effectively:</text:p>
      <text:p text:style-name="P12">Branching Strategy</text:p>
      <text:list text:style-name="L11">
        <text:list-item>
          <text:p text:style-name="P16"><text:span text:style-name="T3">Main Branch (</text:span><text:span text:style-name="T6">main</text:span><text:span text:style-name="T3">)</text:span></text:p>
          <text:list>
            <text:list-item>
              <text:p text:style-name="P16"><text:span text:style-name="T3">Purpose</text:span><text:span text:style-name="T4">: This is your stable branch where the production-ready code resides.</text:span></text:p>
            </text:list-item>
            <text:list-item>
              <text:p text:style-name="P16"><text:span text:style-name="T3">Usage</text:span><text:span text:style-name="T4">: Only merge tested and reviewed code into this branch.</text:span></text:p>
            </text:list-item>
          </text:list>
        </text:list-item>
        <text:list-item>
          <text:p text:style-name="P16"><text:span text:style-name="T3">Development Branch (</text:span><text:span text:style-name="T6">dev</text:span><text:span text:style-name="T3">)</text:span></text:p>
          <text:list>
            <text:list-item>
              <text:p text:style-name="P16"><text:span text:style-name="T3">Purpose</text:span><text:span text:style-name="T4">: This branch is used for integrating features and bug fixes before they are ready for the main branch.</text:span></text:p>
            </text:list-item>
            <text:list-item>
              <text:p text:style-name="P16"><text:span text:style-name="T3">Usage</text:span><text:span text:style-name="T4">: Merge feature branches into this branch for testing and integration.</text:span></text:p>
            </text:list-item>
          </text:list>
        </text:list-item>
        <text:list-item>
          <text:p text:style-name="P16"><text:span text:style-name="T3">Feature Branches (</text:span><text:span text:style-name="T6">feature/feature-name</text:span><text:span text:style-name="T3">)</text:span></text:p>
          <text:list>
            <text:list-item>
              <text:p text:style-name="P16"><text:span text:style-name="T3">Purpose</text:span><text:span text:style-name="T4">: Each new feature or improvement gets its own branch.</text:span></text:p>
            </text:list-item>
            <text:list-item>
              <text:p text:style-name="P16"><text:span text:style-name="T3">Usage</text:span><text:span text:style-name="T4">: Create a new branch from </text:span><text:span text:style-name="T5">dev</text:span> <text:span text:style-name="T4">for each feature. Once the feature is complete and tested, merge it back into </text:span><text:span text:style-name="T5">dev</text:span><text:span text:style-name="T4">.</text:span></text:p>
            </text:list-item>
          </text:list>
        </text:list-item>
        <text:list-item>
          <text:p text:style-name="P16"><text:span text:style-name="T3">Bugfix Branches (</text:span><text:span text:style-name="T6">bugfix/bug-name</text:span><text:span text:style-name="T3">)</text:span></text:p>
          <text:list>
            <text:list-item>
              <text:p text:style-name="P16"><text:span text:style-name="T3">Purpose</text:span><text:span text:style-name="T4">: Similar to feature branches, but specifically for fixing bugs.</text:span></text:p>
            </text:list-item>
            <text:list-item>
              <text:p text:style-name="P16"><text:span text:style-name="T3">Usage</text:span><text:span text:style-name="T4">: Create a new branch from </text:span><text:span text:style-name="T5">dev</text:span> <text:span text:style-name="T4">for each bug fix. Merge it back into </text:span><text:span text:style-name="T5">dev</text:span> <text:span text:style-name="T4">once the fix is complete.</text:span></text:p>
            </text:list-item>
          </text:list>
        </text:list-item>
        <text:list-item>
          <text:p text:style-name="P16"><text:span text:style-name="T3">Release Branches (</text:span><text:span text:style-name="T6">release/release-version</text:span><text:span text:style-name="T3">)</text:span></text:p>
          <text:list>
            <text:list-item>
              <text:p text:style-name="P16"><text:soft-page-break/><text:span text:style-name="T3">Purpose</text:span><text:span text:style-name="T4">: Used for preparing a new production release.</text:span></text:p>
            </text:list-item>
            <text:list-item>
              <text:p text:style-name="P16"><text:span text:style-name="T3">Usage</text:span><text:span text:style-name="T4">: Create a release branch from </text:span><text:span text:style-name="T5">dev</text:span> <text:span text:style-name="T4">when you are ready to prepare a new release. Perform final testing and fixes here before merging into </text:span><text:span text:style-name="T5">main</text:span><text:span text:style-name="T4">.</text:span></text:p>
            </text:list-item>
          </text:list>
        </text:list-item>
        <text:list-item>
          <text:p text:style-name="P16"><text:span text:style-name="T3">Hotfix Branches (</text:span><text:span text:style-name="T6">hotfix/hotfix-name</text:span><text:span text:style-name="T3">)</text:span></text:p>
          <text:list>
            <text:list-item>
              <text:p text:style-name="P16"><text:span text:style-name="T3">Purpose</text:span><text:span text:style-name="T4">: For urgent fixes that need to be applied directly to the </text:span><text:span text:style-name="T5">main</text:span> <text:span text:style-name="T4">branch.</text:span></text:p>
            </text:list-item>
            <text:list-item>
              <text:p text:style-name="P16"><text:span text:style-name="T3">Usage</text:span><text:span text:style-name="T4">: Create a hotfix branch from </text:span><text:span text:style-name="T5">main</text:span><text:span text:style-name="T4">, apply the fix, and merge it back into </text:span><text:span text:style-name="T5">main</text:span> <text:span text:style-name="T4">and </text:span><text:span text:style-name="T5">dev</text:span><text:span text:style-name="T4">.</text:span></text:p>
            </text:list-item>
          </text:list>
        </text:list-item>
      </text:list>
      <text:p text:style-name="P12">Process</text:p>
      <text:list text:style-name="L12">
        <text:list-item>
          <text:p text:style-name="P17">Creating Branches</text:p>
          <text:list>
            <text:list-item>
              <text:p text:style-name="P18"><text:span text:style-name="T3">Feature/Bugfix</text:span><text:span text:style-name="T4">: </text:span><text:span text:style-name="T5">git checkout -b feature/feature-name dev</text:span></text:p>
            </text:list-item>
            <text:list-item>
              <text:p text:style-name="P18"><text:span text:style-name="T3">Release</text:span><text:span text:style-name="T4">: </text:span><text:span text:style-name="T5">git checkout -b release/release-version dev</text:span></text:p>
            </text:list-item>
            <text:list-item>
              <text:p text:style-name="P18"><text:span text:style-name="T3">Hotfix</text:span><text:span text:style-name="T4">: </text:span><text:span text:style-name="T5">git checkout -b hotfix/hotfix-name main</text:span></text:p>
            </text:list-item>
          </text:list>
        </text:list-item>
        <text:list-item>
          <text:p text:style-name="P17">Committing Changes</text:p>
          <text:list>
            <text:list-item>
              <text:p text:style-name="P18"><text:span text:style-name="T3">Regular Commits</text:span><text:span text:style-name="T4">: Make regular commits with clear messages to track progress.</text:span></text:p>
            </text:list-item>
            <text:list-item>
              <text:p text:style-name="P18"><text:span text:style-name="T3">Commit Message Format</text:span><text:span text:style-name="T4">: Use a format like </text:span><text:span text:style-name="T5">type(scope): description</text:span> <text:span text:style-name="T4">(e.g., </text:span><text:span text:style-name="T5">feat(login): add user authentication</text:span><text:span text:style-name="T4">).</text:span></text:p>
            </text:list-item>
          </text:list>
        </text:list-item>
        <text:list-item>
          <text:p text:style-name="P17">Pull Requests</text:p>
          <text:list>
            <text:list-item>
              <text:p text:style-name="P18"><text:span text:style-name="T3">Creating PRs</text:span><text:span text:style-name="T4">: Open pull requests on GitHub to merge feature/bugfix branches into </text:span><text:span text:style-name="T5">dev</text:span><text:span text:style-name="T4">, and </text:span><text:span text:style-name="T5">dev</text:span> <text:span text:style-name="T4">into </text:span><text:span text:style-name="T5">main</text:span><text:span text:style-name="T4">.</text:span></text:p>
            </text:list-item>
            <text:list-item>
              <text:p text:style-name="P18"><text:span text:style-name="T3">Review</text:span><text:span text:style-name="T4">: Review and discuss changes in the pull request before merging.</text:span></text:p>
            </text:list-item>
          </text:list>
        </text:list-item>
        <text:list-item>
          <text:p text:style-name="P17">Merging</text:p>
          <text:list>
            <text:list-item>
              <text:p text:style-name="P18"><text:span text:style-name="T3">Merge Strategy</text:span><text:span text:style-name="T4">: Use </text:span><text:span text:style-name="T5">git merge</text:span> <text:span text:style-name="T4">or </text:span><text:span text:style-name="T5">git rebase</text:span> <text:span text:style-name="T4">depending on your preference. </text:span><text:span text:style-name="T5">Rebase</text:span> <text:span text:style-name="T4">keeps a linear history, while </text:span><text:span text:style-name="T5">merge</text:span> <text:span text:style-name="T4">preserves the commit history.</text:span></text:p>
            </text:list-item>
            <text:list-item>
              <text:p text:style-name="P18"><text:span text:style-name="T3">Conflict Resolution</text:span><text:span text:style-name="T4">: Resolve any merge conflicts during the pull request review process.</text:span></text:p>
            </text:list-item>
          </text:list>
        </text:list-item>
        <text:list-item>
          <text:p text:style-name="P17">Continuous Integration</text:p>
          <text:list>
            <text:list-item>
              <text:p text:style-name="P18"><text:span text:style-name="T3">Automated Tests</text:span><text:span text:style-name="T4">: Set up GitHub Actions to run automated tests on pull requests to ensure code quality.</text:span></text:p>
            </text:list-item>
            <text:list-item>
              <text:p text:style-name="P18"><text:span text:style-name="T3">Builds</text:span><text:span text:style-name="T4">: Automate builds and deployments if applicable.</text:span></text:p>
            </text:list-item>
          </text:list>
        </text:list-item>
      </text:list>
      <text:p text:style-name="P12">Example Workflow</text:p>
      <text:list text:style-name="L13">
        <text:list-item>
          <text:p text:style-name="P19"><text:span text:style-name="T3">Start a Feature</text:span><text:span text:style-name="T4">: </text:span><text:span text:style-name="T5">git checkout -b feature/new-feature dev</text:span></text:p>
        </text:list-item>
        <text:list-item>
          <text:p text:style-name="P19"><text:span text:style-name="T3">Develop and Commit</text:span><text:span text:style-name="T4">: Make changes and commit regularly.</text:span></text:p>
        </text:list-item>
        <text:list-item>
          <text:p text:style-name="P19"><text:span text:style-name="T3">Push to GitHub</text:span><text:span text:style-name="T4">: </text:span><text:span text:style-name="T5">git push origin feature/new-feature</text:span></text:p>
        </text:list-item>
        <text:list-item>
          <text:p text:style-name="P19"><text:span text:style-name="T3">Open PR</text:span><text:span text:style-name="T4">: Open a pull request to merge </text:span><text:span text:style-name="T5">feature/new-feature</text:span> <text:span text:style-name="T4">into </text:span><text:span text:style-name="T5">dev</text:span><text:span text:style-name="T4">.</text:span></text:p>
        </text:list-item>
        <text:list-item>
          <text:p text:style-name="P19"><text:span text:style-name="T3">Review and Merge</text:span><text:span text:style-name="T4">: Review the PR, resolve conflicts, and merge.</text:span></text:p>
        </text:list-item>
        <text:list-item>
          <text:p text:style-name="P19"><text:span text:style-name="T3">Prepare Release</text:span><text:span text:style-name="T4">: </text:span><text:span text:style-name="T5">git checkout -b release/v1.0.0 dev</text:span></text:p>
        </text:list-item>
        <text:list-item>
          <text:p text:style-name="P19"><text:span text:style-name="T3">Final Testing</text:span><text:span text:style-name="T4">: Perform final testing and fixes.</text:span></text:p>
        </text:list-item>
        <text:list-item>
          <text:p text:style-name="P19"><text:span text:style-name="T3">Merge Release</text:span><text:span text:style-name="T4">: Merge </text:span><text:span text:style-name="T5">release/v1.0.0</text:span> <text:span text:style-name="T4">into </text:span><text:span text:style-name="T5">main</text:span><text:span text:style-name="T4">.</text:span></text:p>
        </text:list-item>
      </text:list>
      <text:p text:style-name="P2">By following this strategy and process, you can maintain a clean and organized workflow for your project. Do you have any specific features or goals for your project that you'd like to discuss further?</text:p>
      <text:p text:style-name="P20"> </text:p>
      <text:p text:style-name="P12">Steps to Automate Testing</text:p>
      <text:p text:style-name="P2">Absolutely! Automating testing when combining a feature branch with a release branch is a great way to ensure code quality and catch issues early. Here’s how you can set it up using GitHub Actions:</text:p>
      <text:list text:style-name="L14">
        <text:list-item>
          <text:p text:style-name="P21">Create a GitHub Actions Workflow</text:p>
          <text:list>
            <text:list-item>
              <text:p text:style-name="P22"><text:soft-page-break/><text:span text:style-name="T3">Location</text:span><text:span text:style-name="T4">: Place your workflow file in </text:span><text:span text:style-name="T5">.github/workflows/</text:span><text:span text:style-name="T4">.</text:span></text:p>
            </text:list-item>
            <text:list-item>
              <text:p text:style-name="P22"><text:span text:style-name="T3">File Name</text:span><text:span text:style-name="T4">: Name it something like </text:span><text:span text:style-name="T5">test-on-merge.yml</text:span><text:span text:style-name="T4">.</text:span></text:p>
            </text:list-item>
          </text:list>
        </text:list-item>
        <text:list-item>
          <text:p text:style-name="P21">Define the Workflow</text:p>
          <text:list>
            <text:list-item>
              <text:p text:style-name="P22"><text:span text:style-name="T3">Trigger</text:span><text:span text:style-name="T4">: Set the workflow to trigger on pull requests targeting the release branch.</text:span></text:p>
            </text:list-item>
            <text:list-item>
              <text:p text:style-name="P22"><text:span text:style-name="T3">Jobs</text:span><text:span text:style-name="T4">: Define jobs to run your tests.</text:span></text:p>
            </text:list-item>
          </text:list>
        </text:list-item>
      </text:list>
      <text:p text:style-name="P23"><text:span text:style-name="T7">Example Generic Workflow File (</text:span><text:span text:style-name="T6">test-on-merge.yml</text:span><text:span text:style-name="T7">)</text:span></text:p>
      <text:p text:style-name="P24">name: Test on Merge</text:p>
      <text:p text:style-name="P20"> </text:p>
      <text:p text:style-name="P24">on:</text:p>
      <text:p text:style-name="P20">  <text:span text:style-name="T8">pull_request:</text:span></text:p>
      <text:p text:style-name="P20">    <text:span text:style-name="T8">branches:</text:span></text:p>
      <text:p text:style-name="P20">      <text:span text:style-name="T8">- release/*</text:span></text:p>
      <text:p text:style-name="P20"> </text:p>
      <text:p text:style-name="P24">jobs:</text:p>
      <text:p text:style-name="P20">  <text:span text:style-name="T8">test:</text:span></text:p>
      <text:p text:style-name="P20">    <text:span text:style-name="T8">runs-on: ubuntu-latest</text:span></text:p>
      <text:p text:style-name="P20"> </text:p>
      <text:p text:style-name="P20">    <text:span text:style-name="T8">steps:</text:span></text:p>
      <text:p text:style-name="P20">    <text:span text:style-name="T8">- name: Checkout code</text:span></text:p>
      <text:p text:style-name="P20">      <text:span text:style-name="T8">uses: actions/checkout@v2</text:span></text:p>
      <text:p text:style-name="P20"> </text:p>
      <text:p text:style-name="P20">    <text:span text:style-name="T8">- name: Set up Node.js</text:span></text:p>
      <text:p text:style-name="P20">      <text:span text:style-name="T8">uses: actions/setup-node@v2</text:span></text:p>
      <text:p text:style-name="P20">      <text:span text:style-name="T8">with:</text:span></text:p>
      <text:p text:style-name="P20">        <text:span text:style-name="T8">node-version: '14'</text:span></text:p>
      <text:p text:style-name="P20"> </text:p>
      <text:p text:style-name="P20">    <text:span text:style-name="T8">- name: Install dependencies</text:span></text:p>
      <text:p text:style-name="P20">      <text:span text:style-name="T8">run: npm install</text:span></text:p>
      <text:p text:style-name="P20"> </text:p>
      <text:p text:style-name="P20">    <text:span text:style-name="T8">- name: Run tests</text:span></text:p>
      <text:p text:style-name="P20">      <text:span text:style-name="T8">run: npm test</text:span></text:p>
      <text:p text:style-name="P12">Explanation</text:p>
      <text:list text:style-name="L15">
        <text:list-item>
          <text:p text:style-name="P25"><text:span text:style-name="T3">Trigger</text:span><text:span text:style-name="T4">: The workflow triggers on pull requests to any branch that matches </text:span><text:span text:style-name="T5">release/*</text:span><text:span text:style-name="T4">.</text:span></text:p>
        </text:list-item>
        <text:list-item>
          <text:p text:style-name="P25"><text:span text:style-name="T3">Jobs</text:span><text:span text:style-name="T4">: The </text:span><text:span text:style-name="T5">test</text:span> <text:span text:style-name="T4">job runs on the latest Ubuntu environment.</text:span></text:p>
          <text:list>
            <text:list-item>
              <text:p text:style-name="P25"><text:span text:style-name="T3">Checkout code</text:span><text:span text:style-name="T4">: Uses the </text:span><text:span text:style-name="T5">actions/checkout</text:span> <text:span text:style-name="T4">action to check out the code.</text:span></text:p>
            </text:list-item>
            <text:list-item>
              <text:p text:style-name="P25"><text:span text:style-name="T3">Set up Node.js</text:span><text:span text:style-name="T4">: Sets up Node.js (adjust the version as needed).</text:span></text:p>
            </text:list-item>
            <text:list-item>
              <text:p text:style-name="P25"><text:span text:style-name="T3">Install dependencies</text:span><text:span text:style-name="T4">: Installs project dependencies.</text:span></text:p>
            </text:list-item>
            <text:list-item>
              <text:p text:style-name="P25"><text:span text:style-name="T3">Run tests</text:span><text:span text:style-name="T4">: Runs the tests using </text:span><text:span text:style-name="T5">npm test</text:span><text:span text:style-name="T4">.</text:span></text:p>
            </text:list-item>
          </text:list>
        </text:list-item>
      </text:list>
      <text:p text:style-name="P12">Additional Tips</text:p>
      <text:list text:style-name="L16">
        <text:list-item>
          <text:p text:style-name="P26"><text:span text:style-name="T3">Custom Scripts</text:span><text:span text:style-name="T4">: Modify the workflow to fit your project's specific testing needs (e.g., Python, Java).</text:span></text:p>
        </text:list-item>
        <text:list-item>
          <text:p text:style-name="P26"><text:span text:style-name="T3">Notifications</text:span><text:span text:style-name="T4">: Set up notifications to alert you of test results.</text:span></text:p>
        </text:list-item>
        <text:list-item>
          <text:p text:style-name="P26"><text:span text:style-name="T3">Coverage Reports</text:span><text:span text:style-name="T4">: Integrate tools like Codecov to generate coverage reports.</text:span></text:p>
        </text:list-item>
      </text:list>
      <text:p text:style-name="P2"><text:soft-page-break/>By automating testing, you can ensure that your code is thoroughly checked before merging, reducing the risk of introducing bugs. Do you need help with setting up specific tests or integrating other tools into your workflow?</text:p>
      <text:p text:style-name="P23"><text:span text:style-name="T7">Example ESP32 Workflow File (</text:span><text:span text:style-name="T6">arduino-test.yml</text:span><text:span text:style-name="T7">)</text:span></text:p>
      <text:p text:style-name="P23"><text:span text:style-name="T4">Certainly! Here's an example of a GitHub Actions workflow file (</text:span><text:span text:style-name="T5">arduino-test.yml</text:span><text:span text:style-name="T4">) to test Arduino code on an ESP32:</text:span></text:p>
      <text:p text:style-name="P20"> </text:p>
      <text:p text:style-name="P24">name: Arduino ESP32 Test</text:p>
      <text:p text:style-name="P20"> </text:p>
      <text:p text:style-name="P24">on:</text:p>
      <text:p text:style-name="P20">  <text:span text:style-name="T8">push:</text:span></text:p>
      <text:p text:style-name="P20">    <text:span text:style-name="T8">branches:</text:span></text:p>
      <text:p text:style-name="P20">      <text:span text:style-name="T8">- main</text:span></text:p>
      <text:p text:style-name="P20">  <text:span text:style-name="T8">pull_request:</text:span></text:p>
      <text:p text:style-name="P20">    <text:span text:style-name="T8">branches:</text:span></text:p>
      <text:p text:style-name="P20">      <text:span text:style-name="T8">- main</text:span></text:p>
      <text:p text:style-name="P20"> </text:p>
      <text:p text:style-name="P24">jobs:</text:p>
      <text:p text:style-name="P20">  <text:span text:style-name="T8">build:</text:span></text:p>
      <text:p text:style-name="P20">    <text:span text:style-name="T8">runs-on: ubuntu-latest</text:span></text:p>
      <text:p text:style-name="P20"> </text:p>
      <text:p text:style-name="P20">    <text:span text:style-name="T8">steps:</text:span></text:p>
      <text:p text:style-name="P20">    <text:span text:style-name="T8">- name: Checkout code</text:span></text:p>
      <text:p text:style-name="P20">      <text:span text:style-name="T8">uses: actions/checkout@v2</text:span></text:p>
      <text:p text:style-name="P20"> </text:p>
      <text:p text:style-name="P20">    <text:span text:style-name="T8">- name: Set up Arduino CLI</text:span></text:p>
      <text:p text:style-name="P20">      <text:span text:style-name="T8">uses: arduino/setup-arduino-cli@v1</text:span></text:p>
      <text:p text:style-name="P20">      <text:span text:style-name="T8">with:</text:span></text:p>
      <text:p text:style-name="P20">        <text:span text:style-name="T8">version: 'latest'</text:span></text:p>
      <text:p text:style-name="P20"> </text:p>
      <text:p text:style-name="P20">    <text:span text:style-name="T8">- name: Install ESP32 core</text:span></text:p>
      <text:p text:style-name="P20">      <text:span text:style-name="T8">run: arduino-cli core install esp32:esp32</text:span></text:p>
      <text:p text:style-name="P20"> </text:p>
      <text:p text:style-name="P20">    <text:span text:style-name="T8">- name: Install libraries</text:span></text:p>
      <text:p text:style-name="P20">      <text:span text:style-name="T8">run: |</text:span></text:p>
      <text:p text:style-name="P20">        <text:span text:style-name="T8">arduino-cli lib install "Adafruit Unified Sensor"</text:span></text:p>
      <text:p text:style-name="P20">        <text:span text:style-name="T8">arduino-cli lib install "Adafruit BME280 Library"</text:span></text:p>
      <text:p text:style-name="P20"> </text:p>
      <text:p text:style-name="P20">    <text:span text:style-name="T8">- name: Compile Sketch</text:span></text:p>
      <text:p text:style-name="P20">      <text:span text:style-name="T8">run: arduino-cli compile --fqbn esp32:esp32:esp32 your_sketch.ino</text:span></text:p>
      <text:p text:style-name="P20"> </text:p>
      <text:p text:style-name="P20">    <text:span text:style-name="T8">- name: Upload Sketch (optional)</text:span></text:p>
      <text:p text:style-name="P20">      <text:span text:style-name="T8">run: arduino-cli upload -p /dev/ttyUSB0 --fqbn esp32:esp32:esp32 your_sketch.ino</text:span></text:p>
      <text:p text:style-name="P20"><text:soft-page-break/>      <text:span text:style-name="T8">if: github.event_name == 'push'</text:span></text:p>
      <text:p text:style-name="P12">Explanation</text:p>
      <text:list text:style-name="L17">
        <text:list-item>
          <text:p text:style-name="P27"><text:span text:style-name="T3">Trigger</text:span><text:span text:style-name="T4">: The workflow triggers on pushes and pull requests to the </text:span><text:span text:style-name="T5">main</text:span> <text:span text:style-name="T4">branch.</text:span></text:p>
        </text:list-item>
        <text:list-item>
          <text:p text:style-name="P27"><text:span text:style-name="T3">Jobs</text:span><text:span text:style-name="T4">: The </text:span><text:span text:style-name="T5">build</text:span> <text:span text:style-name="T4">job runs on the latest Ubuntu environment.</text:span></text:p>
          <text:list>
            <text:list-item>
              <text:p text:style-name="P27"><text:span text:style-name="T3">Checkout code</text:span><text:span text:style-name="T4">: Uses the </text:span><text:span text:style-name="T5">actions/checkout</text:span> <text:span text:style-name="T4">action to check out the code.</text:span></text:p>
            </text:list-item>
            <text:list-item>
              <text:p text:style-name="P27"><text:span text:style-name="T3">Set up Arduino CLI</text:span><text:span text:style-name="T4">: Sets up the Arduino CLI using the </text:span><text:span text:style-name="T5">arduino/setup-arduino-cli</text:span> <text:span text:style-name="T4">action.</text:span></text:p>
            </text:list-item>
            <text:list-item>
              <text:p text:style-name="P27"><text:span text:style-name="T3">Install ESP32 core</text:span><text:span text:style-name="T4">: Installs the ESP32 core using Arduino CLI.</text:span></text:p>
            </text:list-item>
            <text:list-item>
              <text:p text:style-name="P27"><text:span text:style-name="T3">Install libraries</text:span><text:span text:style-name="T4">: Installs necessary libraries for your project.</text:span></text:p>
            </text:list-item>
            <text:list-item>
              <text:p text:style-name="P27"><text:span text:style-name="T3">Compile Sketch</text:span><text:span text:style-name="T4">: Compiles the Arduino sketch for the ESP32 board.</text:span></text:p>
            </text:list-item>
            <text:list-item>
              <text:p text:style-name="P27"><text:span text:style-name="T3">Upload Sketch</text:span><text:span text:style-name="T4">: Optionally uploads the sketch to the ESP32 board if the event is a push.</text:span></text:p>
            </text:list-item>
          </text:list>
        </text:list-item>
      </text:list>
      <text:p text:style-name="P12">Additional Tips</text:p>
      <text:list text:style-name="L18">
        <text:list-item>
          <text:p text:style-name="P28"><text:span text:style-name="T3">Sketch File</text:span><text:span text:style-name="T4">: Replace </text:span><text:span text:style-name="T5">your_sketch.ino</text:span> <text:span text:style-name="T4">with the name of your Arduino sketch file.</text:span></text:p>
        </text:list-item>
        <text:list-item>
          <text:p text:style-name="P28"><text:span text:style-name="T3">Serial Port</text:span><text:span text:style-name="T4">: Adjust the serial port (</text:span><text:span text:style-name="T5">/dev/ttyUSB0</text:span><text:span text:style-name="T4">) based on your setup.</text:span></text:p>
        </text:list-item>
        <text:list-item>
          <text:p text:style-name="P28"><text:span text:style-name="T3">Library Names</text:span><text:span text:style-name="T4">: Modify the library names to match the ones used in your project.</text:span></text:p>
        </text:list-item>
      </text:list>
      <text:p text:style-name="P20"> </text:p>
      <text:p text:style-name="P23"><text:span text:style-name="T7">Example Python Workflow File (</text:span><text:span text:style-name="T6">python-test.yml</text:span><text:span text:style-name="T7">)</text:span></text:p>
      <text:p text:style-name="P23"><text:span text:style-name="T4">Certainly! Here's an example of a GitHub Actions workflow file (</text:span><text:span text:style-name="T5">python-test.yml</text:span><text:span text:style-name="T4">) to test Python code:</text:span></text:p>
      <text:p text:style-name="P24">name: Python Test</text:p>
      <text:p text:style-name="P20"> </text:p>
      <text:p text:style-name="P24">on:</text:p>
      <text:p text:style-name="P20">  <text:span text:style-name="T8">push:</text:span></text:p>
      <text:p text:style-name="P20">    <text:span text:style-name="T8">branches:</text:span></text:p>
      <text:p text:style-name="P20">      <text:span text:style-name="T8">- main</text:span></text:p>
      <text:p text:style-name="P20">  <text:span text:style-name="T8">pull_request:</text:span></text:p>
      <text:p text:style-name="P20">    <text:span text:style-name="T8">branches:</text:span></text:p>
      <text:p text:style-name="P20">      <text:span text:style-name="T8">- main</text:span></text:p>
      <text:p text:style-name="P20"> </text:p>
      <text:p text:style-name="P24">jobs:</text:p>
      <text:p text:style-name="P20">  <text:span text:style-name="T8">test:</text:span></text:p>
      <text:p text:style-name="P20">    <text:span text:style-name="T8">runs-on: ubuntu-latest</text:span></text:p>
      <text:p text:style-name="P20"> </text:p>
      <text:p text:style-name="P20">    <text:span text:style-name="T8">steps:</text:span></text:p>
      <text:p text:style-name="P20">    <text:span text:style-name="T8">- name: Checkout code</text:span></text:p>
      <text:p text:style-name="P20">      <text:span text:style-name="T8">uses: actions/checkout@v2</text:span></text:p>
      <text:p text:style-name="P20"> </text:p>
      <text:p text:style-name="P20">    <text:span text:style-name="T8">- name: Set up Python</text:span></text:p>
      <text:p text:style-name="P20">      <text:span text:style-name="T8">uses: actions/setup-python@v2</text:span></text:p>
      <text:p text:style-name="P20">      <text:span text:style-name="T8">with:</text:span></text:p>
      <text:p text:style-name="P20">        <text:span text:style-name="T8">python-version: '3.9'</text:span></text:p>
      <text:p text:style-name="P20"> </text:p>
      <text:p text:style-name="P20">    <text:span text:style-name="T8">- name: Install dependencies</text:span></text:p>
      <text:p text:style-name="P20">      <text:span text:style-name="T8">run: |</text:span></text:p>
      <text:p text:style-name="P20"><text:soft-page-break/>        <text:span text:style-name="T8">python -m pip install --upgrade pip</text:span></text:p>
      <text:p text:style-name="P20">        <text:span text:style-name="T8">pip install -r requirements.txt</text:span></text:p>
      <text:p text:style-name="P20"> </text:p>
      <text:p text:style-name="P20">    <text:span text:style-name="T8">- name: Run tests</text:span></text:p>
      <text:p text:style-name="P20">      <text:span text:style-name="T8">run: |</text:span></text:p>
      <text:p text:style-name="P20">        <text:span text:style-name="T8">pytest</text:span></text:p>
      <text:p text:style-name="P12">Explanation</text:p>
      <text:list text:style-name="L19">
        <text:list-item>
          <text:p text:style-name="P29"><text:span text:style-name="T3">Trigger</text:span><text:span text:style-name="T4">: The workflow triggers on pushes and pull requests to the </text:span><text:span text:style-name="T5">main</text:span> <text:span text:style-name="T4">branch.</text:span></text:p>
        </text:list-item>
        <text:list-item>
          <text:p text:style-name="P29"><text:span text:style-name="T3">Jobs</text:span><text:span text:style-name="T4">: The </text:span><text:span text:style-name="T5">test</text:span> <text:span text:style-name="T4">job runs on the latest Ubuntu environment.</text:span></text:p>
          <text:list>
            <text:list-item>
              <text:p text:style-name="P29"><text:span text:style-name="T3">Checkout code</text:span><text:span text:style-name="T4">: Uses the </text:span><text:span text:style-name="T5">actions/checkout</text:span> <text:span text:style-name="T4">action to check out the code.</text:span></text:p>
            </text:list-item>
            <text:list-item>
              <text:p text:style-name="P29"><text:span text:style-name="T3">Set up Python</text:span><text:span text:style-name="T4">: Sets up Python using the </text:span><text:span text:style-name="T5">actions/setup-python</text:span> <text:span text:style-name="T4">action.</text:span></text:p>
            </text:list-item>
            <text:list-item>
              <text:p text:style-name="P29"><text:span text:style-name="T3">Install dependencies</text:span><text:span text:style-name="T4">: Installs project dependencies from the </text:span><text:span text:style-name="T5">requirements.txt</text:span> <text:span text:style-name="T4">file.</text:span></text:p>
            </text:list-item>
            <text:list-item>
              <text:p text:style-name="P29"><text:span text:style-name="T3">Run tests</text:span><text:span text:style-name="T4">: Runs tests using </text:span><text:span text:style-name="T5">pytest</text:span><text:span text:style-name="T4">.</text:span></text:p>
            </text:list-item>
          </text:list>
        </text:list-item>
      </text:list>
      <text:p text:style-name="P12">Additional Tips</text:p>
      <text:list text:style-name="L20">
        <text:list-item>
          <text:p text:style-name="P30"><text:span text:style-name="T3">Python Version</text:span><text:span text:style-name="T4">: Adjust the Python version (</text:span><text:span text:style-name="T5">3.9</text:span><text:span text:style-name="T4">) as needed for your project.</text:span></text:p>
        </text:list-item>
        <text:list-item>
          <text:p text:style-name="P30"><text:span text:style-name="T3">Dependencies</text:span><text:span text:style-name="T4">: Ensure your </text:span><text:span text:style-name="T5">requirements.txt</text:span> <text:span text:style-name="T4">file lists all necessary dependencies.</text:span></text:p>
        </text:list-item>
        <text:list-item>
          <text:p text:style-name="P30"><text:span text:style-name="T3">Test Command</text:span><text:span text:style-name="T4">: Modify the test command if you use a different testing framework (e.g., </text:span><text:span text:style-name="T5">unittest</text:span><text:span text:style-name="T4">, </text:span><text:span text:style-name="T5">nose</text:span><text:span text:style-name="T4">).</text:span></text:p>
        </text:list-item>
      </text:list>
      <text:p text:style-name="P2">This workflow will help automate the testing of your Python code. Do you need any further customization or additional steps for your specific project?</text:p>
      <text:p text:style-name="P20"> </text:p>
      <text:p text:style-name="P20">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ans-serif"/>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5T08:52:33.684474000</meta:creation-date>
    <dc:date>2025-05-25T09:05:10.207095000</dc:date>
    <meta:editing-duration>PT12M36S</meta:editing-duration>
    <meta:editing-cycles>1</meta:editing-cycles>
    <meta:document-statistic meta:table-count="0" meta:image-count="0" meta:object-count="0" meta:page-count="7" meta:paragraph-count="232" meta:word-count="1660" meta:character-count="10747" meta:non-whitespace-character-count="9048"/>
    <meta:generator>LibreOffice/25.2.2.2$MacOSX_AARCH64 LibreOffice_project/7370d4be9e3cf6031a51beef54ff3bda878e3fac</meta:generator>
  </office:meta>
</office:document-meta>
</file>