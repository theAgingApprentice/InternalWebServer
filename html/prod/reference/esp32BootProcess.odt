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E0000004FCE723891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b2676" officeooo:paragraph-rsid="000b2676"/>
    </style:style>
    <style:style style:name="P2" style:family="paragraph" style:parent-style-name="Heading_20_1">
      <style:text-properties officeooo:rsid="001189b7" officeooo:paragraph-rsid="001189b7"/>
    </style:style>
    <style:style style:name="P3" style:family="paragraph" style:parent-style-name="Text_20_body">
      <style:text-properties fo:font-variant="normal" fo:text-transform="none" fo:color="#404040" loext:opacity="100%" style:font-name="Lato" fo:font-size="10.6499996185303pt" fo:letter-spacing="normal" fo:font-style="normal" fo:font-weight="normal" officeooo:paragraph-rsid="001189b7"/>
    </style:style>
    <style:style style:name="P4" style:family="paragraph" style:parent-style-name="Text_20_body">
      <style:text-properties officeooo:rsid="000dacf7" officeooo:paragraph-rsid="000f860c"/>
    </style:style>
    <style:style style:name="P5" style:family="paragraph" style:parent-style-name="Text_20_body">
      <style:text-properties officeooo:rsid="000dacf7" officeooo:paragraph-rsid="000dacf7"/>
    </style:style>
    <style:style style:name="P6" style:family="paragraph" style:parent-style-name="Text_20_body">
      <style:text-properties fo:font-variant="normal" fo:text-transform="none" fo:color="#404040" loext:opacity="100%" style:font-name="Lato" fo:font-size="10.6499996185303pt" fo:letter-spacing="normal" fo:font-style="normal" fo:font-weight="normal" officeooo:rsid="000c0a94" officeooo:paragraph-rsid="001086b4"/>
    </style:style>
    <style:style style:name="P7" style:family="paragraph" style:parent-style-name="Heading_20_1">
      <style:text-properties officeooo:rsid="001086b4" officeooo:paragraph-rsid="001086b4"/>
    </style:style>
    <style:style style:name="P8" style:family="paragraph" style:parent-style-name="Text_20_body">
      <style:text-properties officeooo:rsid="001086b4" officeooo:paragraph-rsid="0010f08f"/>
    </style:style>
    <style:style style:name="P9" style:family="paragraph" style:parent-style-name="Text_20_body">
      <style:text-properties fo:color="#c9211e" loext:opacity="100%" officeooo:rsid="0010f08f" officeooo:paragraph-rsid="0010f08f"/>
    </style:style>
    <style:style style:name="P10" style:family="paragraph" style:parent-style-name="Text_20_body">
      <style:text-properties fo:color="#c9211e" loext:opacity="100%" officeooo:rsid="001086b4" officeooo:paragraph-rsid="0010f08f"/>
    </style:style>
    <style:style style:name="P11" style:family="paragraph" style:parent-style-name="Heading_20_1">
      <style:text-properties officeooo:rsid="0010f08f" officeooo:paragraph-rsid="0010f08f"/>
    </style:style>
    <style:style style:name="P12" style:family="paragraph" style:parent-style-name="Text_20_body">
      <style:text-properties officeooo:paragraph-rsid="0010f08f"/>
    </style:style>
    <style:style style:name="P13" style:family="paragraph" style:parent-style-name="Text_20_body">
      <style:paragraph-properties fo:margin-left="0cm" fo:margin-right="0cm" fo:margin-top="0cm" fo:margin-bottom="0.564cm" style:contextual-spacing="false" style:line-height-at-least="0.564cm" fo:text-indent="0cm" style:auto-text-indent="false"/>
      <style:text-properties fo:font-variant="normal" fo:text-transform="none" fo:color="#404040" loext:opacity="100%" style:font-name="Lato" fo:font-size="10.6499996185303pt" fo:letter-spacing="normal" fo:font-style="normal" fo:font-weight="normal"/>
    </style:style>
    <style:style style:name="P14" style:family="paragraph" style:parent-style-name="Text_20_body" style:list-style-name="L1">
      <style:paragraph-properties fo:margin-top="0cm" fo:margin-bottom="0cm" style:contextual-spacing="false" style:line-height-at-least="0.564cm" fo:padding="0cm" fo:border="none"/>
      <style:text-properties officeooo:paragraph-rsid="0010f08f"/>
    </style:style>
    <style:style style:name="P15" style:family="paragraph" style:parent-style-name="Text_20_body">
      <style:text-properties officeooo:rsid="0012c35b" officeooo:paragraph-rsid="0012c35b"/>
    </style:style>
    <style:style style:name="P16" style:family="paragraph" style:parent-style-name="Text_20_body" style:list-style-name="L2">
      <style:text-properties officeooo:rsid="0012c35b" officeooo:paragraph-rsid="0012c35b"/>
    </style:style>
    <style:style style:name="P17" style:family="paragraph" style:parent-style-name="Heading_20_1">
      <style:text-properties officeooo:rsid="000f860c" officeooo:paragraph-rsid="000f860c"/>
    </style:style>
    <style:style style:name="P18" style:family="paragraph" style:parent-style-name="Text_20_body">
      <style:text-properties officeooo:rsid="000f860c" officeooo:paragraph-rsid="001086b4"/>
    </style:style>
    <style:style style:name="P19" style:family="paragraph" style:parent-style-name="Text_20_body">
      <style:text-properties officeooo:rsid="001086b4" officeooo:paragraph-rsid="001086b4"/>
    </style:style>
    <style:style style:name="P20" style:family="paragraph" style:parent-style-name="Standard">
      <style:text-properties officeooo:rsid="000b2676" officeooo:paragraph-rsid="0010b6fc"/>
    </style:style>
    <style:style style:name="P21" style:family="paragraph" style:parent-style-name="Standard" style:list-style-name="L3">
      <style:text-properties officeooo:rsid="0010b6fc" officeooo:paragraph-rsid="0010b6fc"/>
    </style:style>
    <style:style style:name="P22" style:family="paragraph" style:parent-style-name="Standard">
      <style:text-properties officeooo:rsid="0010b6fc" officeooo:paragraph-rsid="0010b6fc"/>
    </style:style>
    <style:style style:name="P23" style:family="paragraph" style:parent-style-name="Standard">
      <style:text-properties officeooo:rsid="0010f08f" officeooo:paragraph-rsid="0010f08f"/>
    </style:style>
    <style:style style:name="T1" style:family="text">
      <style:text-properties officeooo:rsid="001189b7"/>
    </style:style>
    <style:style style:name="T2" style:family="text">
      <style:text-properties fo:font-variant="normal" fo:text-transform="none" fo:color="#404040" loext:opacity="100%" style:font-name="Lato" fo:font-size="10.6499996185303pt" fo:letter-spacing="normal" fo:font-style="normal" fo:font-weight="normal"/>
    </style:style>
    <style:style style:name="T3" style:family="text">
      <style:text-properties fo:font-variant="normal" fo:text-transform="none" fo:color="#404040" loext:opacity="100%" style:font-name="Lato" fo:font-size="10.6499996185303pt" fo:letter-spacing="normal" fo:font-style="normal" fo:font-weight="normal" officeooo:rsid="000f860c"/>
    </style:style>
    <style:style style:name="T4" style:family="text">
      <style:text-properties officeooo:rsid="0010f08f"/>
    </style:style>
    <style:style style:name="T5" style:family="text">
      <style:text-properties officeooo:rsid="0014edb7"/>
    </style:style>
    <style:style style:name="T6" style:family="text">
      <style:text-properties fo:font-variant="normal" fo:text-transform="none" fo:color="#404040" loext:opacity="100%" style:font-name="Lato" fo:font-size="10.6499996185303pt" fo:letter-spacing="normal" fo:font-style="normal" fo:font-weight="normal" officeooo:rsid="0010f08f"/>
    </style:style>
    <style:style style:name="T7" style:family="text">
      <style:text-properties fo:font-variant="normal" fo:text-transform="none" fo:color="#9b59b6" loext:opacity="100%" style:text-line-through-style="none" style:text-line-through-type="none" style:font-name="Lato" fo:font-size="10.6499996185303pt" fo:letter-spacing="normal" fo:font-style="normal" style:text-underline-style="none" fo:font-weight="normal" style:text-blinking="false"/>
    </style:style>
    <style:style style:name="T8" style:family="text">
      <style:text-properties fo:font-variant="normal" fo:text-transform="none" fo:color="#e74c3c" loext:opacity="100%" fo:font-family="SFMono-Regular, Menlo, Monaco, Consolas, 'Liberation Mono', 'Courier New', Courier, monospace" fo:font-size="8pt" fo:letter-spacing="normal" fo:font-style="normal" fo:font-weight="normal" fo:background-color="#ffffff" loext:char-shading-value="0" loext:padding-left="0.118cm" loext:padding-right="0.118cm" loext:padding-top="0.049cm" loext:padding-bottom="0.049cm" loext:border="0.06pt solid #e1e4e5"/>
    </style:style>
    <style:style style:name="T9" style:family="text">
      <style:text-properties officeooo:rsid="000dacf7"/>
    </style:style>
    <style:style style:name="T10" style:family="text">
      <style:text-properties fo:font-variant="normal" fo:text-transform="none" fo:color="#404040" loext:opacity="100%" style:font-name="Lato" fo:font-size="10.6499996185303pt" fo:letter-spacing="normal" fo:font-style="normal" fo:font-weight="normal" officeooo:rsid="000dacf7"/>
    </style:style>
    <style:style style:name="T11" style:family="text">
      <style:text-properties fo:font-variant="normal" fo:text-transform="none" fo:color="#404040" loext:opacity="100%" style:font-name="Lato" fo:font-size="10.6499996185303pt" fo:letter-spacing="normal" fo:font-style="normal" fo:font-weight="normal" officeooo:rsid="001086b4"/>
    </style:style>
    <style:style style:name="T12" style:family="text">
      <style:text-properties fo:font-variant="normal" fo:text-transform="none" fo:color="#404040" loext:opacity="100%" style:font-name="Lato" fo:font-size="10.6499996185303pt" fo:letter-spacing="normal" fo:font-style="normal" fo:font-weight="normal" officeooo:rsid="0010b6fc"/>
    </style:style>
    <style:style style:name="T13" style:family="text">
      <style:text-properties officeooo:rsid="0010b6fc"/>
    </style:style>
    <style:style style:name="T14" style:family="text">
      <style:text-properties officeooo:rsid="000c0a94"/>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049cm" fo:border="0.06pt solid #0000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oot Procedure for an ESP32 SOC</text:p>
      <text:p text:style-name="P1"/>
      <text:p text:style-name="P1">During the development of our own custom <text:a xlink:type="simple" xlink:href="https://github.com/theAgingApprentice/esp32DevBoard" text:style-name="Internet_20_link" text:visited-style-name="Visited_20_Internet_20_Link">ESP32 development board </text:a>we learned a few things through a combination of reading manuals as well as making observations. This article captures this information incase it proves helpful in the future. <text:s/></text:p>
      <text:p text:style-name="P1"/>
      <text:h text:style-name="P2" text:outline-level="1">ESPTOOL.PY</text:h>
      <text:p text:style-name="P3"><text:span text:style-name="T1">Esptool.py is a </text:span>Python-based, open source, platform independent serial communication tool <text:span text:style-name="T1">provided by Espressif and used by IDEs like PlatformIO to</text:span> communicate with the <text:span text:style-name="T1">ESP32 </text:span>ROM boot loader. <text:span text:style-name="T1">By default it operates at a baud rate of 115200. Espressif hosts pages that act as a </text:span><text:a xlink:type="simple" xlink:href="https://docs.espressif.com/projects/esptool/en/latest/esp32/" text:style-name="Internet_20_link" text:visited-style-name="Visited_20_Internet_20_Link"><text:span text:style-name="T1">manual for this tool</text:span></text:a><text:span text:style-name="T1">. </text:span></text:p>
      <text:h text:style-name="Heading_20_1" text:outline-level="1">ESP32 Strapping Pins</text:h>
      <text:p text:style-name="P4"><text:span text:style-name="T2">There are a total of five strapping pins that control h</text:span><draw:frame draw:style-name="fr1" draw:name="Frame1" text:anchor-type="char" svg:x="8.906cm" svg:y="-0.03cm" svg:width="8.668cm" draw:z-index="0"><draw:text-box fo:min-height="11.15cm"><text:p text:style-name="Figure"><draw:frame draw:style-name="fr2" draw:name="Image1" text:anchor-type="paragraph" svg:width="8.565cm" style:rel-width="100%" svg:height="11.017cm" style:rel-height="scale" draw:z-index="1"><draw:image xlink:href="Pictures/10000001000003E0000004FCE723891E.png" xlink:type="simple" xlink:show="embed" xlink:actuate="onLoad" draw:mime-type="image/png"/></draw:frame>Figure <text:sequence text:ref-name="refFigure0" text:name="Figure" text:formula="ooow:Figure+1" style:num-format="1">1</text:sequence>: ESP32-WROOM-32E</text:p></draw:text-box></draw:frame><text:span text:style-name="T2">ow the ESP32 behaves at startup. Of those five pins the only two that matter for our purposes are GPIO0 (physical pin 25) and GPIO2 (physical pin 24). At boot time GPIO0 (physical pin 25) </text:span><text:span text:style-name="T3">must be pulled low. </text:span><text:span text:style-name="T2">GPIO2 (physical pin 24) </text:span><text:span text:style-name="T3">is ignored in normal boot mode but to play it safe </text:span><text:span text:style-name="T2">pull </text:span><text:span text:style-name="T3">this pin</text:span><text:span text:style-name="T2"> LOW </text:span><text:span text:style-name="T3">as well. </text:span><text:span text:style-name="T2"><text:s/></text:span></text:p>
      <text:p text:style-name="P5"><text:span text:style-name="T2"><text:s/></text:span><text:span text:style-name="T3">The other strapping pins control operating voltage for the chip as well as putting the chip in silent boot mode. We just leave these pins in their default setting to get 3.3V and boot messages echoed out. </text:span><text:span text:style-name="T2"><text:s/></text:span></text:p>
      <text:p text:style-name="P6">The ESP32 has a 45k ohm internal pull-up/pull-down resistor at GPIO0 (and other pins). If you want to connect a switch button to enter the boot mode, this has to be a strong pull-down. For example a 10k resistor to GND.</text:p>
      <text:h text:style-name="P7" text:outline-level="1"/>
      <text:h text:style-name="P7" text:outline-level="1">Boot Log</text:h>
      <text:p text:style-name="P8">If you have a serial console active during the booting of an ESP32, and the MTDO strapping pin is not driven low (it is high by default via an internal 45K ohm resistor) then you will see the boot <text:s/>log for the ESP32. <text:s/></text:p>
      <text:p text:style-name="P9">TO DO:</text:p>
      <text:p text:style-name="P9"><text:soft-page-break/>We need <text:s/>to update this section with what we are seeing. For example, we can see messages like “boot load, waiting” messages.</text:p>
      <text:p text:style-name="P10"><text:span text:style-name="T4">For some reason even without the RTS and DTS circuitry we saw our board aromatically load firmware and reboot and run the code without ever touching the rest button.. We need to figure t what is going on there.</text:span> <text:s text:c="2"/></text:p>
      <text:p text:style-name="P9">Use <text:a xlink:type="simple" xlink:href="https://docs.espressif.com/projects/esptool/en/latest/esp32/advanced-topics/boot-mode-selection.html" text:style-name="Internet_20_link" text:visited-style-name="Visited_20_Internet_20_Link">this link</text:a> to help understand what is happening <text:span text:style-name="T5">and update this doc.</text:span>. </text:p>
      <text:h text:style-name="P11" text:outline-level="1">Boot sequence</text:h>
      <text:p text:style-name="P12"><text:span text:style-name="T2">This </text:span><text:span text:style-name="T6">section </text:span><text:span text:style-name="T2">explains </text:span><text:span text:style-name="T6">the</text:span><text:span text:style-name="T2"> steps which happen befor</text:span><text:span text:style-name="T6">e the app_main (our firmware binary) </text:span><text:span text:style-name="T2">function of an ESP-IDF application is called.</text:span></text:p>
      <text:p text:style-name="P13">The high level view of startup process is as follows:</text:p>
      <text:list text:style-name="L1">
        <text:list-item>
          <text:p text:style-name="P14"><text:a xlink:type="simple" xlink:href="https://docs.espressif.com/projects/esp-idf/en/v5.4/esp32/api-guides/startup.html#first-stage-bootloader" text:style-name="Internet_20_link" text:visited-style-name="Visited_20_Internet_20_Link"><text:span text:style-name="T7">First stage (ROM) bootloader</text:span></text:a><text:span text:style-name="T2"> loads the second stage bootloader image to RAM (IRAM &amp; DRAM) from flash offset 0x1000.</text:span></text:p>
        </text:list-item>
        <text:list-item>
          <text:p text:style-name="P14"><text:a xlink:type="simple" xlink:href="https://docs.espressif.com/projects/esp-idf/en/v5.4/esp32/api-guides/startup.html#second-stage-bootloader" text:style-name="Internet_20_link" text:visited-style-name="Visited_20_Internet_20_Link"><text:span text:style-name="T7">Second Stage Bootloader</text:span></text:a><text:span text:style-name="T2"> loads partition table and main app image from flash. Main app incorporates both RAM segments and read-only segments mapped via flash cache.</text:span></text:p>
        </text:list-item>
        <text:list-item>
          <text:p text:style-name="P14"><text:a xlink:type="simple" xlink:href="https://docs.espressif.com/projects/esp-idf/en/v5.4/esp32/api-guides/startup.html#application-startup" text:style-name="Internet_20_link" text:visited-style-name="Visited_20_Internet_20_Link"><text:span text:style-name="T7">Application Startup</text:span></text:a><text:span text:style-name="T2"> executes. At this point, the second CPU and RTOS scheduler are started, which then run the </text:span><text:span text:style-name="Source_20_Text"><text:span text:style-name="T8">main_task</text:span></text:span><text:span text:style-name="T2">, leading to the execution of </text:span><text:span text:style-name="Source_20_Text"><text:span text:style-name="T8">app_main</text:span></text:span><text:span text:style-name="T2">.</text:span></text:p>
        </text:list-item>
      </text:list>
      <text:p text:style-name="P12"/>
      <text:h text:style-name="Heading_20_2" text:outline-level="2">Boot Timing</text:h>
      <text:p text:style-name="P15">There are timing parameters that can be altered which control when certain events occur during the boot up sequence of the ESP32 SOC. By default the chips power on reset parameters are set as follows:</text:p>
      <text:list text:style-name="L2">
        <text:list-item>
          <text:p text:style-name="P16">tSTBL determines the time that is allowed for the power rails to stabilize to their target voltage. This is set to 50uS by default. </text:p>
        </text:list-item>
        <text:list-item>
          <text:p text:style-name="P16">tRST determines the time allowed to read the values of the strapping pins. This is set to 50uS by default. <text:s text:c="2"/></text:p>
        </text:list-item>
      </text:list>
      <text:h text:style-name="P17" text:outline-level="1">Manual Booting</text:h>
      <text:p text:style-name="P18">The minimal circuitry required to be able to enter boot mode is to have your board have one normally open switch connect to GPIO0 (physical pin 25) and one normally open switch connected to the EN button ([physical pin 3). </text:p>
      <text:p text:style-name="P19">To use this configuration to load new firmware into the ESP32, hold down the GPIO0 button, press and release the EN button, wait 1 second, release the GPIO0 button.</text:p>
      <text:h text:style-name="Heading_20_1" text:outline-level="1"><text:soft-page-break/>Automatic booting</text:h>
      <text:p text:style-name="P18"><text:span text:style-name="T9">PlatformIO uses a python tool called esptool.py that is capable of </text:span><text:span text:style-name="T2">automatically reset</text:span><text:span text:style-name="T10">ting</text:span><text:span text:style-name="T2"> </text:span><text:span text:style-name="T10">our</text:span><text:span text:style-name="T2"> </text:span><text:span text:style-name="T10">development </text:span><text:span text:style-name="T2">board into bootloader mode. </text:span><text:span text:style-name="T10">To achieve this we have to build a circuit that manages certain ESP32 </text:span><text:span text:style-name="T2">“strapping pins” </text:span><text:span text:style-name="T10">in order </text:span><text:span text:style-name="T2">to get the correct boot mode.</text:span></text:p>
      <text:p text:style-name="P18"><text:span text:style-name="T11">The esptool.py program </text:span><text:span text:style-name="T2">resets </text:span><text:span text:style-name="T11">the </text:span><text:span text:style-name="T2">ESP32 </text:span><text:span text:style-name="T11">SOC </text:span><text:span text:style-name="T2">automatically by assertin</text:span><text:span text:style-name="T11">g the DTR and RTS c</text:span><text:span text:style-name="T2">ontrol lines of the USB </text:span><text:span text:style-name="T11">your</text:span><text:span text:style-name="T2"> serial converter chip. </text:span><text:span text:style-name="T11">On our board we use an </text:span><text:span text:style-name="T2">FTDI </text:span><text:span text:style-name="T11">TTL </text:span><text:span text:style-name="T12">serial adapter </text:span><text:span text:style-name="T11">chip. </text:span><text:span text:style-name="T12">T</text:span><text:span text:style-name="T2">h</text:span><text:span text:style-name="T12">e DTR and RTS c</text:span><text:span text:style-name="T2">ontrol lines are in turn connected t</text:span><text:span text:style-name="T12">o the GPIO0 and EN </text:span><text:span text:style-name="T2">pins of ESP32. </text:span><text:span text:style-name="T12">This allows the esptool.py utility to </text:span><text:span text:style-name="T2">change the voltage levels o</text:span><text:span text:style-name="T12">f the DTR and RTS which in turn puts </text:span><text:span text:style-name="T2">the ESP32 into Firmware Download mode.</text:span></text:p>
      <text:h text:style-name="Heading_20_1" text:outline-level="1" text:is-list-header="true">Using a TTL Serial Adapter</text:h>
      <text:p text:style-name="P20"><text:span text:style-name="T13">While developing a new ESP32 development board you may wish to use </text:span>an off the shelf <text:a xlink:type="simple" xlink:href="https://www.amazon.ca/dp/B07BBPX8B8?ref=ppx_yo2ov_dt_b_fed_asin_title" text:style-name="Internet_20_link" text:visited-style-name="Visited_20_Internet_20_Link">TTL Serial Adapter</text:a> <text:span text:style-name="T14">t</text:span><text:span text:style-name="T13">o bypass your circuit to test if the ESP32 SOC is in good working order. To do this you can:</text:span></text:p>
      <text:p text:style-name="P20"/>
      <text:list text:style-name="L3">
        <text:list-item>
          <text:p text:style-name="P21">Make sure that you set the output voltage of the TTL serial adapter to 3.3V.</text:p>
        </text:list-item>
        <text:list-item>
          <text:p text:style-name="P21">Connect the VCC pin from the TTL adapter to the 3.3V pin of the ESP32 (physical pin 3).</text:p>
        </text:list-item>
        <text:list-item>
          <text:p text:style-name="P21">Connect the ground pin from the TTL adapter to one of the GND pins of the ESP32 (physical pin 1 for example).</text:p>
        </text:list-item>
        <text:list-item>
          <text:p text:style-name="P21">Connect the EN pin to a normally open switch that also connects to ground.</text:p>
        </text:list-item>
        <text:list-item>
          <text:p text:style-name="P21">Connect the GPIO0 (physical pin 25) to ground. </text:p>
        </text:list-item>
        <text:list-item>
          <text:p text:style-name="P21">Connect the GPIO2 (physical pin 24) to ground. This is is an optional step but eliminates any chance that your circuit is pulling it high. </text:p>
        </text:list-item>
      </text:list>
      <text:p text:style-name="P22"/>
      <text:p text:style-name="P23">Once the loading is complete you stop pulling GIPO0 low and press EN again to get the new firmware to run.</text:p>
      <text:p text:style-name="P1"><text:s text:c="2"/></text:p>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1T14:30:57.216562337</meta:creation-date>
    <dc:date>2025-08-30T19:20:20.159063000</dc:date>
    <meta:editing-duration>PT18M3S</meta:editing-duration>
    <meta:editing-cycles>3</meta:editing-cycles>
    <meta:generator>LibreOffice/25.2.2.2$MacOSX_AARCH64 LibreOffice_project/7370d4be9e3cf6031a51beef54ff3bda878e3fac</meta:generator>
    <meta:print-date>2025-08-30T19:23:21.282507000</meta:print-date>
    <meta:printed-by>PDF files</meta:printed-by>
    <meta:document-statistic meta:table-count="0" meta:image-count="1" meta:object-count="0" meta:page-count="3" meta:paragraph-count="41" meta:word-count="921" meta:character-count="5131" meta:non-whitespace-character-count="4236"/>
  </office:meta>
</office:document-meta>
</file>