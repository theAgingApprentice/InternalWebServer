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officeooo:rsid="000aaaf7" officeooo:paragraph-rsid="000aaaf7"/>
    </style:style>
    <style:style style:name="P2" style:family="paragraph" style:parent-style-name="Standard" style:list-style-name="L1">
      <style:text-properties officeooo:rsid="000aaaf7" officeooo:paragraph-rsid="000aaaf7"/>
    </style:style>
    <style:style style:name="P3" style:family="paragraph" style:parent-style-name="Heading_20_1">
      <style:text-properties officeooo:paragraph-rsid="000bbd64"/>
    </style:style>
    <style:style style:name="P4" style:family="paragraph" style:parent-style-name="Standard" style:list-style-name="L2">
      <style:text-properties officeooo:rsid="000aaaf7" officeooo:paragraph-rsid="000aaaf7"/>
    </style:style>
    <style:style style:name="P5" style:family="paragraph" style:parent-style-name="Text_20_body" style:list-style-name="L3">
      <style:text-properties officeooo:paragraph-rsid="000aaaf7"/>
    </style:style>
    <style:style style:name="P6" style:family="paragraph" style:parent-style-name="Text_20_body" style:list-style-name="L3">
      <style:text-properties officeooo:rsid="000aaaf7" officeooo:paragraph-rsid="000aaaf7"/>
    </style:style>
    <style:style style:name="P7" style:family="paragraph" style:parent-style-name="Standard" style:list-style-name="L3">
      <style:text-properties officeooo:rsid="000aaaf7" officeooo:paragraph-rsid="000aaaf7"/>
    </style:style>
    <style:style style:name="P8" style:family="paragraph" style:parent-style-name="Standard" style:list-style-name="L4">
      <style:text-properties officeooo:rsid="000aaaf7" officeooo:paragraph-rsid="000aaaf7"/>
    </style:style>
    <style:style style:name="P9" style:family="paragraph" style:parent-style-name="Standard" style:list-style-name="L5">
      <style:text-properties officeooo:rsid="000aaaf7" officeooo:paragraph-rsid="000aaaf7"/>
    </style:style>
    <style:style style:name="P10" style:family="paragraph" style:parent-style-name="Standard" style:list-style-name="L6">
      <style:text-properties officeooo:rsid="000aaaf7" officeooo:paragraph-rsid="000aaaf7"/>
    </style:style>
    <style:style style:name="P11" style:family="paragraph" style:parent-style-name="Standard" style:list-style-name="L7">
      <style:text-properties officeooo:rsid="000aaaf7" officeooo:paragraph-rsid="000aaaf7"/>
    </style:style>
    <style:style style:name="P12" style:family="paragraph" style:parent-style-name="Standard" style:list-style-name="L8">
      <style:text-properties officeooo:rsid="000aaaf7" officeooo:paragraph-rsid="000aaaf7"/>
    </style:style>
    <style:style style:name="P13" style:family="paragraph" style:parent-style-name="Standard" style:list-style-name="L9">
      <style:text-properties officeooo:rsid="000aaaf7" officeooo:paragraph-rsid="000aaaf7"/>
    </style:style>
    <style:style style:name="P14" style:family="paragraph" style:parent-style-name="Standard" style:list-style-name="L10">
      <style:text-properties officeooo:rsid="000aaaf7" officeooo:paragraph-rsid="000aaaf7"/>
    </style:style>
    <style:style style:name="P15" style:family="paragraph" style:parent-style-name="Standard" style:list-style-name="L11">
      <style:text-properties officeooo:rsid="000aaaf7" officeooo:paragraph-rsid="000aaaf7"/>
    </style:style>
    <style:style style:name="P16" style:family="paragraph" style:parent-style-name="Standard" style:list-style-name="L12">
      <style:text-properties officeooo:rsid="000aaaf7" officeooo:paragraph-rsid="000aaaf7"/>
    </style:style>
    <style:style style:name="P17" style:family="paragraph" style:parent-style-name="Standard">
      <style:text-properties officeooo:rsid="000b48d1" officeooo:paragraph-rsid="000b48d1"/>
    </style:style>
    <style:style style:name="P18" style:family="paragraph" style:parent-style-name="Standard" style:list-style-name="L13">
      <style:text-properties officeooo:rsid="000b48d1" officeooo:paragraph-rsid="000b48d1"/>
    </style:style>
    <style:style style:name="P19" style:family="paragraph" style:parent-style-name="Standard" style:list-style-name="L14">
      <style:text-properties officeooo:rsid="000b48d1" officeooo:paragraph-rsid="000b48d1"/>
    </style:style>
    <style:style style:name="P20" style:family="paragraph" style:parent-style-name="Standard" style:list-style-name="L15">
      <style:text-properties officeooo:rsid="000b48d1" officeooo:paragraph-rsid="000b48d1"/>
    </style:style>
    <style:style style:name="P21" style:family="paragraph" style:parent-style-name="Standard" style:list-style-name="L16">
      <style:text-properties officeooo:rsid="000b48d1" officeooo:paragraph-rsid="000b48d1"/>
    </style:style>
    <style:style style:name="P22" style:family="paragraph" style:parent-style-name="Standard" style:list-style-name="L17">
      <style:text-properties officeooo:rsid="000b48d1" officeooo:paragraph-rsid="000b48d1"/>
    </style:style>
    <style:style style:name="P23" style:family="paragraph" style:parent-style-name="Standard" style:list-style-name="L18">
      <style:text-properties officeooo:rsid="000b48d1" officeooo:paragraph-rsid="000b48d1"/>
    </style:style>
    <style:style style:name="P24" style:family="paragraph" style:parent-style-name="Standard" style:list-style-name="L19">
      <style:text-properties officeooo:rsid="000b48d1" officeooo:paragraph-rsid="000b48d1"/>
    </style:style>
    <style:style style:name="P25" style:family="paragraph" style:parent-style-name="Standard" style:list-style-name="L20">
      <style:text-properties officeooo:rsid="000b48d1" officeooo:paragraph-rsid="000b48d1"/>
    </style:style>
    <style:style style:name="P26" style:family="paragraph" style:parent-style-name="Standard" style:list-style-name="L21">
      <style:text-properties officeooo:rsid="000b48d1" officeooo:paragraph-rsid="000b48d1"/>
    </style:style>
    <style:style style:name="P27" style:family="paragraph" style:parent-style-name="Standard" style:list-style-name="L22">
      <style:text-properties officeooo:rsid="000b48d1" officeooo:paragraph-rsid="000b48d1"/>
    </style:style>
    <style:style style:name="P28" style:family="paragraph" style:parent-style-name="Standard" style:list-style-name="L23">
      <style:text-properties officeooo:rsid="000b48d1" officeooo:paragraph-rsid="000b48d1"/>
    </style:style>
    <style:style style:name="P29" style:family="paragraph" style:parent-style-name="Standard" style:list-style-name="L24">
      <style:text-properties officeooo:rsid="000b48d1" officeooo:paragraph-rsid="000b48d1"/>
    </style:style>
    <style:style style:name="P30" style:family="paragraph" style:parent-style-name="Standard">
      <style:text-properties officeooo:rsid="000bb7ad" officeooo:paragraph-rsid="000bb7ad"/>
    </style:style>
    <style:style style:name="P31" style:family="paragraph" style:parent-style-name="Standard" style:list-style-name="L25">
      <style:text-properties officeooo:rsid="000bb7ad" officeooo:paragraph-rsid="000bb7ad"/>
    </style:style>
    <style:style style:name="P32" style:family="paragraph" style:parent-style-name="Standard" style:list-style-name="L26">
      <style:text-properties officeooo:rsid="000bb7ad" officeooo:paragraph-rsid="000bb7ad"/>
    </style:style>
    <style:style style:name="P33" style:family="paragraph" style:parent-style-name="Standard" style:list-style-name="L26">
      <style:text-properties fo:font-style="italic" fo:font-weight="bold" officeooo:rsid="000bb7ad" officeooo:paragraph-rsid="000bb7ad" style:font-style-asian="italic" style:font-weight-asian="bold" style:font-style-complex="italic" style:font-weight-complex="bold"/>
    </style:style>
    <style:style style:name="P34" style:family="paragraph" style:parent-style-name="Standard" style:list-style-name="L27">
      <style:text-properties officeooo:rsid="000bb7ad" officeooo:paragraph-rsid="000bb7ad"/>
    </style:style>
    <style:style style:name="P35" style:family="paragraph" style:parent-style-name="Standard" style:list-style-name="L27">
      <style:text-properties fo:font-style="italic" fo:font-weight="bold" officeooo:rsid="000bb7ad" officeooo:paragraph-rsid="000bb7ad" style:font-style-asian="italic" style:font-weight-asian="bold" style:font-style-complex="italic" style:font-weight-complex="bold"/>
    </style:style>
    <style:style style:name="P36" style:family="paragraph" style:parent-style-name="Standard" style:list-style-name="L28">
      <style:text-properties officeooo:rsid="000bb7ad" officeooo:paragraph-rsid="000bb7ad"/>
    </style:style>
    <style:style style:name="P37" style:family="paragraph" style:parent-style-name="Standard" style:list-style-name="L29">
      <style:text-properties officeooo:rsid="000bb7ad" officeooo:paragraph-rsid="000bb7ad"/>
    </style:style>
    <style:style style:name="P38" style:family="paragraph" style:parent-style-name="Standard" style:list-style-name="L30">
      <style:text-properties officeooo:rsid="000bb7ad" officeooo:paragraph-rsid="000bbd64"/>
    </style:style>
    <style:style style:name="P39" style:family="paragraph" style:parent-style-name="Standard" style:list-style-name="L31">
      <style:text-properties officeooo:rsid="000bb7ad" officeooo:paragraph-rsid="000bbd64"/>
    </style:style>
    <style:style style:name="P40" style:family="paragraph" style:parent-style-name="Standard" style:list-style-name="L32">
      <style:text-properties officeooo:rsid="000bb7ad" officeooo:paragraph-rsid="000bb7ad"/>
    </style:style>
    <style:style style:name="P41" style:family="paragraph" style:parent-style-name="Standard" style:list-style-name="L25">
      <style:text-properties officeooo:rsid="000bb7ad" officeooo:paragraph-rsid="000bbd64"/>
    </style:style>
    <style:style style:name="P42" style:family="paragraph" style:parent-style-name="Standard" style:list-style-name="L33">
      <style:text-properties officeooo:rsid="000bb7ad" officeooo:paragraph-rsid="000bbd64"/>
    </style:style>
    <style:style style:name="P43" style:family="paragraph" style:parent-style-name="Standard">
      <style:text-properties officeooo:rsid="000bb7ad" officeooo:paragraph-rsid="000bbd64"/>
    </style:style>
    <style:style style:name="P44" style:family="paragraph" style:parent-style-name="Standard" style:list-style-name="L34">
      <style:text-properties officeooo:rsid="000bb7ad" officeooo:paragraph-rsid="000bbd64"/>
    </style:style>
    <style:style style:name="P45" style:family="paragraph" style:parent-style-name="Standard" style:list-style-name="L35">
      <style:text-properties officeooo:rsid="000bb7ad" officeooo:paragraph-rsid="000bbd64"/>
    </style:style>
    <style:style style:name="P46" style:family="paragraph" style:parent-style-name="Standard" style:list-style-name="L34">
      <style:text-properties officeooo:rsid="000bb7ad" officeooo:paragraph-rsid="000bcacb"/>
    </style:style>
    <style:style style:name="P47" style:family="paragraph" style:parent-style-name="Standard" style:list-style-name="L36">
      <style:text-properties officeooo:rsid="000bb7ad" officeooo:paragraph-rsid="000bcacb"/>
    </style:style>
    <style:style style:name="P48" style:family="paragraph" style:parent-style-name="Standard" style:list-style-name="L37">
      <style:text-properties officeooo:rsid="000bb7ad" officeooo:paragraph-rsid="000bbd64"/>
    </style:style>
    <style:style style:name="P49" style:family="paragraph" style:parent-style-name="Standard" style:list-style-name="L38">
      <style:text-properties officeooo:rsid="000bb7ad" officeooo:paragraph-rsid="000bbd64"/>
    </style:style>
    <style:style style:name="P50" style:family="paragraph" style:parent-style-name="Standard" style:list-style-name="L39">
      <style:text-properties officeooo:rsid="000bb7ad" officeooo:paragraph-rsid="000bbd64"/>
    </style:style>
    <style:style style:name="P51" style:family="paragraph" style:parent-style-name="Standard" style:list-style-name="L39">
      <style:text-properties officeooo:paragraph-rsid="000bbd64"/>
    </style:style>
    <style:style style:name="P52" style:family="paragraph" style:parent-style-name="Standard" style:list-style-name="L40">
      <style:text-properties officeooo:rsid="000bb7ad" officeooo:paragraph-rsid="000bbd64"/>
    </style:style>
    <style:style style:name="P53" style:family="paragraph" style:parent-style-name="Standard" style:list-style-name="L41">
      <style:text-properties officeooo:rsid="000bb7ad" officeooo:paragraph-rsid="000bbd64"/>
    </style:style>
    <style:style style:name="P54" style:family="paragraph" style:parent-style-name="Standard" style:list-style-name="L42">
      <style:text-properties officeooo:paragraph-rsid="000bbd64"/>
    </style:style>
    <style:style style:name="P55" style:family="paragraph" style:parent-style-name="Standard" style:list-style-name="L43">
      <style:text-properties officeooo:paragraph-rsid="000bbd64"/>
    </style:style>
    <style:style style:name="P56" style:family="paragraph" style:parent-style-name="Standard" style:list-style-name="L44">
      <style:text-properties officeooo:rsid="000bb7ad" officeooo:paragraph-rsid="000bbd64"/>
    </style:style>
    <style:style style:name="P57" style:family="paragraph" style:parent-style-name="Standard" style:list-style-name="L45">
      <style:text-properties officeooo:rsid="000bb7ad" officeooo:paragraph-rsid="000bbd64"/>
    </style:style>
    <style:style style:name="P58" style:family="paragraph" style:parent-style-name="Standard" style:list-style-name="L46">
      <style:text-properties officeooo:paragraph-rsid="000bbd64"/>
    </style:style>
    <style:style style:name="T1" style:family="text">
      <style:text-properties officeooo:rsid="000bbd64"/>
    </style:style>
    <style:style style:name="T2" style:family="text">
      <style:text-properties officeooo:rsid="000aaaf7"/>
    </style:style>
    <style:style style:name="T3" style:family="text">
      <style:text-properties officeooo:rsid="000bcacb"/>
    </style:style>
    <style:style style:name="T4" style:family="text">
      <style:text-properties officeooo:rsid="000bb7a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ptool.py</text:p>
      <text:p text:style-name="Subtitle">Wrapper Script for ROM Bootloader</text:p>
      <text:p text:style-name="P1"/>
      <text:p text:style-name="P1"><text:span text:style-name="T1">T</text:span>he esptool.py script is a wrapper script for the ESP32/ESP8266 ROM bootloader utility called esptool. <text:span text:style-name="T1">This document eaplins the tool as well as the interaciortn between the MAC/PC and the bootloader on the ESP32, along with topis on how to interpret traces using an SALEAE Original Logic Analyzer.</text:span></text:p>
      <text:p text:style-name="P1"/>
      <text:h text:style-name="Heading_20_1" text:outline-level="1">Purpose <text:span text:style-name="T1">of the ESPTOOL.PY script</text:span></text:h>
      <text:list text:style-name="L1">
        <text:list-item>
          <text:p text:style-name="P2">esptool.py is a command-line utility developed by Espressif Systems that allows you to communicate with the ROM bootloader in ESP32 and ESP8266 chips</text:p>
        </text:list-item>
        <text:list-item>
          <text:p text:style-name="P2">It's used for flashing firmware, reading/writing flash memory, and performing various low-level operations on ESP chips</text:p>
        </text:list-item>
      </text:list>
      <text:p text:style-name="P1"/>
      <text:h text:style-name="P3" text:outline-level="1"><text:span text:style-name="T1">ESPTOOL.PY </text:span>Script Structure</text:h>
      <text:list text:style-name="L2">
        <text:list-item>
          <text:p text:style-name="P4">This particular file is a thin wrapper around the main esptool Python package</text:p>
        </text:list-item>
        <text:list-item>
          <text:p text:style-name="P4">It's designed to ensure proper module loading in different operating systems</text:p>
        </text:list-item>
      </text:list>
      <text:p text:style-name="P1"/>
      <text:h text:style-name="Heading_20_1" text:outline-level="1">Key Features</text:h>
      <text:list text:style-name="L3">
        <text:list-item>
          <text:p text:style-name="P5">Path Management: <text:span text:style-name="T2">The script handles different path configurations for Windows vs Linux/macOS</text:span></text:p>
        </text:list-item>
        <text:list-item>
          <text:p text:style-name="P6">For non-Windows systems (Linux/macOS), it:</text:p>
          <text:list>
            <text:list-item>
              <text:p text:style-name="P7">Removes the current script directory from Python's path to avoid importing this file as a module</text:p>
            </text:list-item>
            <text:list-item>
              <text:p text:style-name="P7">Ensures it imports the installed esptool module instead</text:p>
            </text:list-item>
            <text:list-item>
              <text:p text:style-name="P7">Deletes any previously imported module entry to force Python to load the module fresh</text:p>
            </text:list-item>
          </text:list>
        </text:list-item>
      </text:list>
      <text:h text:style-name="Heading_20_1" text:outline-level="1">Usage Context</text:h>
      <text:p text:style-name="P1">This tool is crucial in the ESP32 development workflow, especially when:</text:p>
      <text:list text:style-name="L4">
        <text:list-item>
          <text:p text:style-name="P8">Flashing firmware to your ESP32 board</text:p>
        </text:list-item>
        <text:list-item>
          <text:p text:style-name="P8">Reading flash contents</text:p>
        </text:list-item>
        <text:list-item>
          <text:p text:style-name="P8">Verifying firmware</text:p>
        </text:list-item>
        <text:list-item>
          <text:p text:style-name="P8">Performing chip identification</text:p>
        </text:list-item>
        <text:list-item>
          <text:p text:style-name="P8">Managing boot parameters</text:p>
        </text:list-item>
      </text:list>
      <text:p text:style-name="P1"/>
      <text:h text:style-name="Heading_20_1" text:outline-level="1"><text:soft-page-break/>Integration</text:h>
      <text:p text:style-name="P1"/>
      <text:p text:style-name="P1">In your PlatformIO project (esp32DevBoard), this tool is used automatically during:</text:p>
      <text:list text:style-name="L5">
        <text:list-item>
          <text:p text:style-name="P9">Firmware uploads</text:p>
        </text:list-item>
        <text:list-item>
          <text:p text:style-name="P9">Flash operations</text:p>
        </text:list-item>
        <text:list-item>
          <text:p text:style-name="P9">Board communication during programming</text:p>
        </text:list-item>
      </text:list>
      <text:p text:style-name="P1"/>
      <text:p text:style-name="P1">The main functionality isn't in this wrapper script but in the esptool package it imports. This wrapper ensures proper execution of the tool across different operating systems and environments. When you use PlatformIO to upload firmware to your ESP32 board, it uses this tool behind the scenes to handle the actual communication with the board's bootloader.</text:p>
      <text:p text:style-name="P1"/>
      <text:p text:style-name="P1"/>
      <text:h text:style-name="Heading_20_1" text:outline-level="1">Bootloader handshake</text:h>
      <text:p text:style-name="P1">The bootloader handshake between esptool and the ESP32 works as follows:</text:p>
      <text:p text:style-name="P1"/>
      <text:h text:style-name="Heading_20_2" text:outline-level="2">Initial Setup:</text:h>
      <text:p text:style-name="P1"/>
      <text:list text:style-name="L6">
        <text:list-item>
          <text:p text:style-name="P10">The tool opens a serial connection to the ESP32 at 115200 baud (default bootloader baud rate)</text:p>
        </text:list-item>
        <text:list-item>
          <text:p text:style-name="P10">The ESP32 must be in bootloader mode, which happens when:</text:p>
          <text:list>
            <text:list-item>
              <text:p text:style-name="P10">GPIO0 is held low during reset</text:p>
            </text:list-item>
            <text:list-item>
              <text:p text:style-name="P10">Or when the chip is reset while the UART RTS and DTR lines are toggled in a specific pattern</text:p>
            </text:list-item>
          </text:list>
        </text:list-item>
      </text:list>
      <text:h text:style-name="Heading_20_2" text:outline-level="2">Reset Sequence:</text:h>
      <text:p text:style-name="P1"/>
      <text:list text:style-name="L7">
        <text:list-item>
          <text:p text:style-name="P11">The tool toggles the DTR and RTS lines to force the ESP32 into bootloader mode:</text:p>
        </text:list-item>
      </text:list>
      <text:list text:style-name="L8">
        <text:list-item>
          <text:list>
            <text:list-item>
              <text:p text:style-name="P12">Set DTR low, RTS high (pulls both EN and GPIO0 low)</text:p>
            </text:list-item>
            <text:list-item>
              <text:p text:style-name="P12">Brief delay</text:p>
            </text:list-item>
            <text:list-item>
              <text:p text:style-name="P12">Set DTR high, RTS low (releases EN while keeping GPIO0 low)</text:p>
            </text:list-item>
            <text:list-item>
              <text:p text:style-name="P12">This causes a reset while GPIO0 is held low, entering bootloader mode</text:p>
            </text:list-item>
          </text:list>
        </text:list-item>
      </text:list>
      <text:h text:style-name="Heading_20_2" text:outline-level="2">Synchronization:</text:h>
      <text:p text:style-name="P1"/>
      <text:list text:style-name="L9">
        <text:list-item>
          <text:p text:style-name="P13">The tool sends a synchronization pattern:</text:p>
          <text:list>
            <text:list-item>
              <text:p text:style-name="P13">0x07 0x07 0x12 0x20 followed by 32 more bytes</text:p>
            </text:list-item>
            <text:list-item>
              <text:p text:style-name="P13">This specific pattern helps the ROM bootloader detect the correct baud rate</text:p>
            </text:list-item>
          </text:list>
        </text:list-item>
        <text:list-item>
          <text:p text:style-name="P13">The ESP32 responds with:</text:p>
          <text:list>
            <text:list-item>
              <text:p text:style-name="P13">0xC0 (indicating successful sync)</text:p>
            </text:list-item>
            <text:list-item>
              <text:p text:style-name="P13">Then sends information about its capabilities</text:p>
            </text:list-item>
          </text:list>
        </text:list-item>
      </text:list>
      <text:h text:style-name="Heading_20_2" text:outline-level="2"><text:soft-page-break/>Handshake Completion:</text:h>
      <text:p text:style-name="P1"/>
      <text:list text:style-name="L10">
        <text:list-item>
          <text:p text:style-name="P14">After sync, the tool can:</text:p>
          <text:list>
            <text:list-item>
              <text:p text:style-name="P14">Change the baud rate to a higher speed</text:p>
            </text:list-item>
            <text:list-item>
              <text:p text:style-name="P14">Start sending commands to read/write flash</text:p>
            </text:list-item>
            <text:list-item>
              <text:p text:style-name="P14">Get chip information</text:p>
            </text:list-item>
            <text:list-item>
              <text:p text:style-name="P14">Etc.</text:p>
            </text:list-item>
          </text:list>
        </text:list-item>
      </text:list>
      <text:h text:style-name="Heading_20_2" text:outline-level="2">Error Handling:</text:h>
      <text:p text:style-name="P1"/>
      <text:p text:style-name="P1">If sync fails, the tool will:</text:p>
      <text:list text:style-name="L11">
        <text:list-item>
          <text:p text:style-name="P15">Retry multiple times</text:p>
        </text:list-item>
        <text:list-item>
          <text:p text:style-name="P15">Try different baud rates</text:p>
        </text:list-item>
        <text:list-item>
          <text:p text:style-name="P15">Attempt different reset timing patterns</text:p>
        </text:list-item>
      </text:list>
      <text:p text:style-name="P1">This makes the process robust against varying hardware configurations</text:p>
      <text:h text:style-name="Heading_20_2" text:outline-level="2">Key Commands After Sync:</text:h>
      <text:p text:style-name="P1"/>
      <text:list text:style-name="L12">
        <text:list-item>
          <text:p text:style-name="P16">READ_REG: Read memory registers</text:p>
        </text:list-item>
        <text:list-item>
          <text:p text:style-name="P16">FLASH_BEGIN: Start flash operation</text:p>
        </text:list-item>
        <text:list-item>
          <text:p text:style-name="P16">FLASH_DATA: Send flash data</text:p>
        </text:list-item>
        <text:list-item>
          <text:p text:style-name="P16">FLASH_END: End flash operation</text:p>
        </text:list-item>
        <text:list-item>
          <text:p text:style-name="P16">MEM_BEGIN: Start RAM operation</text:p>
        </text:list-item>
        <text:list-item>
          <text:p text:style-name="P16">MEM_DATA: Send RAM data</text:p>
        </text:list-item>
        <text:list-item>
          <text:p text:style-name="P16">MEM_END: End RAM operation</text:p>
        </text:list-item>
      </text:list>
      <text:p text:style-name="P1"/>
      <text:p text:style-name="P1">The handshake process ensures reliable communication is established before any flash operations begin. It's designed to be robust enough to work across different ESP32 variants and board designs.</text:p>
      <text:p text:style-name="P1"/>
      <text:p text:style-name="P1">This is a critical part of the firmware update process, as it ensures the ESP32 is in a known state before any flash operations begin. The process is handled automatically by esptool.py when you upload new firmware through PlatformIO or the Arduino IDE.</text:p>
      <text:p text:style-name="P1"/>
      <text:h text:style-name="Heading_20_1" text:outline-level="1">Using a logic analyser</text:h>
      <text:p text:style-name="P17"/>
      <text:p text:style-name="P17">The D+ and D- signals you're seeing are USB signals between your Mac and the CP2102 USB-to-UART bridge chip. However, the actual bootloader handshake between the CP2102 and ESP32 happens over UART (serial) lines. You'll want to probe different signals to see the bootloader handshake.</text:p>
      <text:p text:style-name="P17"/>
      <text:p text:style-name="P17">Here's what you should probe:</text:p>
      <text:p text:style-name="P17"/>
      <text:list text:style-name="L13">
        <text:list-item>
          <text:p text:style-name="P18">For USB Analysis (Mac to CP2102):</text:p>
          <text:list>
            <text:list-item>
              <text:p text:style-name="P18">D+ and D- lines</text:p>
            </text:list-item>
            <text:list-item>
              <text:p text:style-name="P18"><text:soft-page-break/>Set probe to USB Full Speed (12 Mbps)</text:p>
            </text:list-item>
            <text:list-item>
              <text:p text:style-name="P18">This will show USB packets but isn't the bootloader protocol</text:p>
            </text:list-item>
          </text:list>
        </text:list-item>
        <text:list-item>
          <text:p text:style-name="P18">For Bootloader Handshake (CP2102 to ESP32):</text:p>
          <text:list>
            <text:list-item>
              <text:p text:style-name="P18">TX (transmit) from CP2102 to ESP32's RX</text:p>
            </text:list-item>
            <text:list-item>
              <text:p text:style-name="P18">RX (receive) from ESP32's TX to CP2102</text:p>
            </text:list-item>
            <text:list-item>
              <text:p text:style-name="P18">RTS (Request to Send) line</text:p>
            </text:list-item>
            <text:list-item>
              <text:p text:style-name="P18">DTR (Data Terminal Ready) line</text:p>
            </text:list-item>
            <text:list-item>
              <text:p text:style-name="P18">Set probe to:</text:p>
              <text:list>
                <text:list-item>
                  <text:p text:style-name="P18">Protocol: UART/Serial</text:p>
                </text:list-item>
                <text:list-item>
                  <text:p text:style-name="P18">Baud Rate: 115200 (initial rate)</text:p>
                </text:list-item>
                <text:list-item>
                  <text:p text:style-name="P18">Data Bits: 8</text:p>
                </text:list-item>
                <text:list-item>
                  <text:p text:style-name="P18">Stop Bits: 1</text:p>
                </text:list-item>
                <text:list-item>
                  <text:p text:style-name="P18">Parity: None</text:p>
                </text:list-item>
                <text:list-item>
                  <text:p text:style-name="P18">Flow Control: None</text:p>
                </text:list-item>
              </text:list>
            </text:list-item>
          </text:list>
        </text:list-item>
      </text:list>
      <text:p text:style-name="P17"/>
      <text:p text:style-name="P17">The actual bootloader handshake happens on the UART lines, not the USB lines. The sequence you want to capture is:</text:p>
      <text:p text:style-name="P17"/>
      <text:list text:style-name="L14">
        <text:list-item>
          <text:p text:style-name="P19">Reset sequence (watch RTS and DTR lines)</text:p>
        </text:list-item>
        <text:list-item>
          <text:p text:style-name="P19">Sync pattern (0x07 0x07 0x12 0x20 + 32 bytes on TX)</text:p>
        </text:list-item>
        <text:list-item>
          <text:p text:style-name="P19">Response from ESP32 (0xC0 + capability bytes on RX)</text:p>
        </text:list-item>
      </text:list>
      <text:p text:style-name="P17"/>
      <text:h text:style-name="Heading_20_2" text:outline-level="2">USB errors we have been seeing</text:h>
      <text:p text:style-name="P17"/>
      <text:p text:style-name="P17">The USB errors you're seeing are likely normal USB protocol retries and aren't directly related to the ESP32 bootloader handshake protocol. You should focus on the UART signals after the CP2102 for analyzing the bootloader communication.</text:p>
      <text:p text:style-name="P17"/>
      <text:h text:style-name="Heading_20_1" text:outline-level="1">Set up the Saleae Original Logic Analyzer </text:h>
      <text:p text:style-name="P17"/>
      <text:p text:style-name="P17">We have been using the Saleae Original Logic Analyzer with software version 1.2.40 to sniff the interaction between the Mac/PC and the ESP32. </text:p>
      <text:p text:style-name="P17"/>
      <text:p text:style-name="P17">For the Saleae Logic 1.2.40 software, you'll want to set up two different protocol analyzers:</text:p>
      <text:p text:style-name="P17"/>
      <text:list xml:id="list1974430828" text:style-name="L15">
        <text:list-item>
          <text:p text:style-name="P20">For USB Analysis (Optional, if you want to see Mac to CP2102):</text:p>
        </text:list-item>
      </text:list>
      <text:list text:style-name="L16">
        <text:list-item>
          <text:list>
            <text:list-item>
              <text:p text:style-name="P21">Add Async Serial analyzer</text:p>
            </text:list-item>
            <text:list-item>
              <text:p text:style-name="P21">Add USB Low/Full Speed analyzer</text:p>
            </text:list-item>
            <text:list-item>
              <text:p text:style-name="P21">Set Speed to: Full Speed (12 Mbps)</text:p>
            </text:list-item>
            <text:list-item>
              <text:p text:style-name="P21">Connect to D+ and D- pins</text:p>
            </text:list-item>
          </text:list>
        </text:list-item>
      </text:list>
      <text:list text:continue-list="list1974430828" text:style-name="L15">
        <text:list-item>
          <text:p text:style-name="P20">For ESP32 Bootloader Communication (This is what you really want):</text:p>
        </text:list-item>
      </text:list>
      <text:list text:style-name="L17">
        <text:list-item>
          <text:list>
            <text:list-item>
              <text:p text:style-name="P22">Add Async Serial analyzer</text:p>
            </text:list-item>
            <text:list-item>
              <text:p text:style-name="P22">Configure as follows:</text:p>
              <text:list>
                <text:list-item>
                  <text:p text:style-name="P22"><text:soft-page-break/>Bit Rate: 115200</text:p>
                </text:list-item>
                <text:list-item>
                  <text:p text:style-name="P22">Bits per Transfer: 8</text:p>
                </text:list-item>
                <text:list-item>
                  <text:p text:style-name="P22">Stop Bits: 1</text:p>
                </text:list-item>
                <text:list-item>
                  <text:p text:style-name="P22">Parity Bit: None</text:p>
                </text:list-item>
                <text:list-item>
                  <text:p text:style-name="P22">Significant Bit: Least First</text:p>
                </text:list-item>
                <text:list-item>
                  <text:p text:style-name="P22">Idle State: High</text:p>
                </text:list-item>
              </text:list>
            </text:list-item>
          </text:list>
        </text:list-item>
      </text:list>
      <text:h text:style-name="Heading_20_2" text:outline-level="2">Channel Setup:</text:h>
      <text:p text:style-name="P17"/>
      <text:list text:style-name="L18">
        <text:list-item>
          <text:p text:style-name="P23">Channel 0: ESP32 RX (CP2102 TX)</text:p>
        </text:list-item>
        <text:list-item>
          <text:p text:style-name="P23">Channel 1: ESP32 TX (CP2102 RX)</text:p>
        </text:list-item>
        <text:list-item>
          <text:p text:style-name="P23">Channel 2: RTS</text:p>
        </text:list-item>
        <text:list-item>
          <text:p text:style-name="P23">Channel 3: DTR</text:p>
        </text:list-item>
      </text:list>
      <text:h text:style-name="Heading_20_2" text:outline-level="2">Trigger Setup:</text:h>
      <text:p text:style-name="P17"/>
      <text:p text:style-name="P17">To catch the start of the bootloader sequence, trigger on the RTS/DTR reset pattern:</text:p>
      <text:list text:style-name="L19">
        <text:list-item>
          <text:p text:style-name="P24">Set trigger on both RTS and DTR changing state</text:p>
        </text:list-item>
        <text:list-item>
          <text:p text:style-name="P24">This will catch the reset sequence that initiates bootloader mode</text:p>
        </text:list-item>
      </text:list>
      <text:h text:style-name="Heading_20_2" text:outline-level="2">Recommended Capture Settings:</text:h>
      <text:p text:style-name="P17"/>
      <text:list text:style-name="L20">
        <text:list-item>
          <text:p text:style-name="P25">Sample Rate: At least 16MHz (higher is better)</text:p>
        </text:list-item>
        <text:list-item>
          <text:p text:style-name="P25">Duration: At least 1 second to catch the full handshake</text:p>
        </text:list-item>
        <text:list-item>
          <text:p text:style-name="P25">Buffer Size: Set to maximum available</text:p>
        </text:list-item>
      </text:list>
      <text:h text:style-name="Heading_20_2" text:outline-level="2">Tips for Saleae Logic specifically:</text:h>
      <text:p text:style-name="P17"/>
      <text:list text:style-name="L21">
        <text:list-item>
          <text:p text:style-name="P26">Use the "Timing Markers Pair" feature to measure the reset pulse widths</text:p>
        </text:list-item>
        <text:list-item>
          <text:p text:style-name="P26">Use the "Async Serial" analyzer's "Data Export" to see the hex values</text:p>
        </text:list-item>
        <text:list-item>
          <text:p text:style-name="P26">Look for these specific patterns:</text:p>
        </text:list-item>
      </text:list>
      <text:list text:style-name="L22">
        <text:list-item>
          <text:list>
            <text:list-item>
              <text:p text:style-name="P27">Reset sequence: DTR and RTS toggling</text:p>
            </text:list-item>
            <text:list-item>
              <text:p text:style-name="P27">Sync pattern: 0x07 0x07 0x12 0x20 followed by 32 bytes</text:p>
            </text:list-item>
            <text:list-item>
              <text:p text:style-name="P27">ESP32 response: 0xC0 followed by capability bytes</text:p>
            </text:list-item>
          </text:list>
        </text:list-item>
      </text:list>
      <text:h text:style-name="Heading_20_1" text:outline-level="1">To decode the data:</text:h>
      <text:p text:style-name="P17"/>
      <text:list text:style-name="L23">
        <text:list-item>
          <text:p text:style-name="P28">Right-click on the Async Serial analyzer</text:p>
        </text:list-item>
        <text:list-item>
          <text:p text:style-name="P28">Select "Export decoded protocol data"</text:p>
        </text:list-item>
        <text:list-item>
          <text:p text:style-name="P28">Choose "CSV" format</text:p>
        </text:list-item>
        <text:list-item>
          <text:p text:style-name="P28">Look for the specific byte patterns mentioned above</text:p>
        </text:list-item>
      </text:list>
      <text:p text:style-name="P17"/>
      <text:p text:style-name="P17">If you're seeing garbled data:</text:p>
      <text:p text:style-name="P17"/>
      <text:list text:style-name="L24">
        <text:list-item>
          <text:p text:style-name="P29"><text:soft-page-break/>Double-check ground connection</text:p>
        </text:list-item>
        <text:list-item>
          <text:p text:style-name="P29">Verify voltage levels (Saleae Logic works with 3.3V and 5V)</text:p>
        </text:list-item>
        <text:list-item>
          <text:p text:style-name="P29">Try increasing the sample rate</text:p>
        </text:list-item>
        <text:list-item>
          <text:p text:style-name="P29">Make sure probe leads are kept short to minimize noise</text:p>
        </text:list-item>
      </text:list>
      <text:p text:style-name="P17"/>
      <text:h text:style-name="Heading_20_2" text:outline-level="2">Specific patterns to look for</text:h>
      <text:p text:style-name="P30">Let me break down the specific patterns you should look for in your Saleae Logic capture during the ESP32 bootloader handshake sequence:</text:p>
      <text:p text:style-name="P30"/>
      <text:list xml:id="list3189378115" text:style-name="L25">
        <text:list-item>
          <text:p text:style-name="P31">Reset Sequence (DTR/RTS lines):</text:p>
        </text:list-item>
      </text:list>
      <text:list text:style-name="L26">
        <text:list-item>
          <text:list>
            <text:list-item>
              <text:p text:style-name="P32">Initial state: DTR=1, RTS=1</text:p>
            </text:list-item>
            <text:list-item>
              <text:p text:style-name="P32">Reset start: DTR=0, RTS=1  (pulls both EN and GPIO0 low)</text:p>
            </text:list-item>
            <text:list-item>
              <text:p text:style-name="P32">Boot mode: DTR=1, RTS=0  (releases EN, keeps GPIO0 low)</text:p>
            </text:list-item>
            <text:list-item>
              <text:p text:style-name="P33">Look for this pattern happening in &lt; 50ms</text:p>
            </text:list-item>
          </text:list>
        </text:list-item>
      </text:list>
      <text:list xml:id="list181220975508242" text:continue-list="list3189378115" text:style-name="L25">
        <text:list-item>
          <text:p text:style-name="P31">Sync Pattern (on TX line from Mac/PC to ESP32):</text:p>
        </text:list-item>
      </text:list>
      <text:list text:style-name="L27">
        <text:list-item>
          <text:list>
            <text:list-item>
              <text:p text:style-name="P34">Header: 0x07 0x07 0x12 0x20</text:p>
            </text:list-item>
            <text:list-item>
              <text:p text:style-name="P34">Payload: 32 bytes of 0x55</text:p>
            </text:list-item>
            <text:list-item>
              <text:p text:style-name="P35">This is the initial synchronization attempt. You might see it repeated if first try fails.</text:p>
            </text:list-item>
          </text:list>
        </text:list-item>
      </text:list>
      <text:list xml:id="list181220577815832" text:continue-list="list181220975508242" text:style-name="L25">
        <text:list-item>
          <text:p text:style-name="P31">ESP32 Response (on RX line from ESP32 to Mac/PC):</text:p>
        </text:list-item>
      </text:list>
      <text:list text:style-name="L28">
        <text:list-item>
          <text:list>
            <text:list-item>
              <text:p text:style-name="P36">Success: 0xC0 (first byte)</text:p>
            </text:list-item>
            <text:list-item>
              <text:p text:style-name="P36">Following: 0x00 0x08     (response length)</text:p>
            </text:list-item>
            <text:list-item>
              <text:p text:style-name="P36">Then: 0x24 0x00 0x00 0x00 0x00 0x00 0x00 0x00   (capability bits)</text:p>
            </text:list-item>
          </text:list>
        </text:list-item>
      </text:list>
      <text:list xml:id="list181220752793194" text:continue-list="list181220577815832" text:style-name="L25">
        <text:list-item>
          <text:p text:style-name="P31">Command Sequences (after sync):</text:p>
        </text:list-item>
      </text:list>
      <text:list text:style-name="L29">
        <text:list-item>
          <text:list>
            <text:list-item>
              <text:p text:style-name="P37">Command headers start with: 0xC0 or 0x00</text:p>
            </text:list-item>
            <text:list-item>
              <text:p text:style-name="P37">Common commands:</text:p>
              <text:list>
                <text:list-item>
                  <text:p text:style-name="P37">0x08 (READ_REG)</text:p>
                </text:list-item>
                <text:list-item>
                  <text:p text:style-name="P37">0x03 (FLASH_BEGIN)</text:p>
                </text:list-item>
                <text:list-item>
                  <text:p text:style-name="P37">0x02 (FLASH_DATA)</text:p>
                </text:list-item>
                <text:list-item>
                  <text:p text:style-name="P37">0x04 (FLASH_END)</text:p>
                </text:list-item>
              </text:list>
            </text:list-item>
          </text:list>
        </text:list-item>
      </text:list>
      <text:list xml:id="list181219864939355" text:continue-list="list181220752793194" text:style-name="L25">
        <text:list-item>
          <text:p text:style-name="P31">Timing Patterns:</text:p>
        </text:list-item>
      </text:list>
      <text:list text:style-name="L30">
        <text:list-item>
          <text:list>
            <text:list-item>
              <text:p text:style-name="P38">Reset pulse width: ~10ms</text:p>
            </text:list-item>
            <text:list-item>
              <text:p text:style-name="P38">Time between reset and first sync attempt: ~50ms</text:p>
            </text:list-item>
            <text:list-item>
              <text:p text:style-name="P38">Response timeout: ~100ms</text:p>
            </text:list-item>
            <text:list-item>
              <text:p text:style-name="P38">Inter-byte spacing at 115200 baud: ~87μs</text:p>
            </text:list-item>
          </text:list>
        </text:list-item>
      </text:list>
      <text:list xml:id="list181220915861815" text:continue-list="list181219864939355" text:style-name="L25">
        <text:list-item>
          <text:p text:style-name="P31">Error Patterns: If sync fails, look for:</text:p>
        </text:list-item>
      </text:list>
      <text:list text:style-name="L31">
        <text:list-item>
          <text:list>
            <text:list-item>
              <text:p text:style-name="P39">Repeated sync patterns (0x07 0x07 0x12 0x20)</text:p>
            </text:list-item>
            <text:list-item>
              <text:p text:style-name="P39">Varying delays between attempts</text:p>
            </text:list-item>
            <text:list-item>
              <text:p text:style-name="P39">No 0xC0 response from ESP32</text:p>
            </text:list-item>
          </text:list>
        </text:list-item>
      </text:list>
      <text:list xml:id="list181220566281435" text:continue-list="list181220915861815" text:style-name="L25">
        <text:list-item>
          <text:p text:style-name="P31">In the Saleae Logic software:</text:p>
        </text:list-item>
      </text:list>
      <text:list text:style-name="L32">
        <text:list-item>
          <text:list>
            <text:list-item>
              <text:p text:style-name="P40">Use the protocol analyzer's search function to find 0x07 0x07 sequence</text:p>
            </text:list-item>
            <text:list-item>
              <text:p text:style-name="P40">Place timing markers at the DTR/RTS transitions</text:p>
            </text:list-item>
            <text:list-item>
              <text:p text:style-name="P40">Look for the 0xC0 response in the RX data</text:p>
            </text:list-item>
            <text:list-item>
              <text:p text:style-name="P40">Export decoded data to CSV and search for these patterns:</text:p>
            </text:list-item>
          </text:list>
        </text:list-item>
      </text:list>
      <text:list xml:id="list181221034682686" text:continue-list="list181220566281435" text:style-name="L25">
        <text:list-item>
          <text:p text:style-name="P41">Search terms:</text:p>
        </text:list-item>
      </text:list>
      <text:list text:style-name="L33">
        <text:list-item>
          <text:list>
            <text:list-item>
              <text:p text:style-name="P42"><text:soft-page-break/>"07 07 12 20" (sync request)</text:p>
            </text:list-item>
            <text:list-item>
              <text:p text:style-name="P42">"C0 00 08" (successful response start)</text:p>
            </text:list-item>
            <text:list-item>
              <text:p text:style-name="P42">"03" (FLASH_BEGIN command)</text:p>
            </text:list-item>
          </text:list>
        </text:list-item>
      </text:list>
      <text:p text:style-name="P43"/>
      <text:p text:style-name="P43"/>
      <text:h text:style-name="Heading_20_1" text:outline-level="1">The USB side of the conversation</text:h>
      <text:p text:style-name="P43"><text:span text:style-name="T3">This section </text:span>explain<text:span text:style-name="T3">s</text:span> the USB-side communication between <text:span text:style-name="T3">the</text:span> Mac/<text:span text:style-name="T3">PC</text:span> and the CP2102 chip.</text:p>
      <text:p text:style-name="P43"/>
      <text:h text:style-name="Heading_20_2" text:outline-level="2">Initial USB Enumeration</text:h>
      <text:p text:style-name="P43">When you connect the <text:span text:style-name="T3">ESP32 development board</text:span>, this sequence occurs:</text:p>
      <text:p text:style-name="P43"/>
      <text:list xml:id="list3321549535" text:style-name="L34">
        <text:list-item>
          <text:p text:style-name="P44">USB Device Detection</text:p>
        </text:list-item>
      </text:list>
      <text:list text:style-name="L35">
        <text:list-item>
          <text:list>
            <text:list-item>
              <text:p text:style-name="P45">Mac detects 5V on USB bus</text:p>
            </text:list-item>
            <text:list-item>
              <text:p text:style-name="P45">Device responds with USB 2.0 full-speed (12Mbps) capability</text:p>
            </text:list-item>
          </text:list>
        </text:list-item>
      </text:list>
      <text:list xml:id="list181220533870696" text:continue-list="list3321549535" text:style-name="L34">
        <text:list-item>
          <text:p text:style-name="P46">Device Identification</text:p>
        </text:list-item>
      </text:list>
      <text:list text:style-name="L36">
        <text:list-item>
          <text:list>
            <text:list-item>
              <text:p text:style-name="P47">VID: 10C4 (Silicon Labs)</text:p>
            </text:list-item>
            <text:list-item>
              <text:p text:style-name="P47">PID: EA60 (CP210x UART Bridge)</text:p>
            </text:list-item>
          </text:list>
        </text:list-item>
      </text:list>
      <text:list text:continue-list="list181220533870696" text:style-name="L34">
        <text:list-item>
          <text:p text:style-name="P46">Driver Loading</text:p>
        </text:list-item>
      </text:list>
      <text:list text:style-name="L37">
        <text:list-item>
          <text:list>
            <text:list-item>
              <text:p text:style-name="P48">MacOS loads the built-in CP210x driver</text:p>
            </text:list-item>
            <text:list-item>
              <text:p text:style-name="P48">Creates virtual serial port (typically /dev/tty.SLAB_USBtoUART)</text:p>
            </text:list-item>
          </text:list>
        </text:list-item>
      </text:list>
      <text:h text:style-name="Heading_20_2" text:outline-level="2">USB Descriptor Exchange</text:h>
      <text:p text:style-name="P43">The Mac requests these descriptors:</text:p>
      <text:p text:style-name="P43"/>
      <text:list xml:id="list3976864140" text:style-name="L38">
        <text:list-item>
          <text:p text:style-name="P49">Device Descriptor</text:p>
        </text:list-item>
      </text:list>
      <text:list text:style-name="L39">
        <text:list-item>
          <text:list>
            <text:list-item>
              <text:p text:style-name="P50">USB version</text:p>
            </text:list-item>
            <text:list-item>
              <text:p text:style-name="P50">Device class (CDC - Communications Device Class)</text:p>
            </text:list-item>
            <text:list-item>
              <text:p text:style-name="P51"><text:span text:style-name="T4">Maximum packet size</text:span></text:p>
            </text:list-item>
          </text:list>
        </text:list-item>
      </text:list>
      <text:list text:continue-list="list3976864140" text:style-name="L38">
        <text:list-item>
          <text:p text:style-name="P49">Configuration Descriptor</text:p>
        </text:list-item>
      </text:list>
      <text:list text:style-name="L40">
        <text:list-item>
          <text:list>
            <text:list-item>
              <text:p text:style-name="P52">Power requirements</text:p>
            </text:list-item>
            <text:list-item>
              <text:p text:style-name="P52">Interface descriptions</text:p>
            </text:list-item>
            <text:list-item>
              <text:p text:style-name="P52">Endpoint configurations</text:p>
            </text:list-item>
          </text:list>
        </text:list-item>
      </text:list>
      <text:h text:style-name="Heading_20_2" text:outline-level="2">Monitoring the USB Traffic</text:h>
      <text:p text:style-name="P43">You can observe this using these tools:</text:p>
      <text:p text:style-name="P43"/>
      <text:list xml:id="list3991346592" text:style-name="L41">
        <text:list-item>
          <text:p text:style-name="P53">System Report</text:p>
        </text:list-item>
      </text:list>
      <text:list text:style-name="L42">
        <text:list-item>
          <text:list>
            <text:list-item>
              <text:p text:style-name="P54"><text:span text:style-name="T4">system_profiler SPUSBDataType</text:span></text:p>
            </text:list-item>
          </text:list>
        </text:list-item>
      </text:list>
      <text:list text:continue-list="list3991346592" text:style-name="L41">
        <text:list-item>
          <text:p text:style-name="P53">USB Prober (if you have Apple Developer Tools)</text:p>
        </text:list-item>
        <text:list-item>
          <text:p text:style-name="P53">Wireshark with USB Capture</text:p>
        </text:list-item>
      </text:list>
      <text:list text:style-name="L43">
        <text:list-item>
          <text:list>
            <text:list-item>
              <text:p text:style-name="P55"><text:span text:style-name="T4">sudo wireshark -i usb0</text:span></text:p>
            </text:list-item>
          </text:list>
        </text:list-item>
      </text:list>
      <text:h text:style-name="Heading_20_2" text:outline-level="2"><text:soft-page-break/>Key Control Transfers</text:h>
      <text:p text:style-name="P43">During esptool.py operation:</text:p>
      <text:p text:style-name="P43"/>
      <text:list xml:id="list1295777532" text:style-name="L44">
        <text:list-item>
          <text:p text:style-name="P56">SET_LINE_CODING (0x20)</text:p>
        </text:list-item>
      </text:list>
      <text:list text:style-name="L45">
        <text:list-item>
          <text:list>
            <text:list-item>
              <text:p text:style-name="P57">Baud rate configuration</text:p>
            </text:list-item>
            <text:list-item>
              <text:p text:style-name="P57">Data bits, stop bits, parity</text:p>
            </text:list-item>
          </text:list>
        </text:list-item>
      </text:list>
      <text:list text:continue-list="list1295777532" text:style-name="L44">
        <text:list-item>
          <text:p text:style-name="P56">SET_CONTROL_LINE_STATE (0x22)</text:p>
        </text:list-item>
      </text:list>
      <text:list text:style-name="L46">
        <text:list-item>
          <text:list>
            <text:list-item>
              <text:p text:style-name="P58"><text:span text:style-name="T4">DTR/RTS signal control for ESP32 reset/boot sequence</text:span></text:p>
            </text:list-item>
          </text:list>
        </text:list-item>
      </text:list>
      <text:p text:style-name="P43"/>
      <text:p text:style-name="P43">These USB-level operations happen before the UART communication begins with the ESP32. Understanding this helps when debugging connection issues between your Mac and the ESP32.</text:p>
      <text:p text:style-name="P43"/>
      <text:list text:continue-list="list181221034682686" text:style-name="L25">
        <text:list-header>
          <text:p text:style-name="P31"/>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1T16:44:30.396055000</meta:creation-date>
    <dc:date>2025-09-21T18:12:19.173568000</dc:date>
    <meta:editing-duration>PT17M19S</meta:editing-duration>
    <meta:editing-cycles>2</meta:editing-cycles>
    <meta:generator>LibreOffice/25.2.2.2$MacOSX_AARCH64 LibreOffice_project/7370d4be9e3cf6031a51beef54ff3bda878e3fac</meta:generator>
    <meta:document-statistic meta:table-count="0" meta:image-count="0" meta:object-count="0" meta:page-count="8" meta:paragraph-count="220" meta:word-count="1746" meta:character-count="10134" meta:non-whitespace-character-count="8766"/>
  </office:meta>
</office:document-meta>
</file>