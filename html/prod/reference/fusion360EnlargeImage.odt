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2C000000A92ACBB51B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f6697" officeooo:paragraph-rsid="001f6697"/>
    </style:style>
    <style:style style:name="P2" style:family="paragraph" style:parent-style-name="Text_20_body">
      <style:paragraph-properties fo:break-before="page"/>
      <style:text-properties officeooo:rsid="001f6697" officeooo:paragraph-rsid="001f6697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larging Schematics</text:p>
      <text:p text:style-name="Subtitle">Using Posterazor to enlarge Fusion360 schematic diagram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0.597cm" svg:y="13.162cm" svg:width="6.927cm" svg:height="3.902cm" draw:z-index="0"><draw:image xlink:href="Pictures/100000000000012C000000A92ACBB51B.jpg" xlink:type="simple" xlink:show="embed" xlink:actuate="onLoad" draw:mime-type="image/jpeg"/></draw:frame></text:p>
      <text:p text:style-name="P2"/>
      <text:h text:style-name="Heading_20_3" text:outline-level="3">Here's What To Do</text:h>
      <text:list text:style-name="L1">
        <text:list-item>
          <text:p text:style-name="P3">Go to <text:a xlink:type="simple" xlink:href="https://posterazor.sourceforge.io/" text:style-name="Internet_20_link" text:visited-style-name="Visited_20_Internet_20_Link"><text:span text:style-name="Strong_20_Emphasis">https://posterazor.sourceforge.io</text:span></text:a> in Safari or Chrome </text:p>
        </text:list-item>
        <text:list-item>
          <text:p text:style-name="P3">Click <text:span text:style-name="Strong_20_Emphasis">"Use the WebAssembly-based version"</text:span> </text:p>
        </text:list-item>
        <text:list-item>
          <text:p text:style-name="P3">It will walk you through <text:span text:style-name="Strong_20_Emphasis">5 steps</text:span>: </text:p>
          <text:list>
            <text:list-item>
              <text:p text:style-name="P3"><text:span text:style-name="Strong_20_Emphasis">Step 1:</text:span> Load your PNG file </text:p>
            </text:list-item>
            <text:list-item>
              <text:p text:style-name="P3"><text:span text:style-name="Strong_20_Emphasis">Step 2:</text:span> Set paper size to <text:span text:style-name="Strong_20_Emphasis">US Letter</text:span>, orientation <text:span text:style-name="Strong_20_Emphasis">Landscape</text:span> (recommended for schematics) </text:p>
            </text:list-item>
            <text:list-item>
              <text:p text:style-name="P3"><text:span text:style-name="Strong_20_Emphasis">Step 3:</text:span> Set the <text:span text:style-name="Strong_20_Emphasis">overlap</text:span> between pages — try <text:span text:style-name="Strong_20_Emphasis">0.5 inches</text:span> so adjacent sheets align easily when assembled </text:p>
            </text:list-item>
            <text:list-item>
              <text:p text:style-name="P3"><text:span text:style-name="Strong_20_Emphasis">Step 4:</text:span> Set the poster size — you can specify either total dimensions or <text:span text:style-name="Strong_20_Emphasis">number of pages</text:span> (e.g. 2×2 = 4 sheets, 3×2 = 6 sheets, etc.) </text:p>
            </text:list-item>
            <text:list-item>
              <text:p text:style-name="P3"><text:span text:style-name="Strong_20_Emphasis">Step 5:</text:span> Save as a <text:span text:style-name="Strong_20_Emphasis">multi-page PDF</text:span>, then print that PDF </text:p>
            </text:list-item>
          </text:list>
        </text:list-item>
        <text:list-item>
          <text:p text:style-name="P4">Print the resulting PDF at <text:span text:style-name="Strong_20_Emphasis">100% scale</text:span> — do not scale to fit </text:p>
        </text:list-item>
      </text:list>
      <text:p text:style-name="Text_20_body">The overlap feature ensures a seamless transition between pages, which is really helpful when you're trying to read a schematic across shee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3T14:28:20.802803000</meta:creation-date>
    <dc:date>2026-05-13T14:31:37.641885000</dc:date>
    <meta:editing-duration>PT3M17S</meta:editing-duration>
    <meta:editing-cycles>1</meta:editing-cycles>
    <meta:generator>LibreOffice/25.2.2.2$MacOSX_AARCH64 LibreOffice_project/7370d4be9e3cf6031a51beef54ff3bda878e3fac</meta:generator>
    <meta:print-date>2026-05-13T14:32:57.644395000</meta:print-date>
    <meta:printed-by>PDF files</meta:printed-by>
    <meta:document-statistic meta:table-count="0" meta:image-count="1" meta:object-count="0" meta:page-count="2" meta:paragraph-count="13" meta:word-count="148" meta:character-count="848" meta:non-whitespace-character-count="710"/>
  </office:meta>
</office:document-meta>
</file>