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63C00000454A770D37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3.25cm" fo:min-width="19.09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538cm" fo:min-width="0.03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788cm" fo:min-width="1.038cm" fo:padding-top="0.231cm" fo:padding-bottom="0.231cm" fo:padding-left="0.356cm" fo:padding-right="0.356cm" loext:decorative="false"/>
    </style:style>
    <style:style style:name="gr5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598cm" svg:x="1cm" svg:y="7.17cm">
          <draw:image xlink:href="Pictures/100000010000063C00000454A770D373.png" xlink:type="simple" xlink:show="embed" xlink:actuate="onLoad" draw:mime-type="image/png">
            <text:p/>
          </draw:image>
        </draw:frame>
        <draw:custom-shape draw:style-name="gr2" draw:text-style-name="P2" draw:layer="layout" svg:width="19.59cm" svg:height="13.5cm" svg:x="1cm" svg:y="7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5cm" svg:height="1cm" svg:x="1.25cm" svg:y="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5cm" svg:height="1.25cm" svg:x="18.25cm" svg:y="18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25cm" svg:y1="13cm" svg:x2="5.5cm" svg:y2="13cm">
          <text:p/>
        </draw:line>
        <draw:line draw:style-name="gr5" draw:text-style-name="P2" draw:layer="layout" svg:x1="9.25cm" svg:y1="15.25cm" svg:x2="5.5cm" svg:y2="15.25cm">
          <text:p/>
        </draw:line>
        <draw:frame draw:style-name="gr6" draw:text-style-name="P3" draw:layer="layout" svg:width="6.996cm" svg:height="0.962cm" svg:x="9.5cm" svg:y="12.538cm">
          <draw:text-box>
            <text:p><text:span text:style-name="T1">Type library name here</text:span></text:p>
          </draw:text-box>
        </draw:frame>
        <draw:frame draw:style-name="gr7" draw:text-style-name="P3" draw:layer="layout" svg:width="7.561cm" svg:height="0.962cm" svg:x="9.439cm" svg:y="14.75cm">
          <draw:text-box>
            <text:p><text:span text:style-name="T1">Select project name her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20:34:10.842670000</dc:date>
    <meta:editing-duration>PT4M32S</meta:editing-duration>
    <meta:editing-cycles>1</meta:editing-cycles>
    <meta:document-statistic meta:object-count="8"/>
    <meta:generator>LibreOffice/25.2.2.2$MacOSX_AARCH64 LibreOffice_project/7370d4be9e3cf6031a51beef54ff3bda878e3fac</meta:generator>
  </office:meta>
</office:document-meta>
</file>