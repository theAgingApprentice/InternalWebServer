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20000039AB1CC2EA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cm" draw:fill="none" loext:fill-use-slide-background="false" draw:textarea-horizontal-align="justify" draw:textarea-vertical-align="middle" draw:auto-grow-height="false" fo:min-height="11.75cm" fo:min-width="19.09cm" loext:decorative="false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1.538cm" fo:min-width="18.69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788cm" fo:min-width="2.788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1.288cm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963cm" svg:x="1cm" svg:y="8.037cm">
          <draw:image xlink:href="Pictures/10000001000005F20000039AB1CC2EAC.png" xlink:type="simple" xlink:show="embed" xlink:actuate="onLoad" draw:mime-type="image/png">
            <text:p/>
          </draw:image>
        </draw:frame>
        <draw:custom-shape draw:style-name="gr2" draw:text-style-name="P2" draw:layer="layout" svg:width="19.59cm" svg:height="12cm" svg:x="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1cm" svg:height="12cm" svg:x="1.0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2.25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2.2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18cm" svg:y="17.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cm" svg:y1="12cm" svg:x2="5.5cm" svg:y2="12cm">
          <text:p/>
        </draw:line>
        <draw:line draw:style-name="gr6" draw:text-style-name="P2" draw:layer="layout" svg:x1="8cm" svg:y1="14.25cm" svg:x2="5.5cm" svg:y2="14.25cm">
          <text:p/>
        </draw:line>
        <draw:frame draw:style-name="gr7" draw:text-style-name="P3" draw:layer="layout" svg:width="4.985cm" svg:height="0.962cm" svg:x="8.015cm" svg:y="11.538cm">
          <draw:text-box>
            <text:p><text:span text:style-name="T1">3D model name</text:span></text:p>
          </draw:text-box>
        </draw:frame>
        <draw:frame draw:style-name="gr7" draw:text-style-name="P3" draw:layer="layout" svg:width="6.291cm" svg:height="0.962cm" svg:x="7.959cm" svg:y="13.788cm">
          <draw:text-box>
            <text:p><text:span text:style-name="T1">Hub project location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8:53:36.016076000</dc:date>
    <meta:editing-duration>PT4M48S</meta:editing-duration>
    <meta:editing-cycles>1</meta:editing-cycles>
    <meta:document-statistic meta:object-count="10"/>
    <meta:generator>LibreOffice/25.2.2.2$MacOSX_AARCH64 LibreOffice_project/7370d4be9e3cf6031a51beef54ff3bda878e3fac</meta:generator>
  </office:meta>
</office:document-meta>
</file>