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7140000038070A4B7E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9.25cm" fo:min-width="19.09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288cm" fo:min-width="13.7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288cm" fo:min-width="1.288cm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685cm" svg:x="1cm" svg:y="9.127cm">
          <draw:image xlink:href="Pictures/10000001000007140000038070A4B7E0.png" xlink:type="simple" xlink:show="embed" xlink:actuate="onLoad" draw:mime-type="image/png">
            <text:p/>
          </draw:image>
        </draw:frame>
        <draw:custom-shape draw:style-name="gr2" draw:text-style-name="P2" draw:layer="layout" svg:width="19.59cm" svg:height="9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5cm" svg:height="0.75cm" svg:x="6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75cm" svg:x="18.25cm" svg:y="1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9:23:46.990371000</dc:date>
    <meta:editing-duration>PT1M30S</meta:editing-duration>
    <meta:editing-cycles>1</meta:editing-cycles>
    <meta:document-statistic meta:object-count="4"/>
    <meta:generator>LibreOffice/25.2.2.2$MacOSX_AARCH64 LibreOffice_project/7370d4be9e3cf6031a51beef54ff3bda878e3fac</meta:generator>
  </office:meta>
</office:document-meta>
</file>