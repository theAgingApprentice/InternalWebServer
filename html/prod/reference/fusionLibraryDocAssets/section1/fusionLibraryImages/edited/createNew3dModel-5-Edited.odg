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5DC000005CEB2647D80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9.25cm" fo:min-width="19.09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1.538cm" fo:min-width="16.788cm" fo:padding-top="0.231cm" fo:padding-bottom="0.231cm" fo:padding-left="0.356cm" fo:padding-right="0.356cm" loext:decorative="false"/>
    </style:style>
    <style:style style:name="gr4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1.538cm" fo:min-width="17.788cm" fo:padding-top="0.231cm" fo:padding-bottom="0.231cm" fo:padding-left="0.356cm" fo:padding-right="0.356cm" loext:decorative="false"/>
    </style:style>
    <style:style style:name="gr5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1.038cm" fo:min-width="1.788cm" fo:padding-top="0.231cm" fo:padding-bottom="0.231cm" fo:padding-left="0.356cm" fo:padding-right="0.356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406cm" svg:x="1cm" svg:y="4.266cm">
          <draw:image xlink:href="Pictures/10000001000005DC000005CEB2647D80.png" xlink:type="simple" xlink:show="embed" xlink:actuate="onLoad" draw:mime-type="image/png">
            <text:p/>
          </draw:image>
        </draw:frame>
        <draw:custom-shape draw:style-name="gr2" draw:text-style-name="P1" draw:layer="layout" svg:width="19.59cm" svg:height="19.5cm" svg:x="1cm" svg:y="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5cm" svg:height="2cm" svg:x="1.75cm" svg:y="1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5cm" svg:height="2cm" svg:x="1.5cm" svg:y="17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.5cm" svg:x="17.5cm" svg:y="2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19:31:05.977099000</dc:date>
    <meta:editing-duration>PT2M3S</meta:editing-duration>
    <meta:editing-cycles>2</meta:editing-cycles>
    <meta:generator>LibreOffice/25.2.2.2$MacOSX_AARCH64 LibreOffice_project/7370d4be9e3cf6031a51beef54ff3bda878e3fac</meta:generator>
    <meta:document-statistic meta:object-count="5"/>
  </office:meta>
</office:document-meta>
</file>