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20000002C4C78BF578.png" manifest:media-type="image/png"/>
  <manifest:file-entry manifest:full-path="Pictures/1000000100000956000006269B31DE74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9.038cm" fo:min-width="19.788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538cm" fo:min-width="4.96cm" fo:padding-top="0.231cm" fo:padding-bottom="0.231cm" fo:padding-left="0.356cm" fo:padding-right="0.35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8" style:family="graphic" style:parent-style-name="objectwithoutfill">
      <style:graphic-properties svg:stroke-width="0.212cm" svg:stroke-color="#ff0000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0000" loext:opacity="100%" fo:text-shadow="1pt 1pt"/>
    </style:style>
    <style:style style:name="P4" style:family="paragraph">
      <style:text-properties fo:text-shadow="1pt 1pt"/>
    </style:style>
    <style:style style:name="P5" style:family="paragraph">
      <style:text-properties fo:text-shadow="none"/>
    </style:style>
    <style:style style:name="P6" style:family="paragraph">
      <loext:graphic-properties draw:fill="none" draw:fill-color="#ffffff"/>
      <style:text-properties fo:color="#ff0000" loext:opacity="100%" fo:text-shadow="none"/>
    </style:style>
    <style:style style:name="T1" style:family="text">
      <style:text-properties fo:color="#ff0000" loext:opacity="100%" fo:text-shadow="1pt 1pt"/>
    </style:style>
    <style:style style:name="T2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34cm" svg:height="12.9cm" svg:x="4.25cm" svg:y="10cm">
          <draw:image xlink:href="Pictures/1000000100000956000006269B31DE74.png" xlink:type="simple" xlink:show="embed" xlink:actuate="onLoad" draw:mime-type="image/png">
            <text:p/>
          </draw:image>
        </draw:frame>
        <draw:frame draw:style-name="gr1" draw:text-style-name="P1" draw:layer="layout" svg:width="14.11cm" svg:height="12.487cm" svg:x="0.64cm" svg:y="3cm">
          <draw:image xlink:href="Pictures/1000000100000320000002C4C78BF578.png" xlink:type="simple" xlink:show="embed" xlink:actuate="onLoad" draw:mime-type="image/png">
            <text:p/>
          </draw:image>
        </draw:frame>
        <draw:custom-shape draw:style-name="gr2" draw:text-style-name="P2" draw:layer="layout" svg:width="20.5cm" svg:height="19.5cm" draw:transform="skewX (0.00122173047639603) translate (0.774cm 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672cm" svg:height="1cm" draw:transform="skewX (0.00122173047639603) translate (8.829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5.55cm" svg:height="0.962cm" svg:x="5.5cm" svg:y="3.788cm">
          <draw:text-box>
            <text:p><text:span text:style-name="T1">Data Panel on left</text:span></text:p>
          </draw:text-box>
        </draw:frame>
        <draw:frame draw:style-name="gr4" draw:text-style-name="P3" draw:layer="layout" svg:width="6.22cm" svg:height="1.673cm" svg:x="14.75cm" svg:y="3.655cm">
          <draw:text-box>
            <text:p text:style-name="P4"><text:span text:style-name="T1">Component browser</text:span></text:p>
            <text:p text:style-name="P4"><text:span text:style-name="T1">On right</text:span></text:p>
          </draw:text-box>
        </draw:frame>
        <draw:frame draw:style-name="gr4" draw:text-style-name="P3" draw:layer="layout" svg:width="5.55cm" svg:height="0.962cm" svg:x="5.5cm" svg:y="3.788cm">
          <draw:text-box>
            <text:p><text:span text:style-name="T1">Data Panel on left</text:span></text:p>
          </draw:text-box>
        </draw:frame>
        <draw:frame draw:style-name="gr5" draw:text-style-name="P3" draw:layer="layout" svg:width="7.75cm" svg:height="1.212cm" svg:x="5.5cm" svg:y="3.788cm">
          <draw:text-box>
            <text:p><text:span text:style-name="T1">Data Panel </text:span></text:p>
          </draw:text-box>
        </draw:frame>
        <draw:frame draw:style-name="gr6" draw:text-style-name="P6" draw:layer="layout" svg:width="3.395cm" svg:height="1.712cm" svg:x="16.995cm" svg:y="5.25cm">
          <draw:text-box>
            <text:p text:style-name="P5"><text:span text:style-name="T2">Right click</text:span></text:p>
          </draw:text-box>
        </draw:frame>
        <draw:frame draw:style-name="gr7" draw:text-style-name="P6" draw:layer="layout" svg:width="3.395cm" svg:height="0.962cm" svg:x="17cm" svg:y="7cm">
          <draw:text-box>
            <text:p text:style-name="P5"><text:span text:style-name="T2">Select</text:span></text:p>
          </draw:text-box>
        </draw:frame>
        <draw:line draw:style-name="gr8" draw:text-style-name="P2" draw:layer="layout" svg:x1="16.75cm" svg:y1="5.75cm" svg:x2="7.75cm" svg:y2="5.75cm">
          <text:p/>
        </draw:line>
        <draw:line draw:style-name="gr8" draw:text-style-name="P2" draw:layer="layout" svg:x1="17cm" svg:y1="7.5cm" svg:x2="14.75cm" svg:y2="7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19:55:18.720888000</dc:date>
    <meta:editing-duration>PT9M14S</meta:editing-duration>
    <meta:editing-cycles>1</meta:editing-cycles>
    <meta:document-statistic meta:object-count="12"/>
    <meta:generator>LibreOffice/25.2.2.2$MacOSX_AARCH64 LibreOffice_project/7370d4be9e3cf6031a51beef54ff3bda878e3fac</meta:generator>
  </office:meta>
</office:document-meta>
</file>