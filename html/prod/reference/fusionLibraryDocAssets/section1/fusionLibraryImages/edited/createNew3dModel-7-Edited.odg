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E00000047458F8EDF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19.25cm" fo:min-width="17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2.288cm" fo:min-width="1.788cm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97cm" svg:height="20.108cm" svg:x="2.003cm" svg:y="4cm">
          <draw:image xlink:href="Pictures/10000001000003E00000047458F8EDF3.png" xlink:type="simple" xlink:show="embed" xlink:actuate="onLoad" draw:mime-type="image/png">
            <text:p/>
          </draw:image>
        </draw:frame>
        <draw:custom-shape draw:style-name="gr2" draw:text-style-name="P2" draw:layer="layout" svg:width="17.5cm" svg:height="19.5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75cm" svg:x="5.25cm" svg:y="4.2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75cm" svg:y1="9.5cm" svg:x2="12.25cm" svg:y2="18cm">
          <text:p/>
        </draw:line>
        <draw:frame draw:style-name="gr5" draw:text-style-name="P4" draw:layer="layout" svg:width="8.408cm" svg:height="0.962cm" svg:x="4cm" svg:y="8.25cm">
          <draw:text-box>
            <text:p text:style-name="P3"><text:span text:style-name="T1">Use controls to orient mod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0:07:26.798428000</dc:date>
    <meta:editing-duration>PT3M33S</meta:editing-duration>
    <meta:editing-cycles>1</meta:editing-cycles>
    <meta:document-statistic meta:object-count="5"/>
    <meta:generator>LibreOffice/25.2.2.2$MacOSX_AARCH64 LibreOffice_project/7370d4be9e3cf6031a51beef54ff3bda878e3fac</meta:generator>
  </office:meta>
</office:document-meta>
</file>