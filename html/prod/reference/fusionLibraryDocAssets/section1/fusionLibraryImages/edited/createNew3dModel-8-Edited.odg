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080000015892D5E4D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5.75cm" fo:min-width="17.7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788cm" fo:min-width="1.288cm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03cm" svg:height="6.067cm" svg:x="1.693cm" svg:y="10.936cm">
          <draw:image xlink:href="Pictures/10000001000004080000015892D5E4D6.png" xlink:type="simple" xlink:show="embed" xlink:actuate="onLoad" draw:mime-type="image/png">
            <text:p/>
          </draw:image>
        </draw:frame>
        <draw:custom-shape draw:style-name="gr2" draw:text-style-name="P2" draw:layer="layout" svg:width="18.25cm" svg:height="6cm" svg:x="1.7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.25cm" svg:x="17.25cm" svg:y="15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20:15:19.694135000</dc:date>
    <meta:editing-duration>PT1M17S</meta:editing-duration>
    <meta:editing-cycles>1</meta:editing-cycles>
    <meta:document-statistic meta:object-count="3"/>
    <meta:generator>LibreOffice/25.2.2.2$MacOSX_AARCH64 LibreOffice_project/7370d4be9e3cf6031a51beef54ff3bda878e3fac</meta:generator>
  </office:meta>
</office:document-meta>
</file>