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FA000001A6DA62D67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7.25cm" fo:min-width="13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3.03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4cm" svg:height="7.442cm" svg:x="4.074cm" svg:y="10.248cm">
          <draw:image xlink:href="Pictures/10000001000002FA000001A6DA62D673.png" xlink:type="simple" xlink:show="embed" xlink:actuate="onLoad" draw:mime-type="image/png">
            <text:p/>
          </draw:image>
        </draw:frame>
        <draw:custom-shape draw:style-name="gr2" draw:text-style-name="P2" draw:layer="layout" svg:width="13.5cm" svg:height="7.5cm" svg:x="4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cm" svg:x="9.25cm" svg:y="15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0:23:14.915675000</dc:date>
    <meta:editing-duration>PT1M18S</meta:editing-duration>
    <meta:editing-cycles>1</meta:editing-cycles>
    <meta:document-statistic meta:object-count="3"/>
    <meta:generator>LibreOffice/25.2.2.2$MacOSX_AARCH64 LibreOffice_project/7370d4be9e3cf6031a51beef54ff3bda878e3fac</meta:generator>
  </office:meta>
</office:document-meta>
</file>