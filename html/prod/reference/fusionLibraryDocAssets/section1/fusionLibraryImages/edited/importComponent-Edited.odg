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8200000338F568189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98cm, 0.465cm, 0.736cm, 0.624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2.538cm" fo:min-width="13.538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38cm" fo:min-width="4.538cm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49cm" svg:height="13.499cm" svg:x="3.5cm" svg:y="7cm">
          <draw:image xlink:href="Pictures/100000010000038200000338F5681899.png" xlink:type="simple" xlink:show="embed" xlink:actuate="onLoad" draw:mime-type="image/png">
            <text:p/>
          </draw:image>
        </draw:frame>
        <draw:custom-shape draw:style-name="gr2" draw:text-style-name="P2" draw:layer="layout" svg:width="14.25cm" svg:height="13cm" svg:x="3.75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cm" svg:height="1.5cm" svg:x="6cm" svg:y="1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7:33:34.215907000</dc:date>
    <meta:editing-duration>PT2M10S</meta:editing-duration>
    <meta:editing-cycles>1</meta:editing-cycles>
    <meta:document-statistic meta:object-count="3"/>
    <meta:generator>LibreOffice/25.2.2.2$MacOSX_AARCH64 LibreOffice_project/7370d4be9e3cf6031a51beef54ff3bda878e3fac</meta:generator>
  </office:meta>
</office:document-meta>
</file>