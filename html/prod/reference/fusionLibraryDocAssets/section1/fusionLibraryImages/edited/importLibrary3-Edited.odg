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F20000042695BB201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8.538cm" fo:min-width="17.288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3.038cm" fo:min-width="14.7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1.78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15cm" svg:height="18.732cm" svg:x="1.887cm" svg:y="4.603cm">
          <draw:image xlink:href="Pictures/10000001000003F20000042695BB201D.png" xlink:type="simple" xlink:show="embed" xlink:actuate="onLoad" draw:mime-type="image/png">
            <text:p/>
          </draw:image>
        </draw:frame>
        <draw:custom-shape draw:style-name="gr2" draw:text-style-name="P2" draw:layer="layout" svg:width="18cm" svg:height="19cm" svg:x="1.7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3.5cm" svg:x="3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.25cm" svg:x="16.5cm" svg:y="2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8:00:40.043127000</dc:date>
    <meta:editing-duration>PT1M37S</meta:editing-duration>
    <meta:editing-cycles>1</meta:editing-cycles>
    <meta:document-statistic meta:object-count="4"/>
    <meta:generator>LibreOffice/25.2.2.2$MacOSX_AARCH64 LibreOffice_project/7370d4be9e3cf6031a51beef54ff3bda878e3fac</meta:generator>
  </office:meta>
</office:document-meta>
</file>