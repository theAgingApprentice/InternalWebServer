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8800000188FEF9B605.png" manifest:media-type="image/png"/>
  <manifest:file-entry manifest:full-path="Pictures/1000000100000AD2000006267606005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6.538cm" fo:min-width="15.28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0.538cm" fo:min-width="2.038cm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288cm" fo:min-width="5.038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13cm" svg:x="1cm" svg:y="8.404cm">
          <draw:image xlink:href="Pictures/1000000100000AD2000006267606005C.png" xlink:type="simple" xlink:show="embed" xlink:actuate="onLoad" draw:mime-type="image/png">
            <text:p/>
          </draw:image>
        </draw:frame>
        <draw:frame draw:style-name="gr1" draw:text-style-name="P1" draw:layer="layout" svg:width="15.945cm" svg:height="6.913cm" svg:x="3.805cm" svg:y="10.087cm">
          <draw:image xlink:href="Pictures/100000010000038800000188FEF9B605.png" xlink:type="simple" xlink:show="embed" xlink:actuate="onLoad" draw:mime-type="image/png">
            <text:p/>
          </draw:image>
        </draw:frame>
        <draw:custom-shape draw:style-name="gr2" draw:text-style-name="P2" draw:layer="layout" svg:width="16cm" svg:height="7cm" svg:x="3.7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1cm" svg:x="1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3.75cm" svg:y1="18.5cm" svg:x2="4.5cm" svg:y2="17.5cm">
          <text:p/>
        </draw:line>
        <draw:custom-shape draw:style-name="gr5" draw:text-style-name="P2" draw:layer="layout" svg:width="5.75cm" svg:height="1.75cm" svg:x="10cm" svg:y="14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48cm" svg:height="0.962cm" svg:x="4cm" svg:y="10.538cm">
          <draw:text-box>
            <text:p><text:span text:style-name="T1">(Zoom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7:46:02.329342000</dc:date>
    <meta:editing-duration>PT4M49S</meta:editing-duration>
    <meta:editing-cycles>1</meta:editing-cycles>
    <meta:document-statistic meta:object-count="7"/>
    <meta:generator>LibreOffice/25.2.2.2$MacOSX_AARCH64 LibreOffice_project/7370d4be9e3cf6031a51beef54ff3bda878e3fac</meta:generator>
  </office:meta>
</office:document-meta>
</file>