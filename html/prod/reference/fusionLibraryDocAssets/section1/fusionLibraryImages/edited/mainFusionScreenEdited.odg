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115000000898BE84B30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svg:stroke-width="0.106cm" svg:stroke-color="#ff0000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1.894cm" fo:min-width="24.144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394cm" fo:min-width="17.144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vertical-align="middle" draw:auto-grow-height="false" fo:min-height="11.143cm" fo:min-width="3.893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vertical-align="middle" draw:auto-grow-height="false" fo:min-height="0.393cm" fo:min-width="3.893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vertical-align="middle" draw:auto-grow-height="false" fo:min-height="0.394cm" fo:min-width="1.894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vertical-align="middle" draw:auto-grow-height="false" fo:min-height="0.643cm" fo:min-width="15.894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vertical-align="middle" draw:auto-grow-height="false" fo:min-height="1.394cm" fo:min-width="0.89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vertical-align="middle" draw:auto-grow-height="false" fo:min-height="1.144cm" fo:min-width="2.643cm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vertical-align="middle" draw:auto-grow-height="false" fo:min-height="0.144cm" fo:min-width="3.893cm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vertical-align="middle" draw:auto-grow-height="false" fo:min-height="0.394cm" fo:min-width="3.893cm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vertical-align="middle" draw:auto-grow-height="false" fo:min-height="7.644cm" fo:min-width="13.89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 fo:min-height="0.282cm" fo:min-width="0.03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9.23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text-properties fo:color="#ffffff" loext:opacity="100%"/>
    </style:style>
    <style:style style:name="P5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6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24.843cm" svg:height="12.331cm" svg:x="1.5cm" svg:y="5cm">
            <draw:image xlink:href="Pictures/100000010000115000000898BE84B305.png" xlink:type="simple" xlink:show="embed" xlink:actuate="onLoad" draw:mime-type="image/png">
              <text:p/>
            </draw:image>
          </draw:frame>
          <draw:custom-shape draw:style-name="gr3" draw:text-style-name="P2" draw:layer="layout" svg:width="24.75cm" svg:height="12.25cm" svg:x="1.5cm" svg:y="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7.75cm" svg:height="0.75cm" svg:x="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4.499cm" svg:height="11.499cm" svg:x="1.501cm" svg:y="5.75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499cm" svg:height="0.749cm" svg:x="21.75cm" svg:y="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2.5cm" svg:height="0.75cm" svg:x="1.5cm" svg:y="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6.5cm" svg:height="0.999cm" svg:x="6cm" svg:y="5.75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5cm" svg:height="1.75cm" svg:x="24.75cm" svg:y="6.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49cm" svg:height="1.5cm" draw:transform="skewX (0.00139626340159546) translate (6.013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4.499cm" svg:height="0.5cm" svg:x="6cm" svg:y="16.7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4.499cm" svg:height="0.5cm" svg:x="6cm" svg:y="16.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4.499cm" svg:height="0.75cm" svg:x="14.001cm" svg:y="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4.5cm" svg:height="8cm" svg:x="9.75cm" svg:y="7.25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14" draw:text-style-name="P3" draw:layer="layout" svg:width="0.75cm" svg:height="0.75cm" svg:x="3cm" svg:y="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5" draw:layer="layout" svg:width="0.697cm" svg:height="0.645cm" svg:x="3.053cm" svg:y="5.105cm">
              <draw:text-box>
                <text:p text:style-name="P4"><text:span text:style-name="T1">1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9.25cm" svg:y="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6" draw:text-style-name="P6" draw:layer="layout" svg:width="0.679cm" svg:height="0.607cm" svg:x="9.321cm" svg:y="5.143cm">
              <draw:text-box>
                <text:p text:style-name="P4"><text:span text:style-name="T1">2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22cm" svg:y="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6" draw:text-style-name="P6" draw:layer="layout" svg:width="0.679cm" svg:height="0.607cm" svg:x="22.071cm" svg:y="5.143cm">
              <draw:text-box>
                <text:p text:style-name="P4"><text:span text:style-name="T1">3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11.5cm" svg:y="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6" draw:text-style-name="P6" draw:layer="layout" svg:width="0.679cm" svg:height="0.607cm" svg:x="11.571cm" svg:y="6.143cm">
              <draw:text-box>
                <text:p text:style-name="P4"><text:span text:style-name="T1">4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3.5cm" svg:y="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7" draw:text-style-name="P6" draw:layer="layout" svg:width="0.679cm" svg:height="0.607cm" svg:x="3.571cm" svg:y="6.143cm">
              <draw:text-box>
                <text:p text:style-name="P4"><text:span text:style-name="T1">5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8.25cm" svg:y="7.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6" draw:text-style-name="P6" draw:layer="layout" svg:width="0.679cm" svg:height="0.607cm" svg:x="8.321cm" svg:y="7.393cm">
              <draw:text-box>
                <text:p text:style-name="P4"><text:span text:style-name="T1">6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16.25cm" svg:y="10.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6" draw:text-style-name="P6" draw:layer="layout" svg:width="0.679cm" svg:height="0.607cm" svg:x="16.321cm" svg:y="10.643cm">
              <draw:text-box>
                <text:p text:style-name="P4"><text:span text:style-name="T1">7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25.25cm" svg:y="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8" draw:text-style-name="P6" draw:layer="layout" svg:width="0.679cm" svg:height="0.607cm" svg:x="25.321cm" svg:y="6.143cm">
              <draw:text-box>
                <text:p text:style-name="P4"><text:span text:style-name="T1">8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9.75cm" svg:y="15.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6" draw:text-style-name="P6" draw:layer="layout" svg:width="0.679cm" svg:height="0.607cm" svg:x="9.821cm" svg:y="15.893cm">
              <draw:text-box>
                <text:p text:style-name="P4"><text:span text:style-name="T1">9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17.75cm" svg:y="15.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6" draw:text-style-name="P6" draw:layer="layout" svg:width="0.855cm" svg:height="0.607cm" svg:x="17.75cm" svg:y="15.893cm">
              <draw:text-box>
                <text:p text:style-name="P4"><text:span text:style-name="T1">10</text:span></text:p>
              </draw:text-box>
            </draw:frame>
          </draw:g>
          <draw:g draw:style-name="gr1">
            <draw:custom-shape draw:style-name="gr14" draw:text-style-name="P3" draw:layer="layout" svg:width="0.75cm" svg:height="0.75cm" svg:x="9.918cm" svg:y="16.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6" draw:text-style-name="P6" draw:layer="layout" svg:width="0.832cm" svg:height="0.607cm" svg:x="9.918cm" svg:y="16.643cm">
              <draw:text-box>
                <text:p text:style-name="P4"><text:span text:style-name="T1">1</text:span><text:span text:style-name="T1">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08:46:15.780352000</dc:date>
    <meta:editing-duration>PT13H21M12S</meta:editing-duration>
    <meta:editing-cycles>2</meta:editing-cycles>
    <meta:generator>LibreOffice/25.2.2.2$MacOSX_AARCH64 LibreOffice_project/7370d4be9e3cf6031a51beef54ff3bda878e3fac</meta:generator>
    <meta:document-statistic meta:object-count="47"/>
  </office:meta>
</office:document-meta>
</file>