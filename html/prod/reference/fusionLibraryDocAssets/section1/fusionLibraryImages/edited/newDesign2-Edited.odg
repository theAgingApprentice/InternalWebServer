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1A0000021EE21286EF.png" manifest:media-type="image/png"/>
  <manifest:file-entry manifest:full-path="Pictures/10000001000002AC0000033C2808377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5cm" fo:min-width="10.7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288cm" fo:min-width="6.2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2.288cm" fo:min-width="17.538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0.538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8cm" fo:min-width="4.038cm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fill="solid" draw:fill-color="#ff0000" draw:textarea-vertical-align="middle" draw:auto-grow-height="false" fo:min-height="3.954cm" fo:min-width="4.69cm" fo:wrap-option="wrap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2.402cm" fo:min-width="2.3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1cm" fo:min-width="1.90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text-properties fo:color="#ffffff" loext:opacity="100%"/>
    </style:style>
    <style:style style:name="P5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14cm" svg:height="13.091cm" svg:x="1.436cm" svg:y="2.396cm">
          <draw:image xlink:href="Pictures/10000001000002AC0000033C28083775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7.052cm" svg:x="12.5cm" svg:y="2.25cm">
          <draw:image xlink:href="Pictures/100000010000021A0000021EE21286EF.png" xlink:type="simple" xlink:show="embed" xlink:actuate="onLoad" draw:mime-type="image/png">
            <text:p/>
          </draw:image>
        </draw:frame>
        <draw:custom-shape draw:style-name="gr2" draw:text-style-name="P2" draw:layer="layout" svg:width="11.25cm" svg:height="12.75cm" svg:x="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2.75cm" svg:x="12.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25cm" svg:height="12.75cm" svg:x="1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5cm" svg:height="1.25cm" svg:x="12.7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5cm" svg:height="1cm" svg:x="7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189cm" svg:height="4.203cm" draw:transform="rotate (-1.5072663420223) translate (15.695cm 9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7" draw:text-style-name="P3" draw:layer="layout" svg:width="5.189cm" svg:height="4.201cm" draw:transform="rotate (-1.5072663420223) translate (16.943cm 3.054cm)">
          <text:p/>
          <draw:enhanced-geometry svg:viewBox="0 0 21600 21600" draw:text-areas="0 0 21600 21600" draw:mirror-horizontal="fals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g draw:style-name="gr8">
          <draw:custom-shape draw:style-name="gr9" draw:text-style-name="P3" draw:layer="layout" svg:width="4cm" svg:height="3.75cm" svg:x="11.7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407cm" svg:height="2.091cm" svg:x="12.5cm" svg:y="7.471cm">
            <draw:text-box>
              <text:p text:style-name="P4"><text:span text:style-name="T1">OR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17:05:07.558114000</meta:creation-date>
    <dc:date>2026-01-25T17:14:13.552193000</dc:date>
    <meta:editing-duration>PT9M6S</meta:editing-duration>
    <meta:editing-cycles>1</meta:editing-cycles>
    <meta:document-statistic meta:object-count="12"/>
    <meta:generator>LibreOffice/25.2.2.2$MacOSX_AARCH64 LibreOffice_project/7370d4be9e3cf6031a51beef54ff3bda878e3fac</meta:generator>
  </office:meta>
</office:document-meta>
</file>