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113A000006FA13510C56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212cm" svg:stroke-color="#000000" draw:marker-start-width="0.518cm" draw:marker-end-width="0.518cm" draw:fill="none" loext:fill-use-slide-background="false" draw:textarea-horizontal-align="justify" draw:textarea-vertical-align="middle" draw:auto-grow-height="false" fo:min-height="10.288cm" fo:min-width="22.788cm" fo:padding-top="0.231cm" fo:padding-bottom="0.231cm" fo:padding-left="0.356cm" fo:padding-right="0.356cm" loext:decorative="false"/>
    </style:style>
    <style:style style:name="gr4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10.288cm" fo:min-width="3.5cm" fo:padding-top="0.231cm" fo:padding-bottom="0.231cm" fo:padding-left="0.356cm" fo:padding-right="0.356cm" loext:decorative="false"/>
    </style:style>
    <style:style style:name="gr5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1.038cm" fo:min-width="3.722cm" fo:padding-top="0.231cm" fo:padding-bottom="0.231cm" fo:padding-left="0.356cm" fo:padding-right="0.356cm" loext:decorative="false"/>
    </style:style>
    <style:style style:name="gr6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0.788cm" fo:min-width="3.722cm" fo:padding-top="0.231cm" fo:padding-bottom="0.231cm" fo:padding-left="0.356cm" fo:padding-right="0.356cm" loext:decorative="false"/>
    </style:style>
    <style:style style:name="gr7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3.788cm" fo:min-width="3.722cm" fo:padding-top="0.231cm" fo:padding-bottom="0.231cm" fo:padding-left="0.356cm" fo:padding-right="0.356cm" loext:decorative="false"/>
    </style:style>
    <style:style style:name="gr8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3.288cm" fo:min-width="3.722cm" fo:padding-top="0.231cm" fo:padding-bottom="0.231cm" fo:padding-left="0.356cm" fo:padding-right="0.356cm" loext:decorative="false"/>
    </style:style>
    <style:style style:name="gr9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8.788cm" fo:min-width="9.93cm" fo:padding-top="0.231cm" fo:padding-bottom="0.231cm" fo:padding-left="0.356cm" fo:padding-right="0.356cm" loext:decorative="false"/>
    </style:style>
    <style:style style:name="gr10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8.788cm" fo:min-width="3.5cm" fo:padding-top="0.231cm" fo:padding-bottom="0.231cm" fo:padding-left="0.356cm" fo:padding-right="0.356cm" loext:decorative="false"/>
    </style:style>
    <style:style style:name="gr11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1.038cm" fo:min-width="11.26cm" fo:padding-top="0.231cm" fo:padding-bottom="0.231cm" fo:padding-left="0.356cm" fo:padding-right="0.356cm" loext:decorative="false"/>
    </style:style>
    <style:style style:name="gr12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1.038cm" fo:min-width="2.17cm" fo:padding-top="0.231cm" fo:padding-bottom="0.231cm" fo:padding-left="0.356cm" fo:padding-right="0.356cm" loext:decorative="false"/>
    </style:style>
    <style:style style:name="gr13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0.038cm" fo:min-width="3.722cm" fo:padding-top="0.231cm" fo:padding-bottom="0.231cm" fo:padding-left="0.356cm" fo:padding-right="0.356cm" loext:decorative="false"/>
    </style:style>
    <style:style style:name="gr14" style:family="graphic" style:parent-style-name="standard">
      <style:graphic-properties draw:fill="solid" draw:fill-color="#ff0000" draw:textarea-vertical-align="middle" draw:auto-grow-height="false" fo:min-height="0.282cm" fo:min-width="0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1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.25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1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4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loext:graphic-properties draw:fill="none" draw:fill-color="#ffffff"/>
      <style:text-properties fo:color="#ffffff" loext:opacity="100%"/>
    </style:style>
    <style:style style:name="T1" style:family="text">
      <style:text-properties fo:color="#ffffff" loext:opacity="100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23.394cm" svg:height="10.682cm" svg:x="1cm" svg:y="3.818cm">
            <draw:image xlink:href="Pictures/100000010000113A000006FA13510C56.png" xlink:type="simple" xlink:show="embed" xlink:actuate="onLoad" draw:mime-type="image/png">
              <text:p/>
            </draw:image>
          </draw:frame>
          <draw:custom-shape draw:style-name="gr3" draw:text-style-name="P1" draw:layer="layout" svg:width="23.5cm" svg:height="10.75cm" svg:x="1cm" svg:y="3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212cm" svg:height="10.75cm" svg:x="1cm" svg:y="3.7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4.434cm" svg:height="1.5cm" svg:x="5.212cm" svg:y="3.7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4.434cm" svg:height="1.25cm" svg:x="5.212cm" svg:y="5.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4.434cm" svg:height="4.25cm" svg:x="5.212cm" svg:y="6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4.434cm" svg:height="3.75cm" svg:x="5.212cm" svg:y="10.7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0.642cm" svg:height="9.25cm" svg:x="9.646cm" svg:y="5.2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4.212cm" svg:height="9.25cm" svg:x="20.288cm" svg:y="5.2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11.972cm" svg:height="1.5cm" svg:x="9.646cm" svg:y="3.7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.882cm" svg:height="1.5cm" svg:x="21.618cm" svg:y="3.7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4.434cm" svg:height="0.5cm" svg:x="5.212cm" svg:y="3.75cm">
            <text:p/>
            <draw:enhanced-geometry svg:viewBox="0 0 21600 21600" draw:type="rectangle" draw:enhanced-path="M 0 0 L 21600 0 21600 21600 0 21600 0 0 Z N"/>
          </draw:custom-shape>
          <draw:g draw:style-name="gr1">
            <draw:custom-shape draw:style-name="gr14" draw:text-style-name="P2" draw:layer="layout" svg:width="0.664cm" svg:height="0.75cm" svg:x="2.774cm" svg:y="6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3" draw:layer="layout" svg:width="0.756cm" svg:height="0.763cm" svg:x="2.768cm" svg:y="6.5cm">
              <draw:text-box>
                <text:p><text:span text:style-name="T1">1</text:span></text:p>
              </draw:text-box>
            </draw:frame>
          </draw:g>
          <draw:g draw:style-name="gr1">
            <draw:custom-shape draw:style-name="gr14" draw:text-style-name="P2" draw:layer="layout" svg:width="0.665cm" svg:height="0.75cm" svg:x="7.651cm" svg:y="3.7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6" draw:text-style-name="P3" draw:layer="layout" svg:width="0.67cm" svg:height="0.763cm" svg:x="7.646cm" svg:y="3.737cm">
              <draw:text-box>
                <text:p><text:span text:style-name="T1">2</text:span></text:p>
              </draw:text-box>
            </draw:frame>
          </draw:g>
          <draw:g draw:style-name="gr1">
            <draw:custom-shape draw:style-name="gr14" draw:text-style-name="P2" draw:layer="layout" svg:width="0.665cm" svg:height="0.75cm" svg:x="8.765cm" svg:y="4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3" draw:layer="layout" svg:width="0.756cm" svg:height="0.763cm" svg:x="8.759cm" svg:y="4.487cm">
              <draw:text-box>
                <text:p><text:span text:style-name="T1">3</text:span></text:p>
              </draw:text-box>
            </draw:frame>
          </draw:g>
          <draw:g draw:style-name="gr1">
            <draw:custom-shape draw:style-name="gr14" draw:text-style-name="P2" draw:layer="layout" svg:width="0.666cm" svg:height="0.75cm" svg:x="14.961cm" svg:y="4.0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3" draw:layer="layout" svg:width="0.756cm" svg:height="0.763cm" svg:x="14.961cm" svg:y="4cm">
              <draw:text-box>
                <text:p><text:span text:style-name="T1">4</text:span></text:p>
              </draw:text-box>
            </draw:frame>
          </draw:g>
          <draw:g draw:style-name="gr1">
            <draw:custom-shape draw:style-name="gr14" draw:text-style-name="P2" draw:layer="layout" svg:width="0.665cm" svg:height="0.75cm" svg:x="22.732cm" svg:y="4.2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3" draw:layer="layout" svg:width="0.756cm" svg:height="0.763cm" svg:x="22.726cm" svg:y="4.25cm">
              <draw:text-box>
                <text:p><text:span text:style-name="T1">5</text:span></text:p>
              </draw:text-box>
            </draw:frame>
          </draw:g>
          <draw:g draw:style-name="gr1">
            <draw:custom-shape draw:style-name="gr14" draw:text-style-name="P2" draw:layer="layout" svg:width="0.665cm" svg:height="0.75cm" svg:x="7.424cm" svg:y="5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3" draw:layer="layout" svg:width="0.756cm" svg:height="0.763cm" svg:x="7.424cm" svg:y="5.487cm">
              <draw:text-box>
                <text:p><text:span text:style-name="T1">6</text:span></text:p>
              </draw:text-box>
            </draw:frame>
          </draw:g>
          <draw:g draw:style-name="gr1">
            <draw:custom-shape draw:style-name="gr14" draw:text-style-name="P2" draw:layer="layout" svg:width="0.665cm" svg:height="0.75cm" svg:x="14.74cm" svg:y="7.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3" draw:layer="layout" svg:width="0.756cm" svg:height="0.763cm" svg:x="14.74cm" svg:y="7.237cm">
              <draw:text-box>
                <text:p><text:span text:style-name="T1">7</text:span></text:p>
              </draw:text-box>
            </draw:frame>
          </draw:g>
          <draw:g draw:style-name="gr1">
            <draw:custom-shape draw:style-name="gr14" draw:text-style-name="P2" draw:layer="layout" svg:width="0.665cm" svg:height="0.75cm" svg:x="21.84cm" svg:y="7.0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" draw:text-style-name="P3" draw:layer="layout" svg:width="0.756cm" svg:height="0.763cm" svg:x="21.84cm" svg:y="7cm">
              <draw:text-box>
                <text:p><text:span text:style-name="T1">8</text:span></text:p>
              </draw:text-box>
            </draw:frame>
          </draw:g>
          <draw:g draw:style-name="gr1">
            <draw:custom-shape draw:style-name="gr14" draw:text-style-name="P2" draw:layer="layout" svg:width="0.665cm" svg:height="0.75cm" svg:x="6.981cm" svg:y="7.98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8" draw:text-style-name="P3" draw:layer="layout" svg:width="0.67cm" svg:height="0.763cm" svg:x="6.981cm" svg:y="7.987cm">
              <draw:text-box>
                <text:p><text:span text:style-name="T1">9</text:span></text:p>
              </draw:text-box>
            </draw:frame>
          </draw:g>
          <draw:g draw:style-name="gr1">
            <draw:custom-shape draw:style-name="gr14" draw:text-style-name="P2" draw:layer="layout" svg:width="0.664cm" svg:height="0.75cm" svg:x="7.208cm" svg:y="12.2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9" draw:text-style-name="P3" draw:layer="layout" svg:width="1.011cm" svg:height="0.763cm" svg:x="6.986cm" svg:y="12.237cm">
              <draw:text-box>
                <text:p><text:span text:style-name="T1">10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25T16:19:58.750354000</dc:date>
    <meta:editing-duration>PT5M26S</meta:editing-duration>
    <meta:editing-cycles>2</meta:editing-cycles>
    <meta:generator>LibreOffice/25.2.2.2$MacOSX_AARCH64 LibreOffice_project/7370d4be9e3cf6031a51beef54ff3bda878e3fac</meta:generator>
    <meta:document-statistic meta:object-count="43"/>
  </office:meta>
</office:document-meta>
</file>