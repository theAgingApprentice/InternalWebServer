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15000000898BE84B30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995cm, -0.993cm, -18.06cm, -1.64cm)" draw:image-opacity="100%" style:mirror="none" loext:decorative="false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226cm, 23.271cm, 0cm)" draw:image-opacity="100%" style:mirror="none" loext:decorative="false"/>
    </style:style>
    <style:style style:name="gr4" style:family="graphic" style:parent-style-name="standard">
      <style:graphic-properties svg:stroke-width="0.106cm" svg:stroke-color="#ff4000" draw:marker-start-width="0.359cm" draw:marker-end-width="0.359cm" draw:fill="none" loext:fill-use-slide-background="false" draw:textarea-horizontal-align="justify" draw:textarea-vertical-align="middle" draw:auto-grow-height="false" fo:min-height="8.894cm" fo:min-width="12.644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12cm" fo:min-width="1.268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textarea-horizontal-align="justify" draw:textarea-vertical-align="middle" draw:auto-grow-height="false" fo:min-height="0.282cm" fo:min-width="0.032cm" fo:padding-top="0.177cm" fo:padding-bottom="0.177cm" fo:padding-left="0.302cm" fo:padding-right="0.302cm" loext:decorative="false"/>
    </style:style>
    <style:style style:name="gr8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49cm" svg:height="14.749cm" svg:x="0.75cm" svg:y="8.75cm">
          <draw:image xlink:href="Pictures/100000010000115000000898BE84B305.png" xlink:type="simple" xlink:show="embed" xlink:actuate="onLoad" draw:mime-type="image/png">
            <text:p/>
          </draw:image>
        </draw:frame>
        <draw:line draw:style-name="gr2" draw:text-style-name="P1" draw:layer="layout" svg:x1="7cm" svg:y1="13.75cm" svg:x2="4cm" svg:y2="10.25cm">
          <text:p/>
        </draw:line>
        <draw:frame draw:style-name="gr3" draw:text-style-name="P1" draw:layer="layout" svg:width="13.073cm" svg:height="9.25cm" svg:x="7cm" svg:y="13.75cm">
          <draw:image xlink:href="Pictures/100000010000115000000898BE84B305.png" xlink:type="simple" xlink:show="embed" xlink:actuate="onLoad" draw:mime-type="image/png">
            <text:p/>
          </draw:image>
        </draw:frame>
        <draw:custom-shape draw:style-name="gr4" draw:text-style-name="P1" draw:layer="layout" svg:width="13.25cm" svg:height="9.25cm" svg:x="7cm" svg:y="13.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31cm" svg:height="0.962cm" svg:x="6.875cm" svg:y="12.788cm">
          <draw:text-box>
            <text:p><text:span text:style-name="T1">Zoom In</text:span></text:p>
          </draw:text-box>
        </draw:frame>
        <draw:custom-shape draw:style-name="gr6" draw:text-style-name="P1" draw:layer="layout" svg:width="2.5cm" svg:height="1.5cm" svg:x="12.7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75cm" svg:x="18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5cm" svg:y1="11.25cm" svg:x2="18.5cm" svg:y2="10cm">
          <text:p/>
        </draw:line>
        <draw:line draw:style-name="gr9" draw:text-style-name="P1" draw:layer="layout" svg:x1="16.25cm" svg:y1="13cm" svg:x2="14.75cm" svg:y2="15.25cm">
          <text:p/>
        </draw:line>
        <draw:frame draw:style-name="gr5" draw:text-style-name="P2" draw:layer="layout" svg:width="9.185cm" svg:height="0.962cm" svg:x="11cm" svg:y="11.75cm">
          <draw:text-box>
            <text:p><text:span text:style-name="T1">Click one to create new projec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1:07:13.954919000</meta:creation-date>
    <dc:date>2026-01-24T12:34:37.025072000</dc:date>
    <meta:editing-duration>P5DT7H44M20S</meta:editing-duration>
    <meta:editing-cycles>2</meta:editing-cycles>
    <meta:generator>LibreOffice/25.2.2.2$MacOSX_AARCH64 LibreOffice_project/7370d4be9e3cf6031a51beef54ff3bda878e3fac</meta:generator>
    <meta:document-statistic meta:object-count="10"/>
  </office:meta>
</office:document-meta>
</file>