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2E00000024EB6CA9007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212cm" svg:stroke-color="#000000" draw:marker-start-width="0.518cm" draw:marker-end-width="0.518cm" draw:fill="none" loext:fill-use-slide-background="false" draw:textarea-horizontal-align="justify" draw:textarea-vertical-align="middle" draw:auto-grow-height="false" fo:min-height="10cm" fo:min-width="12.5cm" fo:padding-top="0.231cm" fo:padding-bottom="0.231cm" fo:padding-left="0.356cm" fo:padding-right="0.356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ff0000" loext:opacity="100%"/>
    </style:style>
    <style:style style:name="T1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981cm" svg:height="10.406cm" svg:x="4.304cm" svg:y="8.766cm">
          <draw:image xlink:href="Pictures/10000001000002E00000024EB6CA9007.png" xlink:type="simple" xlink:show="embed" xlink:actuate="onLoad" draw:mime-type="image/png">
            <text:p/>
          </draw:image>
        </draw:frame>
        <draw:custom-shape draw:style-name="gr2" draw:text-style-name="P2" draw:layer="layout" svg:width="13cm" svg:height="10.25cm" svg:x="4.25cm" svg:y="8.7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173cm" svg:height="0.962cm" svg:x="10.827cm" svg:y="17.75cm">
          <draw:text-box>
            <text:p><text:span text:style-name="T1">Package File</text:span></text:p>
          </draw:text-box>
        </draw:frame>
        <draw:frame draw:style-name="gr3" draw:text-style-name="P3" draw:layer="layout" svg:width="3.643cm" svg:height="0.962cm" svg:x="11.25cm" svg:y="14.75cm">
          <draw:text-box>
            <text:p><text:span text:style-name="T1">Library File</text:span></text:p>
          </draw:text-box>
        </draw:frame>
        <draw:frame draw:style-name="gr3" draw:text-style-name="P3" draw:layer="layout" svg:width="2.513cm" svg:height="0.962cm" svg:x="12.5cm" svg:y="11.75cm">
          <draw:text-box>
            <text:p><text:span text:style-name="T1">3D Fil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1-25T21:10:31.113533000</dc:date>
    <meta:editing-duration>PT2M35S</meta:editing-duration>
    <meta:editing-cycles>1</meta:editing-cycles>
    <meta:document-statistic meta:object-count="5"/>
    <meta:generator>LibreOffice/25.2.2.2$MacOSX_AARCH64 LibreOffice_project/7370d4be9e3cf6031a51beef54ff3bda878e3fac</meta:generator>
  </office:meta>
</office:document-meta>
</file>