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4A000001C0F9E1BAAE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6cm" fo:min-width="14.5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51cm" svg:height="7.901cm" svg:x="3.369cm" svg:y="10.019cm">
          <draw:image xlink:href="Pictures/100000010000034A000001C0F9E1BAAE.png" xlink:type="simple" xlink:show="embed" xlink:actuate="onLoad" draw:mime-type="image/png">
            <text:p/>
          </draw:image>
        </draw:frame>
        <draw:custom-shape draw:style-name="gr2" draw:text-style-name="P2" draw:layer="layout" svg:width="15cm" svg:height="6.25cm" svg:x="3.25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619cm" svg:height="0.962cm" svg:x="14.5cm" svg:y="12.25cm">
          <draw:text-box>
            <text:p><text:span text:style-name="T1">Symbol</text:span></text:p>
          </draw:text-box>
        </draw:frame>
        <draw:frame draw:style-name="gr3" draw:text-style-name="P3" draw:layer="layout" svg:width="3.785cm" svg:height="0.962cm" svg:x="14.5cm" svg:y="11.288cm">
          <draw:text-box>
            <text:p><text:span text:style-name="T1">Component</text:span></text:p>
          </draw:text-box>
        </draw:frame>
        <draw:frame draw:style-name="gr3" draw:text-style-name="P3" draw:layer="layout" svg:width="3.008cm" svg:height="0.962cm" svg:x="14.492cm" svg:y="13.25cm">
          <draw:text-box>
            <text:p><text:span text:style-name="T1">Footprint</text:span></text:p>
          </draw:text-box>
        </draw:frame>
        <draw:frame draw:style-name="gr3" draw:text-style-name="P3" draw:layer="layout" svg:width="2.973cm" svg:height="0.962cm" svg:x="14.527cm" svg:y="14.25cm">
          <draw:text-box>
            <text:p><text:span text:style-name="T1">Package</text:span></text:p>
          </draw:text-box>
        </draw:frame>
        <draw:line draw:style-name="gr4" draw:text-style-name="P2" draw:layer="layout" svg:x1="14cm" svg:y1="11.75cm" svg:x2="8.25cm" svg:y2="11.75cm">
          <text:p/>
        </draw:line>
        <draw:line draw:style-name="gr4" draw:text-style-name="P2" draw:layer="layout" svg:x1="14cm" svg:y1="12.75cm" svg:x2="9cm" svg:y2="12.75cm">
          <text:p/>
        </draw:line>
        <draw:line draw:style-name="gr4" draw:text-style-name="P2" draw:layer="layout" svg:x1="14cm" svg:y1="13.75cm" svg:x2="9.75cm" svg:y2="13.75cm">
          <text:p/>
        </draw:line>
        <draw:line draw:style-name="gr4" draw:text-style-name="P2" draw:layer="layout" svg:x1="14cm" svg:y1="14.75cm" svg:x2="10.25cm" svg:y2="14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21:25:42.716303000</dc:date>
    <meta:editing-duration>PT3M22S</meta:editing-duration>
    <meta:editing-cycles>1</meta:editing-cycles>
    <meta:document-statistic meta:object-count="10"/>
    <meta:generator>LibreOffice/25.2.2.2$MacOSX_AARCH64 LibreOffice_project/7370d4be9e3cf6031a51beef54ff3bda878e3fac</meta:generator>
  </office:meta>
</office:document-meta>
</file>