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officeooo:paragraph-rsid="0003cc96"/>
    </style:style>
    <style:style style:name="P2"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fo:color="#1b1c1d" loext:opacity="100%" style:font-name="Google Sans Text" officeooo:paragraph-rsid="0003cc96"/>
    </style:style>
    <style:style style:name="P3" style:family="paragraph" style:parent-style-name="Heading_20_2">
      <style:paragraph-properties fo:margin-top="0cm" fo:margin-bottom="0.499cm" style:contextual-spacing="false" fo:line-height="114%"/>
      <style:text-properties fo:color="#1b1c1d" loext:opacity="100%" style:font-name="Google Sans Text"/>
    </style:style>
    <style:style style:name="P4" style:family="paragraph" style:parent-style-name="Text_20_body" style:list-style-name="L1">
      <style:paragraph-properties fo:line-height="114%"/>
      <style:text-properties fo:color="#1b1c1d" loext:opacity="100%" style:font-name="Google Sans Text"/>
    </style:style>
    <style:style style:name="P5" style:family="paragraph" style:parent-style-name="Text_20_body">
      <style:paragraph-properties fo:line-height="114%"/>
      <style:text-properties fo:color="#1b1c1d" loext:opacity="100%" style:font-name="Google Sans Text"/>
    </style:style>
    <style:style style:name="P6" style:family="paragraph" style:parent-style-name="Text_20_body" style:list-style-name="L2">
      <style:paragraph-properties fo:line-height="114%"/>
      <style:text-properties fo:color="#1b1c1d" loext:opacity="100%" style:font-name="Google Sans Text"/>
    </style:style>
    <style:style style:name="P7" style:family="paragraph" style:parent-style-name="Heading_20_3">
      <style:paragraph-properties fo:margin-top="0cm" fo:margin-bottom="0.499cm" style:contextual-spacing="false" fo:line-height="114%"/>
      <style:text-properties fo:color="#1b1c1d" loext:opacity="100%" style:font-name="Google Sans Text"/>
    </style:style>
    <style:style style:name="P8" style:family="paragraph" style:parent-style-name="Preformatted_20_Text">
      <style:paragraph-properties fo:margin-top="0cm" fo:margin-bottom="0.499cm" style:contextual-spacing="false" fo:line-height="114%"/>
      <style:text-properties fo:color="#1b1c1d" loext:opacity="100%" style:font-name="Google Sans Text"/>
    </style:style>
    <style:style style:name="P9" style:family="paragraph" style:parent-style-name="Text_20_body" style:list-style-name="L3">
      <style:paragraph-properties fo:line-height="114%"/>
      <style:text-properties fo:color="#1b1c1d" loext:opacity="100%" style:font-name="Google Sans Text"/>
    </style:style>
    <style:style style:name="P10" style:family="paragraph" style:parent-style-name="Text_20_body" style:list-style-name="L4">
      <style:paragraph-properties fo:line-height="114%"/>
      <style:text-properties fo:color="#1b1c1d" loext:opacity="100%" style:font-name="Google Sans Text"/>
    </style:style>
    <style:style style:name="P11" style:family="paragraph" style:parent-style-name="Preformatted_20_Text" style:list-style-name="L4">
      <style:paragraph-properties fo:line-height="114%"/>
      <style:text-properties fo:color="#1b1c1d" loext:opacity="100%" style:font-name="Google Sans Text"/>
    </style:style>
    <style:style style:name="P12" style:family="paragraph" style:parent-style-name="Preformatted_20_Text" style:list-style-name="L4">
      <style:paragraph-properties fo:margin-top="0cm" fo:margin-bottom="0.499cm" style:contextual-spacing="false" fo:line-height="114%"/>
      <style:text-properties fo:color="#1b1c1d" loext:opacity="100%" style:font-name="Google Sans Text"/>
    </style:style>
    <style:style style:name="P13" style:family="paragraph" style:parent-style-name="Text_20_body" style:list-style-name="L5">
      <style:paragraph-properties fo:line-height="114%"/>
      <style:text-properties fo:color="#1b1c1d" loext:opacity="100%" style:font-name="Google Sans Text"/>
    </style:style>
    <style:style style:name="P14" style:family="paragraph" style:parent-style-name="Preformatted_20_Text" style:list-style-name="L5">
      <style:paragraph-properties fo:margin-top="0cm" fo:margin-bottom="0.499cm" style:contextual-spacing="false" fo:line-height="114%"/>
      <style:text-properties fo:color="#1b1c1d" loext:opacity="100%" style:font-name="Google Sans Text"/>
    </style:style>
    <style:style style:name="P15" style:family="paragraph" style:parent-style-name="Preformatted_20_Text" style:list-style-name="L5">
      <style:paragraph-properties fo:line-height="114%"/>
      <style:text-properties fo:color="#1b1c1d" loext:opacity="100%" style:font-name="Google Sans 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buntu Server Console Power Management</text:h>
      <text:p text:style-name="P2"/>
      <text:h text:style-name="P3" text:outline-level="2">Server Details</text:h>
      <text:list text:style-name="L1">
        <text:list-item>
          <text:p text:style-name="P4"><text:span text:style-name="Strong_20_Emphasis">Hostname:</text:span> <text:span text:style-name="Source_20_Text">imac-server</text:span></text:p>
        </text:list-item>
        <text:list-item>
          <text:p text:style-name="P4"><text:span text:style-name="Strong_20_Emphasis">Operating System:</text:span> Ubuntu 24.04.2 LTS (Noble Numbat)</text:p>
        </text:list-item>
        <text:list-item>
          <text:p text:style-name="P4"><text:span text:style-name="Strong_20_Emphasis">Role:</text:span> Headless server (no graphical desktop environment) with a directly connected monitor for console access.</text:p>
        </text:list-item>
      </text:list>
      <text:h text:style-name="P3" text:outline-level="2">Objective</text:h>
      <text:p text:style-name="P5">To configure the <text:span text:style-name="Source_20_Text">imac-server</text:span>'s physical monitor to automatically power off after 5 minutes of inactivity, and to re-activate upon keyboard input, while ensuring the server remains fully operational and responsive (e.g., via SSH).</text:p>
      <text:h text:style-name="P3" text:outline-level="2">Problem Statement</text:h>
      <text:p text:style-name="P5">Initially, the <text:span text:style-name="Source_20_Text">consoleblank=300</text:span> kernel parameter was set in <text:span text:style-name="Source_20_Text">/etc/default/grub</text:span>, intended to blank the text console after 300 seconds (5 minutes). However, the physical monitor remained on, displaying a blank screen but not truly entering a power-saving state, consuming unnecessary power. Manual attempts to control the display's power state were met with various errors depending on the execution context.</text:p>
      <text:h text:style-name="P3" text:outline-level="2">Root Cause Analysis</text:h>
      <text:p text:style-name="P5">The core issue stemmed from the distinction between kernel console blanking and true display power management (DPMS) at the hardware level, as well as the execution context of the commands.</text:p>
      <text:list text:style-name="L2">
        <text:list-item>
          <text:p text:style-name="P6"><text:span text:style-name="Strong_20_Emphasis"><text:span text:style-name="Source_20_Text">consoleblank</text:span></text:span><text:span text:style-name="Strong_20_Emphasis"> Limitation:</text:span> While <text:span text:style-name="Source_20_Text">consoleblank=300</text:span> correctly tells the kernel to stop drawing to the console after inactivity (effectively "blanking" the screen), it does not always send a DPMS signal to the monitor to power it down. The monitor might still receive a blank video signal, keeping its backlight on.</text:p>
        </text:list-item>
        <text:list-item>
          <text:p text:style-name="P6"><text:span text:style-name="Strong_20_Emphasis"><text:span text:style-name="Source_20_Text">setterm</text:span></text:span><text:span text:style-name="Strong_20_Emphasis"> Tooling:</text:span> The <text:span text:style-name="Source_20_Text">setterm</text:span> utility is designed for console-specific operations, including <text:span text:style-name="Source_20_Text">DPMS</text:span> control.</text:p>
          <text:list>
            <text:list-item>
              <text:p text:style-name="P6"><text:span text:style-name="Strong_20_Emphasis">"Command not found":</text:span> Initially, <text:span text:style-name="Source_20_Text">setterm</text:span> was not installed on the minimal server setup, requiring installation of the <text:span text:style-name="Source_20_Text">kbd</text:span> package.</text:p>
            </text:list-item>
            <text:list-item>
              <text:p text:style-name="P6"><text:soft-page-break/><text:span text:style-name="Strong_20_Emphasis"><text:span text:style-name="Source_20_Text">setterm: argument error: auto</text:span></text:span><text:span text:style-name="Strong_20_Emphasis">:</text:span> The <text:span text:style-name="Source_20_Text">-powersave</text:span> option for <text:span text:style-name="Source_20_Text">setterm</text:span> expects specific arguments (<text:span text:style-name="Source_20_Text">on</text:span>, <text:span text:style-name="Source_20_Text">off</text:span>, <text:span text:style-name="Source_20_Text">vsync</text:span>, <text:span text:style-name="Source_20_Text">hsync</text:span>), not <text:span text:style-name="Source_20_Text">auto</text:span>. This was corrected to <text:span text:style-name="Source_20_Text">-powersave on</text:span>.</text:p>
            </text:list-item>
            <text:list-item>
              <text:p text:style-name="P6"><text:span text:style-name="Strong_20_Emphasis">Execution Context (</text:span><text:span text:style-name="Strong_20_Emphasis"><text:span text:style-name="Source_20_Text">SSH</text:span></text:span><text:span text:style-name="Strong_20_Emphasis"> vs. Physical Console):</text:span> <text:span text:style-name="Source_20_Text">setterm</text:span> requires direct access to a physical console (TTY) device. When run over an SSH session (which uses a pseudo-terminal like <text:span text:style-name="Source_20_Text">xterm-256color</text:span>), it reports errors like "terminal xterm-256color does not support --blank" or "Inappropriate ioctl for device" because it cannot interact with the actual hardware display.</text:p>
            </text:list-item>
            <text:list-item>
              <text:p text:style-name="P6"><text:span text:style-name="Strong_20_Emphasis">"Inappropriate ioctl for device" (Persistent):</text:span> Even when run from the physical console, <text:span text:style-name="Source_20_Text">setterm</text:span> might report this error. This indicates that the specific low-level system call (<text:span text:style-name="Source_20_Text">ioctl</text:span>) <text:span text:style-name="Source_20_Text">setterm</text:span> uses to command DPMS might not be directly supported or exposed by the graphics driver in text mode. However, in this specific server's case, despite the error, the screen <text:span text:style-name="Emphasis">did</text:span> power off, implying the command still triggered the desired behavior through other underlying mechanisms or side effects. This error was ultimately deemed ignorable as long as the functionality was achieved.</text:p>
            </text:list-item>
          </text:list>
        </text:list-item>
        <text:list-item>
          <text:p text:style-name="P6"><text:span text:style-name="Strong_20_Emphasis"><text:span text:style-name="Source_20_Text">systemd</text:span></text:span><text:span text:style-name="Strong_20_Emphasis"> Service Context:</text:span> When attempting to automate <text:span text:style-name="Source_20_Text">setterm</text:span> at boot using a <text:span text:style-name="Source_20_Text">systemd</text:span> service:</text:p>
          <text:list>
            <text:list-item>
              <text:p text:style-name="P6"><text:span text:style-name="Strong_20_Emphasis"><text:span text:style-name="Source_20_Text">setterm: $TERM is not defined</text:span></text:span><text:span text:style-name="Strong_20_Emphasis">:</text:span> Services run by <text:span text:style-name="Source_20_Text">systemd</text:span> typically have a minimal environment and are not associated with a specific terminal, hence the <text:span text:style-name="Source_20_Text">TERM</text:span> variable (which defines the terminal type, e.g., <text:span text:style-name="Source_20_Text">linux</text:span> for a console) is not set. <text:span text:style-name="Source_20_Text">setterm</text:span> requires <text:span text:style-name="Source_20_Text">TERM</text:span> to be defined to function correctly.</text:p>
            </text:list-item>
          </text:list>
        </text:list-item>
      </text:list>
      <text:h text:style-name="P3" text:outline-level="2">Solution Implemented</text:h>
      <text:p text:style-name="P5">The solution involved creating a <text:span text:style-name="Source_20_Text">systemd</text:span> service to execute the <text:span text:style-name="Source_20_Text">setterm</text:span> command at boot, specifically directing it to operate on the physical console and providing the necessary environment variables.</text:p>
      <text:h text:style-name="P7" text:outline-level="3">1. Console Power Management Command</text:h>
      <text:p text:style-name="P5">The command used to control the display's power state is:</text:p>
      <text:p text:style-name="P8"><text:span text:style-name="Source_20_Text">/usr/bin/setterm -blank 5 -powerdown 5 -powersave on</text:span></text:p>
      <text:list text:style-name="L3">
        <text:list-item>
          <text:p text:style-name="P9"><text:span text:style-name="Source_20_Text">-blank 5</text:span>: Sets the console blanking time to 5 minutes (300 seconds). This clears the text from the screen.</text:p>
        </text:list-item>
        <text:list-item>
          <text:p text:style-name="P9"><text:span text:style-name="Source_20_Text">-powerdown 5</text:span>: Attempts to send a DPMS power-down signal to the monitor after 5 minutes of inactivity, instructing the monitor to enter its lowest power state (typically turning off the backlight).</text:p>
        </text:list-item>
        <text:list-item>
          <text:p text:style-name="P9"><text:span text:style-name="Source_20_Text">-powersave on</text:span>: Explicitly enables <text:span text:style-name="Source_20_Text">DPMS</text:span> features for the console.</text:p>
        </text:list-item>
      </text:list>
      <text:h text:style-name="P7" text:outline-level="3"><text:soft-page-break/>2. <text:span text:style-name="Source_20_Text">systemd</text:span> Service for Persistence</text:h>
      <text:p text:style-name="P5">A custom <text:span text:style-name="Source_20_Text">systemd</text:span> service unit was created to ensure this command runs reliably at every boot.</text:p>
      <text:list text:style-name="L4">
        <text:list-item>
          <text:p text:style-name="P10"><text:span text:style-name="Strong_20_Emphasis">Service File Path:</text:span> <text:span text:style-name="Source_20_Text">/etc/systemd/system/console-power-save.service</text:span></text:p>
        </text:list-item>
        <text:list-item>
          <text:p text:style-name="P10"><text:span text:style-name="Strong_20_Emphasis">Service File Content:</text:span></text:p>
          <text:p text:style-name="P11"><text:span text:style-name="Source_20_Text">[Unit]</text:span></text:p>
          <text:p text:style-name="P11"><text:span text:style-name="Source_20_Text">Description=Set Console Power Saving</text:span></text:p>
          <text:p text:style-name="P11"><text:span text:style-name="Source_20_Text">After=multi-user.target</text:span></text:p>
          <text:p text:style-name="P11"/>
          <text:p text:style-name="P11"><text:span text:style-name="Source_20_Text">[Service]</text:span></text:p>
          <text:p text:style-name="P11"><text:span text:style-name="Source_20_Text">Type=oneshot</text:span></text:p>
          <text:p text:style-name="P11"><text:span text:style-name="Source_20_Text">ExecStart=/usr/bin/setterm -blank 5 -powerdown 5 -powersave on &lt; /dev/tty0 &gt; /dev/tty0</text:span></text:p>
          <text:p text:style-name="P11"><text:span text:style-name="Source_20_Text">Environment="TERM=linux"</text:span></text:p>
          <text:p text:style-name="P11"><text:span text:style-name="Source_20_Text">StandardOutput=journal</text:span></text:p>
          <text:p text:style-name="P11"><text:span text:style-name="Source_20_Text">StandardError=journal</text:span></text:p>
          <text:p text:style-name="P11"/>
          <text:p text:style-name="P11"><text:span text:style-name="Source_20_Text">[Install]</text:span></text:p>
          <text:p text:style-name="P12"><text:span text:style-name="Source_20_Text">WantedBy=multi-user.target</text:span></text:p>
        </text:list-item>
        <text:list-item>
          <text:p text:style-name="P10"><text:span text:style-name="Strong_20_Emphasis">Explanation of </text:span><text:span text:style-name="Strong_20_Emphasis"><text:span text:style-name="Source_20_Text">systemd</text:span></text:span><text:span text:style-name="Strong_20_Emphasis"> Configuration:</text:span></text:p>
          <text:list>
            <text:list-item>
              <text:p text:style-name="P10"><text:span text:style-name="Strong_20_Emphasis"><text:span text:style-name="Source_20_Text">[Unit]</text:span></text:span><text:span text:style-name="Strong_20_Emphasis"> section:</text:span></text:p>
              <text:list>
                <text:list-item>
                  <text:p text:style-name="P10"><text:span text:style-name="Source_20_Text">Description</text:span>: A human-readable description of the service.</text:p>
                </text:list-item>
                <text:list-item>
                  <text:p text:style-name="P10"><text:span text:style-name="Source_20_Text">After=multi-user.target</text:span>: Ensures this service starts <text:span text:style-name="Emphasis">after</text:span> the system has reached the multi-user runlevel, meaning the console and other essential services are fully initialized.</text:p>
                </text:list-item>
              </text:list>
            </text:list-item>
            <text:list-item>
              <text:p text:style-name="P10"><text:span text:style-name="Strong_20_Emphasis"><text:span text:style-name="Source_20_Text">[Service]</text:span></text:span><text:span text:style-name="Strong_20_Emphasis"> section:</text:span></text:p>
              <text:list>
                <text:list-item>
                  <text:p text:style-name="P10"><text:span text:style-name="Source_20_Text">Type=oneshot</text:span>: Indicates that the service runs a command once and then exits.</text:p>
                </text:list-item>
                <text:list-item>
                  <text:p text:style-name="P10"><text:span text:style-name="Source_20_Text">ExecStart=/usr/bin/setterm ... &lt; /dev/tty0 &gt; /dev/tty0</text:span>: This is the core command. The redirection (<text:span text:style-name="Source_20_Text">&lt; /dev/tty0 &gt; /dev/tty0</text:span>) is crucial. It forces <text:span text:style-name="Source_20_Text">setterm</text:span> to operate directly on <text:span text:style-name="Source_20_Text">/dev/tty0</text:span> (the primary virtual console) rather than the <text:span text:style-name="Source_20_Text">systemd</text:span> service's default environment, which lacks a direct terminal connection.</text:p>
                </text:list-item>
                <text:list-item>
                  <text:p text:style-name="P10"><text:span text:style-name="Source_20_Text">Environment="TERM=linux"</text:span>: This line explicitly sets the <text:span text:style-name="Source_20_Text">TERM</text:span> environment variable to <text:span text:style-name="Source_20_Text">linux</text:span>, which is the standard terminal type for a physical Linux console. <text:span text:style-name="Source_20_Text">setterm</text:span> requires this variable to be defined to correctly interact with the console.</text:p>
                </text:list-item>
                <text:list-item>
                  <text:p text:style-name="P10"><text:soft-page-break/><text:span text:style-name="Source_20_Text">StandardOutput=journal</text:span> and <text:span text:style-name="Source_20_Text">StandardError=journal</text:span>: These directives ensure any output or errors generated by the <text:span text:style-name="Source_20_Text">setterm</text:span> command are logged to the systemd journal, which is invaluable for debugging (e.g., seeing the "Inappropriate ioctl" message).</text:p>
                </text:list-item>
              </text:list>
            </text:list-item>
            <text:list-item>
              <text:p text:style-name="P10"><text:span text:style-name="Strong_20_Emphasis"><text:span text:style-name="Source_20_Text">[Install]</text:span></text:span><text:span text:style-name="Strong_20_Emphasis"> section:</text:span></text:p>
              <text:list>
                <text:list-item>
                  <text:p text:style-name="P10"><text:span text:style-name="Source_20_Text">WantedBy=multi-user.target</text:span>: Defines that this service should be enabled to start when the system enters the <text:span text:style-name="Source_20_Text">multi-user.target</text:span> state (the normal server boot process).</text:p>
                </text:list-item>
              </text:list>
            </text:list-item>
          </text:list>
        </text:list-item>
      </text:list>
      <text:h text:style-name="P3" text:outline-level="2">Verification and Management</text:h>
      <text:p text:style-name="P5">After implementing the solution, the following steps confirm its success and allow for future management:</text:p>
      <text:list text:style-name="L5">
        <text:list-item>
          <text:p text:style-name="P13"><text:span text:style-name="Strong_20_Emphasis">Reload </text:span><text:span text:style-name="Strong_20_Emphasis"><text:span text:style-name="Source_20_Text">systemd</text:span></text:span><text:span text:style-name="Strong_20_Emphasis"> Configuration:</text:span></text:p>
          <text:p text:style-name="P14"><text:span text:style-name="Source_20_Text">sudo systemctl daemon-reload</text:span></text:p>
          <text:p text:style-name="P13">(Required after any changes to a <text:span text:style-name="Source_20_Text">.service</text:span> file).</text:p>
        </text:list-item>
        <text:list-item>
          <text:p text:style-name="P13"><text:span text:style-name="Strong_20_Emphasis">Enable and Start the Service:</text:span></text:p>
          <text:p text:style-name="P15"><text:span text:style-name="Source_20_Text">sudo systemctl enable console-power-save.service</text:span></text:p>
          <text:p text:style-name="P14"><text:span text:style-name="Source_20_Text">sudo systemctl start console-power-save.service</text:span></text:p>
          <text:p text:style-name="P13">(Enables it for boot and starts it immediately).</text:p>
        </text:list-item>
        <text:list-item>
          <text:p text:style-name="P13"><text:span text:style-name="Strong_20_Emphasis">Reboot the Server:</text:span></text:p>
          <text:p text:style-name="P14"><text:span text:style-name="Source_20_Text">sudo reboot</text:span></text:p>
          <text:p text:style-name="P13">(To test persistence on boot).</text:p>
        </text:list-item>
        <text:list-item>
          <text:p text:style-name="P13"><text:span text:style-name="Strong_20_Emphasis">Verify Status:</text:span></text:p>
          <text:p text:style-name="P15"><text:span text:style-name="Source_20_Text">systemctl status console-power-save.service</text:span></text:p>
          <text:p text:style-name="P14"><text:span text:style-name="Source_20_Text">journalctl -xeu console-power-save.service</text:span></text:p>
          <text:p text:style-name="P13">(Look for <text:span text:style-name="Source_20_Text">Active: inactive (dead)</text:span> and <text:span text:style-name="Source_20_Text">code=exited, status=0/SUCCESS</text:span> in <text:span text:style-name="Source_20_Text">systemctl status</text:span>. In <text:span text:style-name="Source_20_Text">journalctl</text:span>, you might still see the "Inappropriate ioctl" warning, but the key is that the service finishes successfully and the monitor powers off).</text:p>
        </text:list-item>
        <text:list-item>
          <text:p text:style-name="P13"><text:span text:style-name="Strong_20_Emphasis">Observe Physical Monitor:</text:span> Confirm that after 5 minutes of inactivity, the monitor powers off, and pressing a key on the console keyboard reactivates it.</text:p>
        </text:list-item>
      </text:list>
      <text:h text:style-name="P3" text:outline-level="2"><text:soft-page-break/>Conclusion</text:h>
      <text:p text:style-name="P5">The <text:span text:style-name="Source_20_Text">imac-server</text:span>'s console display is now configured to automatically power down after 5 minutes of inactivity using a <text:span text:style-name="Source_20_Text">systemd</text:span> service that executes <text:span text:style-name="Source_20_Text">setterm</text:span> with appropriate console redirection and environment variables. The server remains fully operational, and the monitor wakes upon user interaction. The "Inappropriate ioctl for device" error can be safely ignored as the desired functionality is achieve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3T00:58:09.174484000</meta:creation-date>
    <dc:date>2025-07-03T01:03:30.517997000</dc:date>
    <meta:editing-duration>PT5M21S</meta:editing-duration>
    <meta:editing-cycles>1</meta:editing-cycles>
    <meta:document-statistic meta:table-count="0" meta:image-count="0" meta:object-count="0" meta:page-count="5" meta:paragraph-count="74" meta:word-count="1047" meta:character-count="7151" meta:non-whitespace-character-count="6222"/>
    <meta:generator>LibreOffice/25.2.2.2$MacOSX_AARCH64 LibreOffice_project/7370d4be9e3cf6031a51beef54ff3bda878e3fac</meta:generator>
  </office:meta>
</office:document-meta>
</file>