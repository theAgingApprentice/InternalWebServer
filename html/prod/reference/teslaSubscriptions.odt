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59cm" table:align="left" fo:background-color="transparent">
        <style:background-image/>
      </style:table-properties>
    </style:style>
    <style:style style:name="Table1.A" style:family="table-column">
      <style:table-column-properties style:column-width="3.434cm"/>
    </style:style>
    <style:style style:name="Table1.B" style:family="table-column">
      <style:table-column-properties style:column-width="3.277cm"/>
    </style:style>
    <style:style style:name="Table1.C" style:family="table-column">
      <style:table-column-properties style:column-width="10.878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1.C1" style:family="table-cell">
      <style:table-cell-properties style:vertical-align="middle" fo:background-color="transparent" fo:padding="0.097cm" fo:border="0.5pt solid #000000">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 style:family="table">
      <style:table-properties style:width="17.59cm" table:align="left" fo:background-color="transparent">
        <style:background-image/>
      </style:table-properties>
    </style:style>
    <style:style style:name="Table2.A" style:family="table-column">
      <style:table-column-properties style:column-width="3.909cm"/>
    </style:style>
    <style:style style:name="Table2.B" style:family="table-column">
      <style:table-column-properties style:column-width="13.681cm"/>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B1" style:family="table-cell">
      <style:table-cell-properties style:vertical-align="middle" fo:background-color="transparent" fo:padding="0.097cm" fo:border="0.5pt solid #000000">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B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2" style:family="paragraph" style:parent-style-name="Table_20_Heading">
      <style:paragraph-properties fo:margin-left="0cm" fo:margin-right="0cm" fo:text-indent="0cm" style:auto-text-indent="false"/>
      <style:text-properties fo:color="#000000" loext:opacity="100%" style:font-name="sans-serif" fo:font-weight="bold" fo:background-color="transparent"/>
    </style:style>
    <style:style style:name="P3" style:family="paragraph" style:parent-style-name="Table_20_Contents">
      <style:paragraph-properties fo:margin-left="0cm" fo:margin-right="0cm" fo:text-indent="0cm" style:auto-text-indent="false"/>
      <style:text-properties fo:color="#000000" loext:opacity="100%" style:font-name="sans-serif" fo:background-color="transparent"/>
    </style:style>
    <style:style style:name="P4"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5"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 style:family="paragraph" style:parent-style-name="Standard">
      <style:paragraph-properties fo:margin-left="0cm" fo:margin-right="0cm" fo:text-indent="0cm" style:auto-text-indent="false" style:writing-mode="lr-tb"/>
      <style:text-properties fo:color="#000000" loext:opacity="100%" style:font-name="sans-serif" officeooo:paragraph-rsid="001f2ca5" fo:background-color="transparent"/>
    </style:style>
    <style:style style:name="P7" style:family="paragraph" style:parent-style-name="Table_20_Heading">
      <style:paragraph-properties fo:margin-left="0cm" fo:margin-right="0cm" fo:text-indent="0cm" style:auto-text-indent="false"/>
      <style:text-properties fo:color="#000000" loext:opacity="100%" style:font-name="sans-serif" fo:font-size="11pt" fo:font-weight="bold" fo:background-color="transparent" style:font-size-asian="11pt" style:font-size-complex="11pt"/>
    </style:style>
    <style:style style:name="P8" style:family="paragraph" style:parent-style-name="Table_20_Contents">
      <style:paragraph-properties fo:margin-left="0cm" fo:margin-right="0cm" fo:text-indent="0cm" style:auto-text-indent="false"/>
      <style:text-properties fo:color="#000000" loext:opacity="100%" style:font-name="sans-serif" fo:font-size="11pt" fo:background-color="transparent" style:font-size-asian="11pt" style:font-size-complex="11pt"/>
    </style:style>
    <style:style style:name="P9"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T1" style:family="text">
      <style:text-properties officeooo:rsid="001f2ca5"/>
    </style:style>
    <style:style style:name="T2" style:family="text">
      <style:text-properties fo:color="#000000" loext:opacity="100%" style:font-name="sans-serif" fo:font-weight="bold" style:font-name-asian="sans-serif" style:font-weight-asian="bold" style:font-name-complex="sans-serif" style:font-weight-complex="bold"/>
    </style:style>
    <style:style style:name="T3" style:family="text">
      <style:text-properties fo:color="#000000" loext:opacity="100%" style:font-name="sans-serif" style:font-name-asian="sans-serif" style:font-name-complex="sans-seri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Tesla </text:span>subscriptions, priced in CAD <text:span text:style-name="T1">in January 2026</text:span></text:h>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Name<text:span text:style-name="T2"/></text:p>
          </table:table-cell>
          <table:table-cell table:style-name="Table1.A1" office:value-type="string">
            <text:p text:style-name="P2">Monthly Charge (CAD)<text:span text:style-name="T2"/></text:p>
          </table:table-cell>
          <table:table-cell table:style-name="Table1.C1" office:value-type="string">
            <text:p text:style-name="P2">What's Included<text:span text:style-name="T2"/></text:p>
          </table:table-cell>
        </table:table-row>
        <table:table-row table:style-name="Table1.1">
          <table:table-cell table:style-name="Table1.A2" office:value-type="string">
            <text:p text:style-name="P3">Standard Connectivity<text:span text:style-name="T3"/></text:p>
          </table:table-cell>
          <table:table-cell table:style-name="Table1.A2" office:value-type="string">
            <text:p text:style-name="P3">Free (included)<text:span text:style-name="T3"/></text:p>
          </table:table-cell>
          <table:table-cell table:style-name="Table1.C2" office:value-type="string">
            <text:p text:style-name="P3">Basic maps and navigation (no live traffic visualization), music/media streaming over Bluetooth, software updates over Wi-Fi, and most connectivity features when connected to Wi-Fi. No cellular data access for streaming, browser, or advanced map features.<text:span text:style-name="T3"/></text:p>
          </table:table-cell>
        </table:table-row>
        <table:table-row table:style-name="Table1.1">
          <table:table-cell table:style-name="Table1.A2" office:value-type="string">
            <text:p text:style-name="P3">Premium Connectivity<text:span text:style-name="T3"/></text:p>
          </table:table-cell>
          <table:table-cell table:style-name="Table1.A2" office:value-type="string">
            <text:p text:style-name="P3">$13.99<text:span text:style-name="T3"/></text:p>
          </table:table-cell>
          <table:table-cell table:style-name="Table1.C2" office:value-type="string">
            <text:p text:style-name="P3">Everything in Standard Connectivity, plus cellular-enabled features: live traffic visualization, satellite-view maps, streaming music/media (e.g., Spotify, Netflix over cellular), internet browser, Caraoke, Sentry Mode live view, and more — for use anywhere without relying on Wi-Fi.<text:span text:style-name="T3"/></text:p>
          </table:table-cell>
        </table:table-row>
        <table:table-row table:style-name="Table1.1">
          <table:table-cell table:style-name="Table1.A2" office:value-type="string">
            <text:p text:style-name="P3">Basic Autopilot<text:span text:style-name="T3"/></text:p>
          </table:table-cell>
          <table:table-cell table:style-name="Table1.A2" office:value-type="string">
            <text:p text:style-name="P3">Free (included)<text:span text:style-name="T3"/></text:p>
          </table:table-cell>
          <table:table-cell table:style-name="Table1.C2" office:value-type="string">
            <text:p text:style-name="P3">Core driver-assistance features on all new Model Y vehicles: Traffic-Aware Cruise Control and Autosteer (lane centering on highways/major roads).<text:span text:style-name="T3"/></text:p>
          </table:table-cell>
        </table:table-row>
        <table:table-row table:style-name="Table1.1">
          <table:table-cell table:style-name="Table1.A2" office:value-type="string">
            <text:p text:style-name="P3">Full Self-Driving (FSD) (Supervised)<text:span text:style-name="T3"/></text:p>
          </table:table-cell>
          <table:table-cell table:style-name="Table1.A2" office:value-type="string">
            <text:p text:style-name="P3">$99<text:span text:style-name="T3"/></text:p>
          </table:table-cell>
          <table:table-cell table:style-name="Table1.C2" office:value-type="string">
            <text:p text:style-name="P3">Everything in Basic Autopilot, plus advanced features: Navigate on Autopilot, Auto Lane Change, Autopark, Smart Summon, Traffic Light and Stop Sign Control, and autosteer on city streets (all under active driver supervision). Requires compatible hardware.<text:span text:style-name="T3"/></text:p>
          </table:table-cell>
        </table:table-row>
        <table:table-row table:style-name="Table1.1">
          <table:table-cell table:style-name="Table1.A2" office:value-type="string">
            <text:p text:style-name="P3">Extended Service Agreement (ESA) Subscription<text:span text:style-name="T3"/></text:p>
          </table:table-cell>
          <table:table-cell table:style-name="Table1.A2" office:value-type="string">
            <text:p text:style-name="P3">Varies (~$70–$100+, depending on model/age)<text:span text:style-name="T3"/></text:p>
          </table:table-cell>
          <table:table-cell table:style-name="Table1.C2" office:value-type="string">
            <text:p text:style-name="P3">Optional extended warranty coverage after the standard 4-year/80,000 km Basic Vehicle Limited Warranty expires. Covers most repairs (with $135 deductible per visit), including Roadside Assistance. Flexible month-to-month; max term 48 months/80,000 km additional. Available for out-of-warranty Model Y vehicles.<text:span text:style-name="T3"/></text:p>
          </table:table-cell>
        </table:table-row>
      </table:table>
      <text:p text:style-name="P4"/>
      <text:p text:style-name="P4">Notes:</text:p>
      <text:list text:style-name="L1">
        <text:list-item>
          <text:p text:style-name="P5">Acceleration Boost — Available as a one-time purchase (~$2,700 CAD) for eligible Long Range AWD Model Y variants (improves 0-100 km/h acceleration); not a recurring subscription.</text:p>
        </text:list-item>
        <text:list-item>
          <text:p text:style-name="P5">No other recurring Tesla feature subscriptions (e.g., no separate Supercharging or insurance subscriptions from Tesla directly).</text:p>
        </text:list-item>
        <text:list-item>
          <text:p text:style-name="P5">Third-party services may offer full-vehicle subscriptions, but these are official Tesla options.</text:p>
        </text:list-item>
        <text:list-item>
          <text:p text:style-name="P5">Always check your Tesla app or account for exact eligibility, current pricing, and any trials/complimentary periods. Prices and features can vary by vehicle year and configuration.</text:p>
        </text:list-item>
      </text:list>
      <text:h text:style-name="Heading_20_1" text:outline-level="1"><text:soft-page-break/>Full Self Driving In Detail</text:h>
      <text:p text:style-name="P6">Tesla's Full Self-Driving (FSD) (Supervised) is an advanced driver-assistance system available on the Model Y (and other Teslas) that builds on Basic Autopilot. It provides more automated capabilities on highways, city streets, and residential roads, but requires active driver supervision at all times—you must stay attentive, keep hands on the wheel (monitored by the cabin camera), and be ready to intervene. It does not make the vehicle fully autonomous.</text:p>
      <text:p text:style-name="P6"/>
      <text:p text:style-name="P6">As of January 2026, FSD (Supervised) is powered by the latest software (version 14.x series), trained on billions of miles of real-world data. It handles end-to-end driving: from entering a destination in navigation to arriving, including steering, accelerating, braking, lane changes, turns, and more. Features continue to improve via over-the-air updates. Key Features of FSD (Supervised)</text:p>
      <text:p text:style-name="P6"/>
      <table:table table:name="Table2" table:style-name="Table2">
        <table:table-column table:style-name="Table2.A"/>
        <table:table-column table:style-name="Table2.B"/>
        <table:table-row table:style-name="Table2.1">
          <table:table-cell table:style-name="Table2.A1" office:value-type="string">
            <text:p text:style-name="P7">Feature<text:span text:style-name="T2"/></text:p>
          </table:table-cell>
          <table:table-cell table:style-name="Table2.B1" office:value-type="string">
            <text:p text:style-name="P7">Detailed Description<text:span text:style-name="T2"/></text:p>
          </table:table-cell>
        </table:table-row>
        <table:table-row table:style-name="Table2.1">
          <table:table-cell table:style-name="Table2.A2" office:value-type="string">
            <text:p text:style-name="P8">Basic Autopilot Features (included foundation)<text:span text:style-name="T3"/></text:p>
          </table:table-cell>
          <table:table-cell table:style-name="Table2.B2" office:value-type="string">
            <text:p text:style-name="P8">- Traffic-Aware Cruise Control: Adapts speed to maintain safe distance from vehicles ahead. - Autosteer: Keeps the vehicle centred in its lane on highways and well-marked roads.<text:span text:style-name="T3"/></text:p>
          </table:table-cell>
        </table:table-row>
        <table:table-row table:style-name="Table2.1">
          <table:table-cell table:style-name="Table2.A2" office:value-type="string">
            <text:p text:style-name="P8">Navigate on Autopilot (on highways)<text:span text:style-name="T3"/></text:p>
          </table:table-cell>
          <table:table-cell table:style-name="Table2.B2" office:value-type="string">
            <text:p text:style-name="P8">Automatically guides the vehicle on highways: suggests and makes lane changes, navigates interchanges/forks, takes exits, and transitions to local roads based on your navigation route.<text:span text:style-name="T3"/></text:p>
          </table:table-cell>
        </table:table-row>
        <table:table-row table:style-name="Table2.1">
          <table:table-cell table:style-name="Table2.A2" office:value-type="string">
            <text:p text:style-name="P8">Auto Lane Change<text:span text:style-name="T3"/></text:p>
          </table:table-cell>
          <table:table-cell table:style-name="Table2.B2" office:value-type="string">
            <text:p text:style-name="P8">Automatically changes lanes when safe (e.g., to pass slower vehicles or follow the route), with or without Navigate on Autopilot active.<text:span text:style-name="T3"/></text:p>
          </table:table-cell>
        </table:table-row>
        <table:table-row table:style-name="Table2.1">
          <table:table-cell table:style-name="Table2.A2" office:value-type="string">
            <text:p text:style-name="P8">Autopark<text:span text:style-name="T3"/></text:p>
          </table:table-cell>
          <table:table-cell table:style-name="Table2.B2" office:value-type="string">
            <text:p text:style-name="P8">Detects parallel or perpendicular parking spots and automatically parks the vehicle (you supervise and confirm).<text:span text:style-name="T3"/></text:p>
          </table:table-cell>
        </table:table-row>
        <table:table-row table:style-name="Table2.1">
          <table:table-cell table:style-name="Table2.A2" office:value-type="string">
            <text:p text:style-name="P8">Smart Summon / Actually Smart Summon<text:span text:style-name="T3"/></text:p>
          </table:table-cell>
          <table:table-cell table:style-name="Table2.B2" office:value-type="string">
            <text:p text:style-name="P8">Allows the vehicle to navigate parking lots and come to you (or a chosen spot) autonomously over short distances, avoiding obstacles (useful in crowded lots).<text:span text:style-name="T3"/></text:p>
          </table:table-cell>
        </table:table-row>
        <table:table-row table:style-name="Table2.1">
          <table:table-cell table:style-name="Table2.A2" office:value-type="string">
            <text:p text:style-name="P8">Traffic Light and Stop Sign Control<text:span text:style-name="T3"/></text:p>
          </table:table-cell>
          <table:table-cell table:style-name="Table2.B2" office:value-type="string">
            <text:p text:style-name="P8">Detects traffic lights and stop signs, automatically slows/stops the vehicle when approaching, and proceeds when safe (with your confirmation/supervision).<text:span text:style-name="T3"/></text:p>
          </table:table-cell>
        </table:table-row>
        <table:table-row table:style-name="Table2.1">
          <table:table-cell table:style-name="Table2.A2" office:value-type="string">
            <text:p text:style-name="P8">Autosteer on City Streets<text:span text:style-name="T3"/></text:p>
          </table:table-cell>
          <table:table-cell table:style-name="Table2.B2" office:value-type="string">
            <text:p text:style-name="P8">Extends lane centring and speed control to urban/residential roads, following road curves and handling complex scenarios.<text:span text:style-name="T3"/></text:p>
          </table:table-cell>
        </table:table-row>
        <table:table-row table:style-name="Table2.1">
          <table:table-cell table:style-name="Table2.A2" office:value-type="string">
            <text:p text:style-name="P8">End-to-End Driving on City/Residential Streets<text:span text:style-name="T3"/></text:p>
          </table:table-cell>
          <table:table-cell table:style-name="Table2.B2" office:value-type="string">
            <text:p text:style-name="P8">The core of modern FSD: Once engaged, the vehicle attempts to drive to your destination autonomously—handling intersections, turns (left/right), roundabouts, yielding, navigating around vehicles/objects, and highway entry/exit—all under supervision. It can operate on almost any road type.<text:span text:style-name="T3"/></text:p>
          </table:table-cell>
        </table:table-row>
        <table:table-row table:style-name="Table2.1">
          <table:table-cell table:style-name="Table2.A2" office:value-type="string">
            <text:p text:style-name="P8">Additional Enhancements (v14+)<text:span text:style-name="T3"/></text:p>
          </table:table-cell>
          <table:table-cell table:style-name="Table2.B2" office:value-type="string">
            <text:p text:style-name="P8">Speed Profiles: Dynamically adjusts driving speed based on your profile, speed limits, traffic, and conditions for smoother/more natural driving. - Arrival Options: Customizable behaviours when approaching destinations (e.g., parking preferences). - Improved handling of complex scenarios like construction zones, narrow roads, or oncoming traffic (though intervention may still be needed).</text:p>
          </table:table-cell>
        </table:table-row>
      </table:table>
      <text:p text:style-name="P4"/>
      <text:p text:style-name="P4"/>
      <text:p text:style-name="P4"><text:soft-page-break/>Important Notes</text:p>
      <text:list text:style-name="L2">
        <text:list-item>
          <text:p text:style-name="P9">Supervision Required — The system uses cameras for 360° visibility and constantly monitors driver attentiveness. Disengagement or warnings occur if you're not paying attention.</text:p>
        </text:list-item>
        <text:list-item>
          <text:p text:style-name="P9">Limitations — Performance varies by road conditions, weather, software version, and region (fully available in Canada). Driver intervention is often needed in challenging situations (e.g., complex intersections, poor markings).</text:p>
        </text:list-item>
        <text:list-item>
          <text:p text:style-name="P9">Availability — Requires compatible hardware (most recent Model Y vehicles have it). Features roll out/improve with software updates.</text:p>
        </text:list-item>
        <text:list-item>
          <text:p text:style-name="P9">Safety — Tesla reports lower collision rates with FSD engaged compared to manual driving.</text:p>
        </text:list-item>
      </text:list>
      <text:p text:style-name="P10"/>
      <text:p text:style-name="P10">For the absolute latest details, check your vehicle's touchscreen (Controls &gt; Autopilot) or the Tesla app, as capabilities evolve rapidly. If you have FSD subscribed, you can try it with a navigation route se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7T15:10:37.317882000</meta:creation-date>
    <dc:date>2026-01-07T15:17:36.159631000</dc:date>
    <meta:editing-duration>PT6M59S</meta:editing-duration>
    <meta:editing-cycles>1</meta:editing-cycles>
    <meta:document-statistic meta:table-count="2" meta:image-count="0" meta:object-count="0" meta:page-count="3" meta:paragraph-count="53" meta:word-count="818" meta:character-count="5902" meta:non-whitespace-character-count="5143"/>
    <meta:generator>LibreOffice/25.2.2.2$MacOSX_AARCH64 LibreOffice_project/7370d4be9e3cf6031a51beef54ff3bda878e3fac</meta:generator>
  </office:meta>
</office:document-meta>
</file>