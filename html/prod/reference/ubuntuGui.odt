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Heading_20_1">
      <style:text-properties officeooo:paragraph-rsid="000775ad"/>
    </style:style>
    <style:style style:name="P2" style:family="paragraph" style:parent-style-name="Title">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text-properties fo:font-weight="bold"/>
    </style:style>
    <style:style style:name="P5" style:family="paragraph" style:parent-style-name="Text_20_body" style:list-style-name="L2"/>
    <style:style style:name="T1" style:family="text">
      <style:text-properties officeooo:rsid="000775ad"/>
    </style:style>
    <style:style style:name="T2" style:family="text">
      <style:text-properties fo:font-weight="bold"/>
    </style:style>
    <style:style style:name="T3" style:family="text">
      <style:text-properties fo:font-style="italic"/>
    </style:style>
    <style:style style:name="fr1" style:family="graphic" style:parent-style-name="Inline_20_Heading">
      <style:graphic-properties style:vertical-pos="middle" style:vertical-rel="tex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rame1" text:anchor-type="as-char" draw:z-index="0"><draw:text-box fo:min-height="0cm" fo:min-width="0cm"><text:p text:style-name="P2">Ubuntu Server GUI Components</text:p></draw:text-box></draw:frame><text:s/></text:h>
      <text:p text:style-name="Subtitle">Post-Installation <text:span text:style-name="T1">Steps</text:span></text:p>
      <text:h text:style-name="Heading_20_2" text:outline-level="2">Server Details</text:h>
      <text:list text:style-name="L1">
        <text:list-item>
          <text:p text:style-name="P3"><text:span text:style-name="T2">Server Hostname:</text:span> imac-server</text:p>
        </text:list-item>
        <text:list-item>
          <text:p text:style-name="P3"><text:span text:style-name="T2">Operating System:</text:span> Ubuntu Server (Noble Numbat, 24.04 LTS)</text:p>
        </text:list-item>
        <text:list-item>
          <text:p text:style-name="P3"><text:span text:style-name="T2">Action:</text:span> Installation of the full Ubuntu Desktop environment via the <text:span text:style-name="Source_20_Text">ubuntu-desktop</text:span> meta-package.</text:p>
        </text:list-item>
      </text:list>
      <text:h text:style-name="Heading_20_2" text:outline-level="2">Key GUI Components and Their Roles</text:h>
      <text:p text:style-name="Text_20_body">The installation of the <text:span text:style-name="Source_20_Text">ubuntu-desktop</text:span> package pulled in a comprehensive set of software to provide a full graphical user interface. Here are the primary GUI elements installed and their respective roles:</text:p>
      <text:list text:style-name="L2">
        <text:list-item>
          <text:p text:style-name="P4">X.Org Server (Xorg):</text:p>
          <text:list>
            <text:list-item>
              <text:p text:style-name="P5"><text:span text:style-name="T2">Role:</text:span> This is the foundational <text:span text:style-name="T2">display server</text:span> for Linux and other Unix-like operating systems. It acts as an intermediary between your graphics hardware and the graphical applications.</text:p>
            </text:list-item>
            <text:list-item>
              <text:p text:style-name="P5"><text:span text:style-name="T2">How it works:</text:span> Xorg draws pixels on your screen, manages input devices (keyboard, mouse), and provides the basic framework upon which all other graphical components operate. Without Xorg, there would be no visual output or input recognition in a GUI environment.</text:p>
            </text:list-item>
          </text:list>
        </text:list-item>
        <text:list-item>
          <text:p text:style-name="P4">LightDM (Light Display Manager):</text:p>
          <text:list>
            <text:list-item>
              <text:p text:style-name="P5"><text:span text:style-name="T2">Role:</text:span> This is the <text:span text:style-name="T2">display manager</text:span> or <text:span text:style-name="T2">login manager</text:span>. It's the first graphical interface you see after your system boots up.</text:p>
            </text:list-item>
            <text:list-item>
              <text:p text:style-name="P5"><text:span text:style-name="T2">How it works:</text:span> LightDM is responsible for:</text:p>
              <text:list>
                <text:list-item>
                  <text:p text:style-name="P5">Presenting the login screen where you enter your username and password.</text:p>
                </text:list-item>
                <text:list-item>
                  <text:p text:style-name="P5">Authenticating users against the system's user database (like <text:span text:style-name="Source_20_Text">/etc/passwd</text:span> and PAM).</text:p>
                </text:list-item>
                <text:list-item>
                  <text:p text:style-name="P5">Allowing selection of different desktop environments (sessions) if multiple are installed.</text:p>
                </text:list-item>
                <text:list-item>
                  <text:p text:style-name="P5">Starting the chosen desktop environment (like GNOME) after successful authentication.</text:p>
                </text:list-item>
              </text:list>
            </text:list-item>
            <text:list-item>
              <text:p text:style-name="P5"><text:soft-page-break/><text:span text:style-name="T3">Note:</text:span> While LightDM was already installed, installing <text:span text:style-name="Source_20_Text">ubuntu-desktop</text:span> ensured it had a valid session to launch.</text:p>
            </text:list-item>
          </text:list>
        </text:list-item>
        <text:list-item>
          <text:p text:style-name="P4">GNOME Shell:</text:p>
          <text:list>
            <text:list-item>
              <text:p text:style-name="P5"><text:span text:style-name="T2">Role:</text:span> This is the <text:span text:style-name="T2">desktop environment</text:span> itself. It's the graphical shell that users interact with daily.</text:p>
            </text:list-item>
            <text:list-item>
              <text:p text:style-name="P5"><text:span text:style-name="T2">How it works:</text:span> GNOME Shell provides:</text:p>
              <text:list>
                <text:list-item>
                  <text:p text:style-name="P5">The <text:span text:style-name="T2">user interface</text:span>: the top bar, application launcher (Activities overview), notifications, system tray, and desktop background.</text:p>
                </text:list-item>
                <text:list-item>
                  <text:p text:style-name="P5"><text:span text:style-name="T2">Window management</text:span>: allowing you to open, close, resize, and move application windows.</text:p>
                </text:list-item>
                <text:list-item>
                  <text:p text:style-name="P5"><text:span text:style-name="T2">Core applications</text:span>: such as the file manager (Nautilus/Files), text editor, calculator, and image viewer (EOG).</text:p>
                </text:list-item>
                <text:list-item>
                  <text:p text:style-name="P5"><text:span text:style-name="T2">Integration with system services</text:span>: for network management, power management, Bluetooth, etc.</text:p>
                </text:list-item>
              </text:list>
            </text:list-item>
            <text:list-item>
              <text:p text:style-name="P5"><text:span text:style-name="T3">Note:</text:span> The specific session that LightDM was previously unable to find (<text:span text:style-name="Source_20_Text">ubuntu</text:span>) typically refers to the default GNOME desktop experience with Ubuntu-specific customizations (like the Ubuntu Dock).</text:p>
            </text:list-item>
          </text:list>
        </text:list-item>
        <text:list-item>
          <text:p text:style-name="P4">Mutter (Window Manager and Compositor):</text:p>
          <text:list>
            <text:list-item>
              <text:p text:style-name="P5"><text:span text:style-name="T2">Role:</text:span> Mutter is the <text:span text:style-name="T2">window manager</text:span> and <text:span text:style-name="T2">compositor</text:span> used by GNOME Shell. It's a critical background component of the desktop environment.</text:p>
            </text:list-item>
            <text:list-item>
              <text:p text:style-name="P4">How it works:</text:p>
              <text:list>
                <text:list-item>
                  <text:p text:style-name="P5">As a <text:span text:style-name="T2">window manager</text:span>, it controls the placement, appearance, and behavior of application windows on the screen.</text:p>
                </text:list-item>
                <text:list-item>
                  <text:p text:style-name="P5">As a <text:span text:style-name="T2">compositor</text:span>, it renders all elements of the desktop (windows, panels, menus) into an off-screen buffer before displaying them on the screen. This enables visual effects like transparency, shadows, animations, and smooth scaling, and ensures tear-free visuals.</text:p>
                </text:list-item>
              </text:list>
            </text:list-item>
          </text:list>
        </text:list-item>
        <text:list-item>
          <text:p text:style-name="P4">PipeWire (Audio and Video Server):</text:p>
          <text:list>
            <text:list-item>
              <text:p text:style-name="P5"><text:span text:style-name="T2">Role:</text:span> This is the modern <text:span text:style-name="T2">low-latency multimedia server</text:span> that manages audio and video streams.</text:p>
            </text:list-item>
            <text:list-item>
              <text:p text:style-name="P5"><text:span text:style-name="T2">How it works:</text:span> PipeWire handles sound input and output (e.g., from your microphone to speakers/headphones), integrates with applications that play or record media, and manages video streams (e.g., from webcams). It replaces older audio systems like PulseAudio (which was noted as being removed during your installation) and offers improved flexibility and performance.</text:p>
            </text:list-item>
          </text:list>
        </text:list-item>
        <text:list-item>
          <text:p text:style-name="P4"><text:soft-page-break/>NetworkManager (with GUI integration):</text:p>
          <text:list>
            <text:list-item>
              <text:p text:style-name="P5"><text:span text:style-name="T2">Role:</text:span> This is the <text:span text:style-name="T2">network management service</text:span>. While NetworkManager itself is a daemon, its GUI components (like <text:span text:style-name="Source_20_Text">nm-applet</text:span> and the network settings in GNOME Control Center) allow easy configuration of network connections.</text:p>
            </text:list-item>
            <text:list-item>
              <text:p text:style-name="P5"><text:span text:style-name="T2">How it works:</text:span> It provides a user-friendly interface to connect to Wi-Fi networks, configure wired connections, VPNs, and manage network settings without needing to use command-line tools.</text:p>
            </text:list-item>
          </text:list>
        </text:list-item>
        <text:list-item>
          <text:p text:style-name="P4">Yaru Theme (Icons, GTK, GNOME Shell, Sound):</text:p>
          <text:list>
            <text:list-item>
              <text:p text:style-name="P5"><text:span text:style-name="T2">Role:</text:span> Yaru is Ubuntu's default <text:span text:style-name="T2">visual theme</text:span>.</text:p>
            </text:list-item>
            <text:list-item>
              <text:p text:style-name="P5"><text:span text:style-name="T2">How it works:</text:span> It provides the consistent look and feel across the desktop, including:</text:p>
              <text:list>
                <text:list-item>
                  <text:p text:style-name="P5"><text:span text:style-name="T2">Icons:</text:span> The appearance of application icons and system icons.</text:p>
                </text:list-item>
                <text:list-item>
                  <text:p text:style-name="P5"><text:span text:style-name="T2">GTK Theme:</text:span> The styling of graphical elements within applications built with the GTK toolkit (buttons, menus, windows).</text:p>
                </text:list-item>
                <text:list-item>
                  <text:p text:style-name="P5"><text:span text:style-name="T2">GNOME Shell Theme:</text:span> The visual style of the GNOME Shell itself (top bar, overview, notifications).</text:p>
                </text:list-item>
                <text:list-item>
                  <text:p text:style-name="P5"><text:span text:style-name="T2">Sound Theme:</text:span> The collection of system sounds (e.g., login, notification sounds).</text:p>
                </text:list-item>
              </text:list>
            </text:list-item>
          </text:list>
        </text:list-item>
        <text:list-item>
          <text:p text:style-name="P4">Various GNOME Applications and Utilities:</text:p>
          <text:list>
            <text:list-item>
              <text:p text:style-name="P5"><text:span text:style-name="T2">Role:</text:span> The <text:span text:style-name="Source_20_Text">ubuntu-desktop</text:span> package includes a suite of essential desktop applications and system utilities that provide a complete user experience.</text:p>
            </text:list-item>
            <text:list-item>
              <text:p text:style-name="P4">Examples:</text:p>
              <text:list>
                <text:list-item>
                  <text:p text:style-name="P5"><text:span text:style-name="T2">Nautilus (Files):</text:span> The default file manager for Browse files and folders.</text:p>
                </text:list-item>
                <text:list-item>
                  <text:p text:style-name="P5"><text:span text:style-name="T2">Gedit (Text Editor) / GNOME Text Editor:</text:span> A simple text editor for creating and editing documents.</text:p>
                </text:list-item>
                <text:list-item>
                  <text:p text:style-name="P5"><text:span text:style-name="T2">EOG (Eye of GNOME):</text:span> An image viewer.</text:p>
                </text:list-item>
                <text:list-item>
                  <text:p text:style-name="P5"><text:span text:style-name="T2">GNOME Calculator:</text:span> A standard calculator application.</text:p>
                </text:list-item>
                <text:list-item>
                  <text:p text:style-name="P5"><text:span text:style-name="T2">GNOME Control Center (Settings):</text:span> The central hub for configuring system settings like display, network, users, and personalization.</text:p>
                </text:list-item>
                <text:list-item>
                  <text:p text:style-name="P5"><text:span text:style-name="T2">Firefox:</text:span> The default web browser.</text:p>
                </text:list-item>
                <text:list-item>
                  <text:p text:style-name="P5"><text:span text:style-name="T2">Thunderbird:</text:span> The default email client.</text:p>
                </text:list-item>
                <text:list-item>
                  <text:p text:style-name="P5"><text:span text:style-name="T2">LibreOffice Suite:</text:span> A full office productivity suite (Writer, Calc, Impress, Draw, Math, Base).</text:p>
                </text:list-item>
              </text:list>
            </text:list-item>
          </text:list>
        </text:list-item>
      </text:list>
      <text:p text:style-name="Text_20_body"><text:soft-page-break/>These components, installed together, transform an Ubuntu Server installation into a fully functional graphical workstation, providing both the underlying infrastructure and the user-facing elements necessary for desktop interac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6T17:12:52.235071000</meta:creation-date>
    <dc:date>2025-07-06T17:18:41.263465000</dc:date>
    <meta:editing-duration>PT5M49S</meta:editing-duration>
    <meta:editing-cycles>1</meta:editing-cycles>
    <meta:document-statistic meta:table-count="0" meta:image-count="0" meta:object-count="0" meta:page-count="4" meta:paragraph-count="58" meta:word-count="818" meta:character-count="5408" meta:non-whitespace-character-count="4697"/>
    <meta:generator>LibreOffice/25.2.2.2$MacOSX_AARCH64 LibreOffice_project/7370d4be9e3cf6031a51beef54ff3bda878e3fac</meta:generator>
  </office:meta>
</office:document-meta>
</file>