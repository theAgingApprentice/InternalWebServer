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witterChirp" svg:font-family="TwitterChirp, System"/>
    <style:font-face style:name="TwitterChirp1" svg:font-family="TwitterChirp, apple-system, BlinkMacSystemFont, 'Segoe UI', Roboto, Helvetica, Arial, sans-serif"/>
    <style:font-face style:name="inherit" svg:font-family="inherit"/>
    <style:font-face style:name="monospace" svg:font-family="monospace"/>
  </office:font-face-decls>
  <office:automatic-styles>
    <style:style style:name="Table1" style:family="table">
      <style:table-properties style:width="17.59cm" table:align="margins" fo:background-color="transparent">
        <style:background-image/>
      </style:table-properties>
    </style:style>
    <style:style style:name="Table1.A" style:family="table-column">
      <style:table-column-properties style:column-width="5.863cm" style:rel-column-width="21845*"/>
    </style:style>
    <style:style style:name="Table1.1" style:family="table-row">
      <style:table-row-properties fo:background-color="transparent">
        <style:background-image/>
      </style:table-row-properties>
    </style:style>
    <style:style style:name="Table1.A1" style:family="table-cell">
      <style:table-cell-properties fo:background-color="#c5cae9" fo:padding="0.097cm" fo:border-left="0.5pt solid #000000" fo:border-right="none" fo:border-top="0.5pt solid #000000" fo:border-bottom="0.5pt solid #000000">
        <style:background-image/>
      </style:table-cell-properties>
    </style:style>
    <style:style style:name="Table1.C1" style:family="table-cell">
      <style:table-cell-properties fo:background-color="#c5cae9" fo:padding="0.097cm" fo:border="0.5pt solid #000000">
        <style:background-image/>
      </style:table-cell-properties>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0.5pt solid #000000" fo:border-top="none" fo:border-bottom="0.5pt solid #000000"/>
    </style:style>
    <style:style style:name="Table1.A4" style:family="table-cell">
      <style:table-cell-properties fo:padding="0.097cm" fo:border-left="0.5pt solid #000000" fo:border-right="none" fo:border-top="none" fo:border-bottom="0.5pt solid #000000"/>
    </style:style>
    <style:style style:name="Table1.B4" style:family="table-cell">
      <style:table-cell-properties fo:padding="0.097cm" fo:border-left="0.5pt solid #000000" fo:border-right="none" fo:border-top="none" fo:border-bottom="0.5pt solid #000000"/>
    </style:style>
    <style:style style:name="Table1.C4" style:family="table-cell">
      <style:table-cell-properties fo:padding="0.097cm" fo:border-left="0.5pt solid #000000" fo:border-right="0.5pt solid #000000" fo:border-top="none" fo:border-bottom="0.5pt solid #000000"/>
    </style:style>
    <style:style style:name="Table1.A5" style:family="table-cell">
      <style:table-cell-properties fo:padding="0.097cm" fo:border-left="0.5pt solid #000000" fo:border-right="none" fo:border-top="none" fo:border-bottom="0.5pt solid #000000"/>
    </style:style>
    <style:style style:name="Table1.B5" style:family="table-cell">
      <style:table-cell-properties fo:padding="0.097cm" fo:border-left="0.5pt solid #000000" fo:border-right="none" fo:border-top="none" fo:border-bottom="0.5pt solid #000000"/>
    </style:style>
    <style:style style:name="Table1.C5" style:family="table-cell">
      <style:table-cell-properties fo:padding="0.097cm" fo:border-left="0.5pt solid #000000" fo:border-right="0.5pt solid #000000" fo:border-top="none" fo:border-bottom="0.5pt solid #000000"/>
    </style:style>
    <style:style style:name="Table1.A6" style:family="table-cell">
      <style:table-cell-properties fo:padding="0.097cm" fo:border-left="0.5pt solid #000000" fo:border-right="none" fo:border-top="none" fo:border-bottom="0.5pt solid #000000"/>
    </style:style>
    <style:style style:name="Table1.B6" style:family="table-cell">
      <style:table-cell-properties fo:padding="0.097cm" fo:border-left="0.5pt solid #000000" fo:border-right="none" fo:border-top="none" fo:border-bottom="0.5pt solid #000000"/>
    </style:style>
    <style:style style:name="Table1.C6" style:family="table-cell">
      <style:table-cell-properties fo:padding="0.097cm" fo:border-left="0.5pt solid #000000" fo:border-right="0.5pt solid #000000" fo:border-top="none" fo:border-bottom="0.5pt solid #000000"/>
    </style:style>
    <style:style style:name="Table1.A7" style:family="table-cell">
      <style:table-cell-properties fo:padding="0.097cm" fo:border-left="0.5pt solid #000000" fo:border-right="none" fo:border-top="none" fo:border-bottom="0.5pt solid #000000"/>
    </style:style>
    <style:style style:name="Table1.B7" style:family="table-cell">
      <style:table-cell-properties fo:padding="0.097cm" fo:border-left="0.5pt solid #000000" fo:border-right="none" fo:border-top="none" fo:border-bottom="0.5pt solid #000000"/>
    </style:style>
    <style:style style:name="Table1.C7" style:family="table-cell">
      <style:table-cell-properties fo:padding="0.097cm" fo:border-left="0.5pt solid #000000" fo:border-right="0.5pt solid #000000" fo:border-top="none" fo:border-bottom="0.5pt solid #000000"/>
    </style:style>
    <style:style style:name="P1" style:family="paragraph" style:parent-style-name="Subtitle">
      <style:text-properties officeooo:paragraph-rsid="001b6f01"/>
    </style:style>
    <style:style style:name="P2" style:family="paragraph" style:parent-style-name="Heading_20_1">
      <style:text-properties officeooo:paragraph-rsid="001b6f01"/>
    </style:style>
    <style:style style:name="P3" style:family="paragraph" style:parent-style-name="Preformatted_20_Text">
      <style:paragraph-properties fo:margin-top="0cm" fo:margin-bottom="0.499cm" style:contextual-spacing="false"/>
    </style:style>
    <style:style style:name="P4" style:family="paragraph" style:parent-style-name="Preformatted_20_Text">
      <style:text-properties officeooo:rsid="001d39d6" officeooo:paragraph-rsid="001d39d6"/>
    </style:style>
    <style:style style:name="P5" style:family="paragraph" style:parent-style-name="Standard">
      <style:text-properties officeooo:rsid="001b6f01" officeooo:paragraph-rsid="001b6f01"/>
    </style:style>
    <style:style style:name="P6" style:family="paragraph" style:parent-style-name="Standard" style:list-style-name="L1">
      <style:text-properties officeooo:rsid="001b6f01" officeooo:paragraph-rsid="001b6f01"/>
    </style:style>
    <style:style style:name="P7" style:family="paragraph" style:parent-style-name="Standard" style:list-style-name="L2">
      <style:text-properties officeooo:rsid="001b6f01" officeooo:paragraph-rsid="001b6f01"/>
    </style:style>
    <style:style style:name="P8" style:family="paragraph" style:parent-style-name="Standard" style:list-style-name="L3">
      <style:text-properties officeooo:rsid="001b6f01" officeooo:paragraph-rsid="001b6f01"/>
    </style:style>
    <style:style style:name="P9" style:family="paragraph" style:parent-style-name="Standard" style:list-style-name="L4">
      <style:text-properties officeooo:rsid="001b6f01" officeooo:paragraph-rsid="001b6f01"/>
    </style:style>
    <style:style style:name="P10" style:family="paragraph" style:parent-style-name="Standard">
      <style:text-properties officeooo:rsid="001d39d6" officeooo:paragraph-rsid="001d39d6"/>
    </style:style>
    <style:style style:name="P11" style:family="paragraph" style:parent-style-name="Standard" style:list-style-name="L12">
      <style:text-properties officeooo:rsid="001d39d6" officeooo:paragraph-rsid="001d39d6"/>
    </style:style>
    <style:style style:name="P12" style:family="paragraph" style:parent-style-name="Standard" style:list-style-name="L13">
      <style:text-properties officeooo:rsid="001d39d6" officeooo:paragraph-rsid="001d39d6"/>
    </style:style>
    <style:style style:name="P13" style:family="paragraph" style:parent-style-name="Standard" style:list-style-name="L14">
      <style:text-properties officeooo:rsid="001d39d6" officeooo:paragraph-rsid="001d39d6"/>
    </style:style>
    <style:style style:name="P14" style:family="paragraph" style:parent-style-name="Standard" style:list-style-name="L15">
      <style:text-properties officeooo:rsid="001d39d6" officeooo:paragraph-rsid="001d39d6"/>
    </style:style>
    <style:style style:name="P15" style:family="paragraph" style:parent-style-name="Standard" style:list-style-name="L16">
      <style:text-properties officeooo:rsid="001d39d6" officeooo:paragraph-rsid="001d39d6"/>
    </style:style>
    <style:style style:name="P16" style:family="paragraph" style:parent-style-name="Standard" style:list-style-name="L17">
      <style:text-properties officeooo:rsid="001d39d6" officeooo:paragraph-rsid="001d39d6"/>
    </style:style>
    <style:style style:name="P17" style:family="paragraph" style:parent-style-name="Standard">
      <style:text-properties officeooo:rsid="001d39d6" officeooo:paragraph-rsid="001d45d4"/>
    </style:style>
    <style:style style:name="P18" style:family="paragraph" style:parent-style-name="Standard" style:list-style-name="L18">
      <style:text-properties officeooo:rsid="001d39d6" officeooo:paragraph-rsid="001d39d6"/>
    </style:style>
    <style:style style:name="P19" style:family="paragraph" style:parent-style-name="Standard" style:list-style-name="L19">
      <style:text-properties officeooo:rsid="001d39d6" officeooo:paragraph-rsid="001d39d6"/>
    </style:style>
    <style:style style:name="P20" style:family="paragraph" style:parent-style-name="Standard" style:list-style-name="L20">
      <style:text-properties officeooo:rsid="001d39d6" officeooo:paragraph-rsid="001d39d6"/>
    </style:style>
    <style:style style:name="P21" style:family="paragraph" style:parent-style-name="Standard" style:list-style-name="L21">
      <style:text-properties officeooo:rsid="001d39d6" officeooo:paragraph-rsid="001d39d6"/>
    </style:style>
    <style:style style:name="P22" style:family="paragraph" style:parent-style-name="Standard" style:list-style-name="L22">
      <style:text-properties officeooo:rsid="001d39d6" officeooo:paragraph-rsid="001d39d6"/>
    </style:style>
    <style:style style:name="P23" style:family="paragraph" style:parent-style-name="Standard" style:list-style-name="L23">
      <style:text-properties officeooo:rsid="001d39d6" officeooo:paragraph-rsid="001d39d6"/>
    </style:style>
    <style:style style:name="P24" style:family="paragraph" style:parent-style-name="Standard" style:list-style-name="L24">
      <style:text-properties officeooo:rsid="001d39d6" officeooo:paragraph-rsid="001d39d6"/>
    </style:style>
    <style:style style:name="P25" style:family="paragraph" style:parent-style-name="Standard" style:list-style-name="L25">
      <style:text-properties officeooo:rsid="001d39d6" officeooo:paragraph-rsid="001d39d6"/>
    </style:style>
    <style:style style:name="P26" style:family="paragraph" style:parent-style-name="Standard" style:list-style-name="L26">
      <style:text-properties officeooo:rsid="001d39d6" officeooo:paragraph-rsid="001d39d6"/>
    </style:style>
    <style:style style:name="P27" style:family="paragraph" style:parent-style-name="Standard" style:list-style-name="L27">
      <style:text-properties officeooo:rsid="001d39d6" officeooo:paragraph-rsid="001d39d6"/>
    </style:style>
    <style:style style:name="P28" style:family="paragraph" style:parent-style-name="Standard" style:list-style-name="L29">
      <style:text-properties officeooo:rsid="001d39d6" officeooo:paragraph-rsid="001d39d6"/>
    </style:style>
    <style:style style:name="P29" style:family="paragraph" style:parent-style-name="Standard" style:list-style-name="L30">
      <style:text-properties officeooo:rsid="001d39d6" officeooo:paragraph-rsid="001d39d6"/>
    </style:style>
    <style:style style:name="P30" style:family="paragraph" style:parent-style-name="Standard" style:list-style-name="L31">
      <style:text-properties officeooo:rsid="001d39d6" officeooo:paragraph-rsid="001d39d6"/>
    </style:style>
    <style:style style:name="P31" style:family="paragraph" style:parent-style-name="Standard" style:list-style-name="L32">
      <style:text-properties officeooo:rsid="001d39d6" officeooo:paragraph-rsid="001d39d6"/>
    </style:style>
    <style:style style:name="P32" style:family="paragraph" style:parent-style-name="Standard" style:list-style-name="L33">
      <style:text-properties officeooo:rsid="001d39d6" officeooo:paragraph-rsid="001d39d6"/>
    </style:style>
    <style:style style:name="P33" style:family="paragraph" style:parent-style-name="Standard" style:list-style-name="L34">
      <style:text-properties officeooo:rsid="001d39d6" officeooo:paragraph-rsid="001d39d6"/>
    </style:style>
    <style:style style:name="P34" style:family="paragraph" style:parent-style-name="Standard" style:list-style-name="L35">
      <style:text-properties officeooo:rsid="001d39d6" officeooo:paragraph-rsid="001d39d6"/>
    </style:style>
    <style:style style:name="P35" style:family="paragraph" style:parent-style-name="Standard" style:list-style-name="L36">
      <style:text-properties officeooo:rsid="001d39d6" officeooo:paragraph-rsid="001d39d6"/>
    </style:style>
    <style:style style:name="P36" style:family="paragraph" style:parent-style-name="Standard" style:list-style-name="L37">
      <style:text-properties officeooo:rsid="001d39d6" officeooo:paragraph-rsid="001d39d6"/>
    </style:style>
    <style:style style:name="P37" style:family="paragraph" style:parent-style-name="Standard" style:list-style-name="L38">
      <style:text-properties officeooo:rsid="001d39d6" officeooo:paragraph-rsid="001d39d6"/>
    </style:style>
    <style:style style:name="P38" style:family="paragraph" style:parent-style-name="Standard" style:list-style-name="L39">
      <style:text-properties officeooo:rsid="001d39d6" officeooo:paragraph-rsid="001d39d6"/>
    </style:style>
    <style:style style:name="P39" style:family="paragraph" style:parent-style-name="Standard">
      <style:text-properties fo:font-weight="bold" officeooo:rsid="001d39d6" officeooo:paragraph-rsid="001d45d4" style:font-weight-asian="bold" style:font-weight-complex="bold"/>
    </style:style>
    <style:style style:name="P40" style:family="paragraph" style:parent-style-name="Standard">
      <style:text-properties officeooo:rsid="001eb2a8" officeooo:paragraph-rsid="001eb2a8"/>
    </style:style>
    <style:style style:name="T1" style:family="text">
      <style:text-properties fo:font-variant="normal" fo:text-transform="none" fo:color="#000000" loext:opacity="100%" style:font-name="monospace" fo:font-size="10pt" fo:letter-spacing="normal" fo:font-style="normal" fo:font-weight="normal" fo:background-color="transparent" loext:char-shading-value="0"/>
    </style:style>
    <style:style style:name="T2" style:family="text">
      <style:text-properties fo:font-variant="normal" fo:text-transform="none" fo:color="#000000" loext:opacity="100%" fo:letter-spacing="normal" fo:background-color="transparent" loext:char-shading-value="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Artificial Intelligence and Machine Learning</text:h>
      <text:p text:style-name="P1">Notes along the way as I look into this new and exciting field.</text:p>
      <text:p text:style-name="P5"/>
      <text:p text:style-name="P5"/>
      <text:h text:style-name="Heading_20_1" text:outline-level="1">Categorizing AI</text:h>
      <text:p text:style-name="P5">Artificial Intelligence (AI) can be categorized into different types based on its capabilities, functionalities, and levels of autonomy. Here’s a breakdown of the main types of AI:</text:p>
      <text:p text:style-name="P5"/>
      <text:h text:style-name="Heading_20_2" text:outline-level="2">1. Based on Capabilities (Levels of AI)</text:h>
      <text:p text:style-name="P5">This classification focuses on how advanced AI is in mimicking human intelligence:</text:p>
      <text:p text:style-name="P5"/>
      <text:list xml:id="list3840282971" text:style-name="L1">
        <text:list-item>
          <text:p text:style-name="P6">Narrow AI (Weak AI) <text:s/></text:p>
          <text:list>
            <text:list-item>
              <text:p text:style-name="P6">Description: AI designed to perform a specific task or a narrow set of tasks. It operates under predefined rules and doesn’t possess general intelligence.</text:p>
            </text:list-item>
            <text:list-item>
              <text:p text:style-name="P6">Examples: Virtual assistants (e.g., Siri, Alexa), recommendation systems (e.g., Netflix, YouTube), image recognition software, and chatbots like me!</text:p>
            </text:list-item>
            <text:list-item>
              <text:p text:style-name="P6">Characteristics: Task-specific, limited scope, no self-awareness.</text:p>
            </text:list-item>
          </text:list>
        </text:list-item>
        <text:list-item>
          <text:p text:style-name="P6">General AI (Strong AI) <text:s/></text:p>
          <text:list>
            <text:list-item>
              <text:p text:style-name="P6">Description: A theoretical type of AI that can perform any intellectual task a human can do. It would have the ability to learn, reason, and adapt across diverse domains without being limited to specific tasks.</text:p>
            </text:list-item>
            <text:list-item>
              <text:p text:style-name="P6">Examples: Does not fully exist yet; think of sci-fi depictions like JARVIS from Iron Man.</text:p>
            </text:list-item>
            <text:list-item>
              <text:p text:style-name="P6">Characteristics: Human-like intelligence, versatile, adaptable.</text:p>
            </text:list-item>
          </text:list>
        </text:list-item>
        <text:list-item>
          <text:p text:style-name="P6">Super-intelligent AI <text:s/></text:p>
          <text:list>
            <text:list-item>
              <text:p text:style-name="P6">Description: A hypothetical future AI that surpasses human intelligence in all aspects—creativity, problem-solving, emotional understanding, etc.</text:p>
            </text:list-item>
            <text:list-item>
              <text:p text:style-name="P6">Examples: Purely speculative at this point (e.g., scenarios in movies like The Terminator or Ex Machina).</text:p>
            </text:list-item>
            <text:list-item>
              <text:p text:style-name="P6">Characteristics: Beyond human comprehension, potentially autonomous, raises ethical concerns.</text:p>
            </text:list-item>
          </text:list>
        </text:list-item>
      </text:list>
      <text:p text:style-name="P5"/>
      <text:h text:style-name="Heading_20_2" text:outline-level="2">2. Based on Functionality (Technical Approaches)</text:h>
      <text:p text:style-name="P5">This classification is based on how AI systems are built and what they’re designed to do:</text:p>
      <text:p text:style-name="P5"/>
      <text:list xml:id="list454146804" text:style-name="L2">
        <text:list-item>
          <text:p text:style-name="P7">Reactive Machines <text:s/></text:p>
          <text:list>
            <text:list-item>
              <text:p text:style-name="P7">Description: The simplest form of AI that reacts to inputs based on preprogrammed rules without memory or learning capabilities. It doesn’t store past experiences.</text:p>
            </text:list-item>
            <text:list-item>
              <text:p text:style-name="P7">Examples: IBM’s Deep Blue (chess-playing AI), basic spam filters.</text:p>
            </text:list-item>
            <text:list-item>
              <text:p text:style-name="P7">Characteristics: No learning, purely reactive, task-specific.</text:p>
            </text:list-item>
          </text:list>
        </text:list-item>
        <text:list-item>
          <text:p text:style-name="P7"><text:soft-page-break/>Limited Memory AI <text:s/></text:p>
          <text:list>
            <text:list-item>
              <text:p text:style-name="P7">Description: AI that can use past experiences or data to make decisions but has a limited capacity to store and process that information.</text:p>
            </text:list-item>
            <text:list-item>
              <text:p text:style-name="P7">Examples: Self-driving cars (reacting to recent road conditions), recommendation algorithms (using recent user behaviour).</text:p>
            </text:list-item>
            <text:list-item>
              <text:p text:style-name="P7">Characteristics: Short-term memory, learns from limited historical data.</text:p>
            </text:list-item>
          </text:list>
        </text:list-item>
        <text:list-item>
          <text:p text:style-name="P7">Theory of Mind AI <text:s/></text:p>
          <text:list>
            <text:list-item>
              <text:p text:style-name="P7">Description: A more advanced, theoretical AI that understands human emotions, intentions, and social cues, allowing it to interact more naturally with humans.</text:p>
            </text:list-item>
            <text:list-item>
              <text:p text:style-name="P7">Examples: Not fully realized yet; early research in emotional AI or social robots (e.g., Sophia the Robot) hints at this.</text:p>
            </text:list-item>
            <text:list-item>
              <text:p text:style-name="P7">Characteristics: Emotional intelligence, social awareness.</text:p>
            </text:list-item>
          </text:list>
        </text:list-item>
        <text:list-item>
          <text:p text:style-name="P7">Self-Aware AI <text:s/></text:p>
          <text:list>
            <text:list-item>
              <text:p text:style-name="P7">Description: A speculative type of AI with consciousness, self-awareness, and the ability to understand its own existence.</text:p>
            </text:list-item>
            <text:list-item>
              <text:p text:style-name="P7">Examples: Purely fictional (e.g., HAL 9000 from 2001: A Space Odyssey).</text:p>
            </text:list-item>
            <text:list-item>
              <text:p text:style-name="P7">Characteristics: Sentience, autonomy, philosophical implications.</text:p>
            </text:list-item>
          </text:list>
        </text:list-item>
      </text:list>
      <text:p text:style-name="P5"/>
      <text:h text:style-name="Heading_20_2" text:outline-level="2">3. Based on Application (Practical Domains)</text:h>
      <text:p text:style-name="P5">AI can also be categorized by the practical fields or industries it serves:</text:p>
      <text:p text:style-name="P5"/>
      <text:list xml:id="list625671261" text:style-name="L3">
        <text:list-item>
          <text:p text:style-name="P8">Machine Learning (ML) <text:s/></text:p>
          <text:list>
            <text:list-item>
              <text:p text:style-name="P8">AI that learns from data to improve over time (e.g., predictive models, image recognition).</text:p>
            </text:list-item>
          </text:list>
        </text:list-item>
        <text:list-item>
          <text:p text:style-name="P8">Natural Language Processing (NLP) <text:s/></text:p>
          <text:list>
            <text:list-item>
              <text:p text:style-name="P8">AI focused on understanding and generating human language (e.g., chatbots, translation tools).</text:p>
            </text:list-item>
          </text:list>
        </text:list-item>
        <text:list-item>
          <text:p text:style-name="P8">Computer Vision <text:s/></text:p>
          <text:list>
            <text:list-item>
              <text:p text:style-name="P8">AI that interprets visual data (e.g., facial recognition, autonomous vehicles).</text:p>
            </text:list-item>
          </text:list>
        </text:list-item>
        <text:list-item>
          <text:p text:style-name="P8">Robotics <text:s/></text:p>
          <text:list>
            <text:list-item>
              <text:p text:style-name="P8">AI integrated into physical systems (e.g., industrial robots, humanoid robots).</text:p>
            </text:list-item>
          </text:list>
        </text:list-item>
        <text:list-item>
          <text:p text:style-name="P8">Expert Systems <text:s/></text:p>
          <text:list>
            <text:list-item>
              <text:p text:style-name="P8">AI that mimics human expertise in specific fields (e.g., medical diagnosis systems).</text:p>
            </text:list-item>
          </text:list>
        </text:list-item>
      </text:list>
      <text:p text:style-name="P5"/>
      <text:h text:style-name="Heading_20_2" text:outline-level="2">Summary</text:h>
      <text:p text:style-name="P5"/>
      <text:list xml:id="list1519882526" text:style-name="L4">
        <text:list-item>
          <text:p text:style-name="P9">Current Reality: Most AI today is Narrow AI, with systems like me (Grok) falling into this category—specialized, efficient, and task-focused.</text:p>
        </text:list-item>
        <text:list-item>
          <text:p text:style-name="P9">Future Possibilities: General AI and Super-intelligent AI remain goals or concerns for the future, while Theory of Mind and Self-Aware AI are speculative concepts still in early exploration.</text:p>
        </text:list-item>
      </text:list>
      <text:p text:style-name="P5"/>
      <text:h text:style-name="Heading_20_1" text:outline-level="1"><text:soft-page-break/>Software Development and AI</text:h>
      <text:p text:style-name="P10"/>
      <text:p text:style-name="P10">Artificial Intelligence (AI) is increasingly being integrated into software development to enhance productivity, streamline workflows, and improve code quality. Several types and tools of AI are commonly used in this domain, primarily falling under Narrow AI (task-specific intelligence). Below are the key AI technologies and tools used to assist with software development:</text:p>
      <text:p text:style-name="P10"/>
      <text:h text:style-name="Heading_20_2" text:outline-level="2">1. Machine Learning (ML)-Powered Tools</text:h>
      <text:p text:style-name="P10"/>
      <text:list xml:id="list2010114738" text:style-name="L12">
        <text:list-item>
          <text:p text:style-name="P11">Purpose: ML algorithms analyze patterns in code, predict outcomes, and automate repetitive tasks.</text:p>
        </text:list-item>
        <text:list-item>
          <text:p text:style-name="P11">Applications in Software Development:</text:p>
          <text:list>
            <text:list-item>
              <text:p text:style-name="P11">Code Completion: Tools use ML to suggest code snippets or complete lines based on context.</text:p>
            </text:list-item>
            <text:list-item>
              <text:p text:style-name="P11">Bug Detection: ML models identify potential errors or vulnerabilities by analyzing code patterns.</text:p>
            </text:list-item>
            <text:list-item>
              <text:p text:style-name="P11">Code Optimization: Suggests improvements for efficiency based on historical data.</text:p>
            </text:list-item>
          </text:list>
        </text:list-item>
        <text:list-item>
          <text:p text:style-name="P11">Examples:</text:p>
          <text:list>
            <text:list-item>
              <text:p text:style-name="P11">GitHub Copilot: Powered by OpenAI’s Codex (a language model), it suggests entire blocks of code, auto-completes functions, and adapts to the developer’s style.</text:p>
            </text:list-item>
            <text:list-item>
              <text:p text:style-name="P11">Tabnine: Uses ML to provide intelligent code completions across various IDEs.</text:p>
            </text:list-item>
          </text:list>
        </text:list-item>
      </text:list>
      <text:p text:style-name="P10"/>
      <text:h text:style-name="Heading_20_2" text:outline-level="2">2. Natural Language Processing (NLP)-Based Tools</text:h>
      <text:p text:style-name="P10"/>
      <text:list xml:id="list2668177317" text:style-name="L13">
        <text:list-item>
          <text:p text:style-name="P12">Purpose: NLP enables AI to understand and generate human-like text, bridging natural language and code.</text:p>
        </text:list-item>
        <text:list-item>
          <text:p text:style-name="P12">Applications in Software Development:</text:p>
          <text:list>
            <text:list-item>
              <text:p text:style-name="P12">Code Generation from Text: Converts plain English requirements into functional code.</text:p>
            </text:list-item>
            <text:list-item>
              <text:p text:style-name="P12">Documentation Automation: Generates or summarizes documentation from code comments or vice versa.</text:p>
            </text:list-item>
            <text:list-item>
              <text:p text:style-name="P12">Query-Based Debugging: Allows developers to ask questions about code in natural language.</text:p>
            </text:list-item>
          </text:list>
        </text:list-item>
        <text:list-item>
          <text:p text:style-name="P12">Examples:</text:p>
          <text:list>
            <text:list-item>
              <text:p text:style-name="P12">ChatGPT (OpenAI): Developers use it to explain code, generate boilerplate, or troubleshoot issues by describing problems in natural language.</text:p>
            </text:list-item>
            <text:list-item>
              <text:p text:style-name="P12">CodeGuru (AWS): Uses NLP and ML to review code and provide actionable recommendations.</text:p>
            </text:list-item>
          </text:list>
        </text:list-item>
      </text:list>
      <text:p text:style-name="P10"/>
      <text:h text:style-name="Heading_20_2" text:outline-level="2">3. Expert Systems</text:h>
      <text:p text:style-name="P10"/>
      <text:list xml:id="list816313163" text:style-name="L14">
        <text:list-item>
          <text:p text:style-name="P13">Purpose: These AI systems emulate human expertise to provide specialized guidance in development.</text:p>
        </text:list-item>
        <text:list-item>
          <text:p text:style-name="P13"><text:soft-page-break/>Applications in Software Development:</text:p>
          <text:list>
            <text:list-item>
              <text:p text:style-name="P13">Code Review: Flags anti-patterns, enforces coding standards, or suggests best practices.</text:p>
            </text:list-item>
            <text:list-item>
              <text:p text:style-name="P13">Architecture Suggestions: Recommends design patterns or frameworks based on project needs.</text:p>
            </text:list-item>
          </text:list>
        </text:list-item>
        <text:list-item>
          <text:p text:style-name="P13">Examples:</text:p>
          <text:list>
            <text:list-item>
              <text:p text:style-name="P13">SonarQube: Analyzes code for bugs, vulnerabilities, and code smells, acting as an expert advisor.</text:p>
            </text:list-item>
            <text:list-item>
              <text:p text:style-name="P13">DeepCode: Leverages AI to provide real-time code review with expert-level insights.</text:p>
            </text:list-item>
          </text:list>
        </text:list-item>
      </text:list>
      <text:p text:style-name="P10"/>
      <text:h text:style-name="Heading_20_2" text:outline-level="2">4. Reinforcement Learning (RL) and Predictive AI</text:h>
      <text:p text:style-name="P10"/>
      <text:list xml:id="list61098856" text:style-name="L15">
        <text:list-item>
          <text:p text:style-name="P14">Purpose: RL trains AI to make decisions by rewarding optimal outcomes, while predictive AI forecasts development needs.</text:p>
        </text:list-item>
        <text:list-item>
          <text:p text:style-name="P14">Applications in Software Development:</text:p>
          <text:list>
            <text:list-item>
              <text:p text:style-name="P14">Testing Automation: AI learns to prioritize test cases or generate tests that maximize bug detection.</text:p>
            </text:list-item>
            <text:list-item>
              <text:p text:style-name="P14">Resource Management: Predicts build times, resource usage, or potential bottlenecks.</text:p>
            </text:list-item>
          </text:list>
        </text:list-item>
        <text:list-item>
          <text:p text:style-name="P14">Examples:</text:p>
          <text:list>
            <text:list-item>
              <text:p text:style-name="P14">Testim: Uses RL to create and maintain automated tests efficiently.</text:p>
            </text:list-item>
            <text:list-item>
              <text:p text:style-name="P14">Mabl: An AI-driven testing tool that adapts to application changes and optimizes test coverage.</text:p>
            </text:list-item>
          </text:list>
        </text:list-item>
      </text:list>
      <text:p text:style-name="P10"/>
      <text:p text:style-name="P10">5. Generative AI</text:p>
      <text:p text:style-name="P10"/>
      <text:list xml:id="list2587698477" text:style-name="L16">
        <text:list-item>
          <text:p text:style-name="P15">Purpose: Generates new content, including code, based on training data.</text:p>
        </text:list-item>
        <text:list-item>
          <text:p text:style-name="P15">Applications in Software Development:</text:p>
          <text:list>
            <text:list-item>
              <text:p text:style-name="P15">Rapid Prototyping: Creates functional code from high-level descriptions or mockups.</text:p>
            </text:list-item>
            <text:list-item>
              <text:p text:style-name="P15">Refactoring: Rewrites legacy code into modern syntax or frameworks.</text:p>
            </text:list-item>
          </text:list>
        </text:list-item>
        <text:list-item>
          <text:p text:style-name="P15">Examples:</text:p>
          <text:list>
            <text:list-item>
              <text:p text:style-name="P15">OpenAI Codex: The backbone of GitHub Copilot, capable of writing code in multiple languages from prompts.</text:p>
            </text:list-item>
            <text:list-item>
              <text:p text:style-name="P15">Replit Ghostwriter: Generates code and explains it in real-time for educational or development purposes.</text:p>
            </text:list-item>
          </text:list>
        </text:list-item>
      </text:list>
      <text:p text:style-name="P10"/>
      <text:h text:style-name="Heading_20_2" text:outline-level="2">6. AI-Driven DevOps Tools</text:h>
      <text:p text:style-name="P10"/>
      <text:list xml:id="list3727565308" text:style-name="L17">
        <text:list-item>
          <text:p text:style-name="P16">Purpose: AI enhances the software development lifecycle beyond coding, into deployment and maintenance.</text:p>
        </text:list-item>
        <text:list-item>
          <text:p text:style-name="P16">Applications in Software Development:</text:p>
          <text:list>
            <text:list-item>
              <text:p text:style-name="P16">CI/CD Optimization: Predicts build failures or optimizes pipelines.</text:p>
            </text:list-item>
            <text:list-item>
              <text:p text:style-name="P16">Monitoring and Debugging: Detects anomalies in production environments.</text:p>
            </text:list-item>
          </text:list>
        </text:list-item>
        <text:list-item>
          <text:p text:style-name="P16">Examples:</text:p>
          <text:list>
            <text:list-item>
              <text:p text:style-name="P16">Jenkins with AI Plugins: Uses ML to predict build success rates and optimize workflows.</text:p>
            </text:list-item>
            <text:list-item>
              <text:p text:style-name="P16"><text:soft-page-break/>Dynatrace: AI-powered observability tool for monitoring and root cause analysis in production.</text:p>
            </text:list-item>
          </text:list>
        </text:list-item>
      </text:list>
      <text:p text:style-name="P10"/>
      <text:h text:style-name="Heading_20_2" text:outline-level="2">Popular AI Tools for Software Development (Summary)</text:h>
      <text:p text:style-name="P10"/>
      <table:table table:name="Table1" table:style-name="Table1">
        <table:table-column table:style-name="Table1.A" table:number-columns-repeated="3"/>
        <table:table-row table:style-name="Table1.1">
          <table:table-cell table:style-name="Table1.A1" office:value-type="string">
            <text:p text:style-name="P39">Tool</text:p>
          </table:table-cell>
          <table:table-cell table:style-name="Table1.A1" office:value-type="string">
            <text:p text:style-name="P39">AI Type</text:p>
          </table:table-cell>
          <table:table-cell table:style-name="Table1.C1" office:value-type="string">
            <text:p text:style-name="P39">Key Use Case</text:p>
          </table:table-cell>
        </table:table-row>
        <table:table-row>
          <table:table-cell table:style-name="Table1.A2" office:value-type="string">
            <text:p text:style-name="P17">GitHub Copilot</text:p>
          </table:table-cell>
          <table:table-cell table:style-name="Table1.A2" office:value-type="string">
            <text:p text:style-name="P17">ML + Generative AI</text:p>
          </table:table-cell>
          <table:table-cell table:style-name="Table1.C2" office:value-type="string">
            <text:p text:style-name="P17">Code generation, autocompletion</text:p>
          </table:table-cell>
        </table:table-row>
        <table:table-row>
          <table:table-cell table:style-name="Table1.A2" office:value-type="string">
            <text:p text:style-name="P17">ChatGPT</text:p>
          </table:table-cell>
          <table:table-cell table:style-name="Table1.A2" office:value-type="string">
            <text:p text:style-name="P17">NLP + Generative AI</text:p>
          </table:table-cell>
          <table:table-cell table:style-name="Table1.C2" office:value-type="string">
            <text:p text:style-name="P17">Code explanation, generation</text:p>
          </table:table-cell>
        </table:table-row>
        <table:table-row>
          <table:table-cell table:style-name="Table1.A2" office:value-type="string">
            <text:p text:style-name="P17">SonarQube</text:p>
          </table:table-cell>
          <table:table-cell table:style-name="Table1.A2" office:value-type="string">
            <text:p text:style-name="P17">Expert System</text:p>
          </table:table-cell>
          <table:table-cell table:style-name="Table1.C2" office:value-type="string">
            <text:p text:style-name="P17">Code quality analysis</text:p>
          </table:table-cell>
        </table:table-row>
        <table:table-row>
          <table:table-cell table:style-name="Table1.A2" office:value-type="string">
            <text:p text:style-name="P17">Tabnine</text:p>
          </table:table-cell>
          <table:table-cell table:style-name="Table1.A2" office:value-type="string">
            <text:p text:style-name="P17">ML</text:p>
          </table:table-cell>
          <table:table-cell table:style-name="Table1.C2" office:value-type="string">
            <text:p text:style-name="P17">Contextual code suggestions</text:p>
          </table:table-cell>
        </table:table-row>
        <table:table-row>
          <table:table-cell table:style-name="Table1.A2" office:value-type="string">
            <text:p text:style-name="P17">Testim/Mabl</text:p>
          </table:table-cell>
          <table:table-cell table:style-name="Table1.A2" office:value-type="string">
            <text:p text:style-name="P17">RL + ML</text:p>
          </table:table-cell>
          <table:table-cell table:style-name="Table1.C2" office:value-type="string">
            <text:p text:style-name="P17">Automated testing</text:p>
          </table:table-cell>
        </table:table-row>
        <table:table-row>
          <table:table-cell table:style-name="Table1.A2" office:value-type="string">
            <text:p text:style-name="P17">CodeGuru (AWS)</text:p>
          </table:table-cell>
          <table:table-cell table:style-name="Table1.A2" office:value-type="string">
            <text:p text:style-name="P17">NLP + ML</text:p>
          </table:table-cell>
          <table:table-cell table:style-name="Table1.C2" office:value-type="string">
            <text:p text:style-name="P17">Code review and optimization</text:p>
          </table:table-cell>
        </table:table-row>
      </table:table>
      <text:p text:style-name="P10"/>
      <text:p text:style-name="P10"/>
      <text:h text:style-name="Heading_20_2" text:outline-level="2">How These AIs Help Developers</text:h>
      <text:p text:style-name="P10"/>
      <text:list xml:id="list1234214644" text:style-name="L18">
        <text:list-item>
          <text:p text:style-name="P18">Productivity: Automates repetitive tasks like boilerplate coding or test case generation.</text:p>
        </text:list-item>
        <text:list-item>
          <text:p text:style-name="P18">Accuracy: Reduces human error in debugging, testing, and code reviews.</text:p>
        </text:list-item>
        <text:list-item>
          <text:p text:style-name="P18">Learning: Assists junior developers by explaining concepts or suggesting idiomatic code.</text:p>
        </text:list-item>
        <text:list-item>
          <text:p text:style-name="P18">Scalability: Speeds up large-scale refactoring or DevOps processes.</text:p>
        </text:list-item>
      </text:list>
      <text:p text:style-name="P10"/>
      <text:h text:style-name="Heading_20_1" text:outline-level="1">AI and ML in Robotics</text:h>
      <text:p text:style-name="P40"/>
      <text:h text:style-name="Heading_20_2" text:outline-level="2">Inverted Pendulum Robot</text:h>
      <text:p text:style-name="P40"/>
      <text:p text:style-name="P10">Using AI and Machine Learning (ML) to help your two-wheel inverted pendulum robot (like a self-balancing robot or a simplified Segway) learn to balance is a fantastic application of control theory and reinforcement learning (RL). This problem is a classic in robotics and ML, often compared to the cart-pole balancing task. Here’s a step-by-step guide on how you can approach this:</text:p>
      <text:p text:style-name="P10"/>
      <text:h text:style-name="Heading_20_3" text:outline-level="3">1. Understand the Problem</text:h>
      <text:p text:style-name="P10">An inverted pendulum robot balances on two wheels by adjusting motor speeds based on its tilt angle. The goal is to keep it upright despite disturbances. This is a dynamic system with:</text:p>
      <text:p text:style-name="P10"/>
      <text:list xml:id="list1024644105" text:style-name="L19">
        <text:list-item>
          <text:p text:style-name="P19">Inputs: Motor speeds (left and right wheels).</text:p>
        </text:list-item>
        <text:list-item>
          <text:p text:style-name="P19">Outputs: Tilt angle, angular velocity, and sometimes position/velocity of the robot.</text:p>
        </text:list-item>
        <text:list-item>
          <text:p text:style-name="P19">Objective: Minimize deviation from the vertical position (tilt angle ≈ 0).</text:p>
        </text:list-item>
      </text:list>
      <text:p text:style-name="P10"><text:soft-page-break/></text:p>
      <text:p text:style-name="P10">AI/ML can replace traditional control methods (like PID controllers) by learning an optimal policy through trial and error or supervised data.</text:p>
      <text:p text:style-name="P10"/>
      <text:h text:style-name="Heading_20_3" text:outline-level="3">2. Choose the Right ML Approach</text:h>
      <text:p text:style-name="P10">For a balancing task, Reinforcement Learning (RL) is the most natural fit because it allows the robot to learn by interacting with its environment. However, other ML techniques can assist in specific scenarios. Here are the options:</text:p>
      <text:p text:style-name="P10"/>
      <text:list xml:id="list912584143" text:style-name="L20">
        <text:list-item>
          <text:p text:style-name="P20">Reinforcement Learning (RL)</text:p>
        </text:list-item>
      </text:list>
      <text:list xml:id="list3374337811" text:style-name="L21">
        <text:list-item>
          <text:list>
            <text:list-item>
              <text:p text:style-name="P21">Why it works: RL trains an agent (your robot) to take actions (adjust motor speeds) to maximize a reward (staying balanced) without needing an explicit model of the system.</text:p>
            </text:list-item>
            <text:list-item>
              <text:p text:style-name="P21">Key Concepts:</text:p>
              <text:list>
                <text:list-item>
                  <text:p text:style-name="P21">State: Tilt angle (θ), angular velocity (dθ/dt), and optionally wheel velocities or position.</text:p>
                </text:list-item>
                <text:list-item>
                  <text:p text:style-name="P21">Action: Motor commands (e.g., voltage or PWM signals to motors).</text:p>
                </text:list-item>
                <text:list-item>
                  <text:p text:style-name="P21">Reward: Positive for staying near upright (e.g., -θ² to penalize large tilts), negative for falling.</text:p>
                </text:list-item>
              </text:list>
            </text:list-item>
            <text:list-item>
              <text:p text:style-name="P21">Algorithms:</text:p>
              <text:list>
                <text:list-item>
                  <text:p text:style-name="P21">Q-Learning: Simple tabular method for discrete actions/states.</text:p>
                </text:list-item>
                <text:list-item>
                  <text:p text:style-name="P21">Deep Q-Networks (DQN): Uses neural networks for continuous or complex state spaces.</text:p>
                </text:list-item>
                <text:list-item>
                  <text:p text:style-name="P21">Proximal Policy Optimization (PPO): A modern, stable RL algorithm great for robotics.</text:p>
                </text:list-item>
                <text:list-item>
                  <text:p text:style-name="P21">Soft Actor-Critic (SAC): Good for continuous action spaces and robust learning.</text:p>
                </text:list-item>
              </text:list>
            </text:list-item>
          </text:list>
        </text:list-item>
      </text:list>
      <text:list xml:id="list101226466388615" text:continue-list="list912584143" text:style-name="L20">
        <text:list-item>
          <text:p text:style-name="P20">Supervised Learning (Optional Baseline)</text:p>
        </text:list-item>
      </text:list>
      <text:list xml:id="list380985544" text:style-name="L22">
        <text:list-item>
          <text:list>
            <text:list-item>
              <text:p text:style-name="P22">Why it works: If you have a working controller (e.g., PID) or simulation data, you can use it to generate training data and train a neural network to mimic it.</text:p>
            </text:list-item>
            <text:list-item>
              <text:p text:style-name="P22">Process: Record state-action pairs (e.g., tilt angle → motor speed) from a stable system, then train a model to predict actions from states.</text:p>
            </text:list-item>
            <text:list-item>
              <text:p text:style-name="P22">Limitation: It won’t adapt beyond the training data, unlike RL.</text:p>
            </text:list-item>
          </text:list>
        </text:list-item>
      </text:list>
      <text:list xml:id="list101224619253536" text:continue-list="list101226466388615" text:style-name="L20">
        <text:list-item>
          <text:p text:style-name="P20">Hybrid Approach</text:p>
        </text:list-item>
      </text:list>
      <text:list xml:id="list936529650" text:style-name="L23">
        <text:list-item>
          <text:list>
            <text:list-item>
              <text:p text:style-name="P23">Combine a traditional controller (e.g., PID) with ML to fine-tune or adapt it to real-world noise and variability.</text:p>
            </text:list-item>
          </text:list>
        </text:list-item>
      </text:list>
      <text:p text:style-name="P10"/>
      <text:h text:style-name="Heading_20_3" text:outline-level="3">3. Set Up Your Robot and Environment</text:h>
      <text:p text:style-name="P10">To apply AI/ML, you need a way to simulate or test the robot’s behaviour.</text:p>
      <text:p text:style-name="P10"/>
      <text:list xml:id="list1329484260" text:style-name="L24">
        <text:list-item>
          <text:p text:style-name="P24">Sensors</text:p>
        </text:list-item>
      </text:list>
      <text:list xml:id="list2824668144" text:style-name="L25">
        <text:list-item>
          <text:list>
            <text:list-item>
              <text:p text:style-name="P25">IMU (Inertial Measurement Unit): Measures tilt angle (θ) and angular velocity (dθ/dt) using accelerometers and gyroscopes.</text:p>
            </text:list-item>
            <text:list-item>
              <text:p text:style-name="P25">Wheel Encoders (optional): Track wheel speed or position for more precise state information.</text:p>
            </text:list-item>
          </text:list>
        </text:list-item>
      </text:list>
      <text:list xml:id="list101224914356122" text:continue-list="list1329484260" text:style-name="L24">
        <text:list-item>
          <text:p text:style-name="P24">Actuators</text:p>
        </text:list-item>
      </text:list>
      <text:list xml:id="list2603728566" text:style-name="L26">
        <text:list-item>
          <text:list>
            <text:list-item>
              <text:p text:style-name="P26">Two DC motors with drivers (e.g., H-bridge) to control wheel speeds independently.</text:p>
            </text:list-item>
          </text:list>
        </text:list-item>
      </text:list>
      <text:list xml:id="list101225003599180" text:continue-list="list101224914356122" text:style-name="L24">
        <text:list-item>
          <text:p text:style-name="P24">Simulation (Recommended First Step)</text:p>
        </text:list-item>
      </text:list>
      <text:list xml:id="list1276381478" text:style-name="L27">
        <text:list-item>
          <text:list>
            <text:list-item>
              <text:p text:style-name="P27">Use a physics simulator to prototype your ML model before deploying it on hardware:</text:p>
              <text:list>
                <text:list-item>
                  <text:p text:style-name="P27">OpenAI Gym: Has a cart-pole environment you can adapt for two wheels.</text:p>
                </text:list-item>
                <text:list-item>
                  <text:p text:style-name="P27"><text:soft-page-break/>PyBullet or MuJoCo: More advanced simulators for custom robots.</text:p>
                </text:list-item>
                <text:list-item>
                  <text:p text:style-name="P27">Gazebo with ROS: Realistic simulation with Robot Operating System integration.</text:p>
                </text:list-item>
              </text:list>
            </text:list-item>
            <text:list-item>
              <text:p text:style-name="P27">Benefits: Avoids hardware damage, speeds up training, and allows unlimited trials.</text:p>
            </text:list-item>
          </text:list>
        </text:list-item>
      </text:list>
      <text:list xml:id="list101225717761389" text:continue-list="list101225003599180" text:style-name="L24">
        <text:list-item>
          <text:p text:style-name="P24">Microcontroller/Processor</text:p>
        </text:list-item>
      </text:list>
      <text:list xml:id="list1657398498" text:style-name="L29">
        <text:list-item>
          <text:list>
            <text:list-item>
              <text:p text:style-name="P28">Hardware like Raspberry Pi, Arduino, or an ESP32 to run the trained model or interface with a PC for real-time control.</text:p>
            </text:list-item>
          </text:list>
        </text:list-item>
      </text:list>
      <text:p text:style-name="P10"/>
      <text:h text:style-name="Heading_20_3" text:outline-level="3">4. Implement Reinforcement Learning</text:h>
      <text:p text:style-name="P10"/>
      <text:p text:style-name="P10">Here’s a practical workflow using RL (e.g., PPO algorithm):</text:p>
      <text:p text:style-name="P10"/>
      <text:list xml:id="list3996214972" text:style-name="L30">
        <text:list-item>
          <text:p text:style-name="P29">Define the State Space</text:p>
        </text:list-item>
      </text:list>
      <text:list xml:id="list2673148343" text:style-name="L31">
        <text:list-item>
          <text:list>
            <text:list-item>
              <text:p text:style-name="P30">Example: [θ, dθ/dt, wheel_velocity_left, wheel_velocity_right].</text:p>
            </text:list-item>
            <text:list-item>
              <text:p text:style-name="P30">Normalize these values (e.g., θ in radians, velocities in reasonable ranges).</text:p>
            </text:list-item>
          </text:list>
        </text:list-item>
      </text:list>
      <text:list xml:id="list101226045407943" text:continue-list="list3996214972" text:style-name="L30">
        <text:list-item>
          <text:p text:style-name="P29">Define the Action Space</text:p>
        </text:list-item>
      </text:list>
      <text:list xml:id="list2352764809" text:style-name="L32">
        <text:list-item>
          <text:list>
            <text:list-item>
              <text:p text:style-name="P31">Continuous: Motor speeds (e.g., -1 to 1, scaled to PWM or voltage).</text:p>
            </text:list-item>
            <text:list-item>
              <text:p text:style-name="P31">Discrete (simpler): Predefined commands (e.g., "increase left speed," "decrease right speed").</text:p>
            </text:list-item>
          </text:list>
        </text:list-item>
      </text:list>
      <text:list xml:id="list101225835385290" text:continue-list="list101226045407943" text:style-name="L30">
        <text:list-item>
          <text:p text:style-name="P29">Design the Reward Function</text:p>
        </text:list-item>
      </text:list>
      <text:list xml:id="list2175579240" text:style-name="L33">
        <text:list-item>
          <text:list>
            <text:list-item>
              <text:p text:style-name="P32">Example: reward = -k1 * θ² - k2 * (dθ/dt)² + c</text:p>
              <text:list>
                <text:list-item>
                  <text:p text:style-name="P32">Penalizes large tilt angles and angular velocities.</text:p>
                </text:list-item>
                <text:list-item>
                  <text:p text:style-name="P32">Add a small constant (c) for staying alive, or a bonus for staying near θ = 0.</text:p>
                </text:list-item>
                <text:list-item>
                  <text:p text:style-name="P32">Penalize heavily if the robot falls (e.g., θ &gt; threshold).</text:p>
                </text:list-item>
              </text:list>
            </text:list-item>
          </text:list>
        </text:list-item>
      </text:list>
      <text:list xml:id="list101225438033873" text:continue-list="list101225835385290" text:style-name="L30">
        <text:list-item>
          <text:p text:style-name="P29">Choose a Framework</text:p>
        </text:list-item>
      </text:list>
      <text:list xml:id="list866246891" text:style-name="L34">
        <text:list-item>
          <text:list>
            <text:list-item>
              <text:p text:style-name="P33">Python Libraries:</text:p>
              <text:list>
                <text:list-item>
                  <text:p text:style-name="P33">Stable-Baselines3: Implements PPO, SAC, DQN with easy-to-use APIs.</text:p>
                </text:list-item>
                <text:list-item>
                  <text:p text:style-name="P33">RLlib (Ray): Scalable RL for more complex setups.</text:p>
                </text:list-item>
                <text:list-item>
                  <text:p text:style-name="P33">TensorFlow/PyTorch: Build custom RL models if needed.</text:p>
                </text:list-item>
              </text:list>
            </text:list-item>
            <text:list-item>
              <text:p text:style-name="P33">Simulation Integration: Pair with OpenAI Gym or PyBullet.</text:p>
            </text:list-item>
          </text:list>
        </text:list-item>
      </text:list>
      <text:list xml:id="list101225273880655" text:continue-list="list101225438033873" text:style-name="L30">
        <text:list-item>
          <text:p text:style-name="P29">Train the Model</text:p>
        </text:list-item>
      </text:list>
      <text:list xml:id="list891425212" text:style-name="L35">
        <text:list-item>
          <text:list>
            <text:list-item>
              <text:p text:style-name="P34">Start in simulation:</text:p>
            </text:list-item>
          </text:list>
        </text:list-item>
      </text:list>
      <text:list xml:id="list1882100371" text:style-name="L36">
        <text:list-item>
          <text:list>
            <text:list-item>
              <text:list>
                <text:list-item>
                  <text:p text:style-name="P35">Initialize a random policy.</text:p>
                </text:list-item>
                <text:list-item>
                  <text:p text:style-name="P35">Let the robot "explore" by taking actions and collecting state-action-reward tuples.</text:p>
                </text:list-item>
                <text:list-item>
                  <text:p text:style-name="P35">Update the policy using the RL algorithm (e.g., PPO optimizes based on rewards).</text:p>
                </text:list-item>
              </text:list>
            </text:list-item>
          </text:list>
        </text:list-item>
      </text:list>
      <text:list xml:id="list101225652185252" text:continue-list="list891425212" text:style-name="L35">
        <text:list-item>
          <text:list>
            <text:list-item>
              <text:p text:style-name="P34">Training might take thousands of episodes—tune hyper-parameters (learning rate, episode length) as needed.</text:p>
            </text:list-item>
          </text:list>
        </text:list-item>
      </text:list>
      <text:list xml:id="list101225929118646" text:continue-list="list101225273880655" text:style-name="L30">
        <text:list-item>
          <text:p text:style-name="P29">Deploy to Hardware</text:p>
        </text:list-item>
      </text:list>
      <text:list xml:id="list110245211" text:style-name="L37">
        <text:list-item>
          <text:list>
            <text:list-item>
              <text:p text:style-name="P36">Export the trained model (e.g., as a TensorFlow Lite model for microcontrollers).</text:p>
            </text:list-item>
            <text:list-item>
              <text:p text:style-name="P36">Real-time loop: Read sensor data → Feed to model → Output motor commands.</text:p>
            </text:list-item>
          </text:list>
        </text:list-item>
      </text:list>
      <text:p text:style-name="P10"/>
      <text:h text:style-name="Heading_20_3" text:outline-level="3">5. Practical Example: Using PPO with Stable-Baselines3</text:h>
      <text:p text:style-name="P10"/>
      <text:p text:style-name="P10">Here’s a simplified code sketch (assuming a simulation environment):</text:p>
      <text:p text:style-name="P10">python</text:p>
      <text:p text:style-name="P10"><text:soft-page-break/></text:p>
      <text:p text:style-name="P4"><text:span text:style-name="Source_20_Text"><text:span text:style-name="T1">from stable_baselines3 import PPO</text:span></text:span></text:p>
      <text:p text:style-name="Preformatted_20_Text"><text:span text:style-name="Source_20_Text"><text:span text:style-name="T1">from gym import Env</text:span></text:span></text:p>
      <text:p text:style-name="Preformatted_20_Text"><text:span text:style-name="Source_20_Text"><text:span text:style-name="T1">from gym.spaces import Box</text:span></text:span></text:p>
      <text:p text:style-name="Preformatted_20_Text"><text:span text:style-name="Source_20_Text"><text:span text:style-name="T1">import numpy as np</text:span></text:span></text:p>
      <text:p text:style-name="Preformatted_20_Text"/>
      <text:p text:style-name="Preformatted_20_Text"><text:span text:style-name="Source_20_Text"><text:span text:style-name="T1"># Custom environment for your robot (simplified)</text:span></text:span></text:p>
      <text:p text:style-name="Preformatted_20_Text"><text:span text:style-name="Source_20_Text"><text:span text:style-name="T1">class PendulumRobotEnv(Env):</text:span></text:span></text:p>
      <text:p text:style-name="Preformatted_20_Text"><text:span text:style-name="Source_20_Text"><text:span text:style-name="T2"><text:s text:c="4"/></text:span></text:span><text:span text:style-name="Source_20_Text"><text:span text:style-name="T1">def __init__(self):</text:span></text:span></text:p>
      <text:p text:style-name="Preformatted_20_Text"><text:span text:style-name="Source_20_Text"><text:span text:style-name="T2"><text:s text:c="8"/></text:span></text:span><text:span text:style-name="Source_20_Text"><text:span text:style-name="T1">self.action_space = Box(low=-1.0, high=1.0, shape=(2,)) <text:s/># Motor speeds</text:span></text:span></text:p>
      <text:p text:style-name="Preformatted_20_Text"><text:span text:style-name="Source_20_Text"><text:span text:style-name="T2"><text:s text:c="8"/></text:span></text:span><text:span text:style-name="Source_20_Text"><text:span text:style-name="T1">self.observation_space = Box(low=-np.inf, high=np.inf, shape=(4,)) <text:s/># [θ, dθ/dt, v_left, v_right]</text:span></text:span></text:p>
      <text:p text:style-name="Preformatted_20_Text"><text:span text:style-name="Source_20_Text"><text:span text:style-name="T2"><text:s text:c="8"/></text:span></text:span><text:span text:style-name="Source_20_Text"><text:span text:style-name="T1">self.state = None</text:span></text:span></text:p>
      <text:p text:style-name="Preformatted_20_Text"><text:span text:style-name="Source_20_Text"><text:span text:style-name="T2"><text:s text:c="8"/></text:span></text:span><text:span text:style-name="Source_20_Text"><text:span text:style-name="T1">self.max_angle = 0.5 <text:s/># Radians (~30°)</text:span></text:span></text:p>
      <text:p text:style-name="Preformatted_20_Text"/>
      <text:p text:style-name="Preformatted_20_Text"><text:span text:style-name="Source_20_Text"><text:span text:style-name="T2"><text:s text:c="4"/></text:span></text:span><text:span text:style-name="Source_20_Text"><text:span text:style-name="T1">def reset(self):</text:span></text:span></text:p>
      <text:p text:style-name="Preformatted_20_Text"><text:span text:style-name="Source_20_Text"><text:span text:style-name="T2"><text:s text:c="8"/></text:span></text:span><text:span text:style-name="Source_20_Text"><text:span text:style-name="T1">self.state = np.array([0.1, 0.0, 0.0, 0.0]) <text:s/># Small initial tilt</text:span></text:span></text:p>
      <text:p text:style-name="Preformatted_20_Text"><text:span text:style-name="Source_20_Text"><text:span text:style-name="T2"><text:s text:c="8"/></text:span></text:span><text:span text:style-name="Source_20_Text"><text:span text:style-name="T1">return self.state</text:span></text:span></text:p>
      <text:p text:style-name="Preformatted_20_Text"/>
      <text:p text:style-name="Preformatted_20_Text"><text:span text:style-name="Source_20_Text"><text:span text:style-name="T2"><text:s text:c="4"/></text:span></text:span><text:span text:style-name="Source_20_Text"><text:span text:style-name="T1">def step(self, action):</text:span></text:span></text:p>
      <text:p text:style-name="Preformatted_20_Text"><text:span text:style-name="Source_20_Text"><text:span text:style-name="T2"><text:s text:c="8"/></text:span></text:span><text:span text:style-name="Source_20_Text"><text:span text:style-name="T1"># Simulate physics (replace with your dynamics or simulator)</text:span></text:span></text:p>
      <text:p text:style-name="Preformatted_20_Text"><text:span text:style-name="Source_20_Text"><text:span text:style-name="T2"><text:s text:c="8"/></text:span></text:span><text:span text:style-name="Source_20_Text"><text:span text:style-name="T1">θ, dθ_dt, v_left, v_right = self.state</text:span></text:span></text:p>
      <text:p text:style-name="Preformatted_20_Text"><text:span text:style-name="Source_20_Text"><text:span text:style-name="T2"><text:s text:c="8"/></text:span></text:span><text:span text:style-name="Source_20_Text"><text:span text:style-name="T1"># Update state based on action (motor speeds)</text:span></text:span></text:p>
      <text:p text:style-name="Preformatted_20_Text"><text:span text:style-name="Source_20_Text"><text:span text:style-name="T2"><text:s text:c="8"/></text:span></text:span><text:span text:style-name="Source_20_Text"><text:span text:style-name="T1">new_θ = θ + dθ_dt * 0.01 <text:s/># Simplified physics</text:span></text:span></text:p>
      <text:p text:style-name="Preformatted_20_Text"><text:span text:style-name="Source_20_Text"><text:span text:style-name="T2"><text:s text:c="8"/></text:span></text:span><text:span text:style-name="Source_20_Text"><text:span text:style-name="T1">new_dθ_dt = dθ_dt + (action[0] - action[1]) * 0.1 <text:s/># Torque from motors</text:span></text:span></text:p>
      <text:p text:style-name="Preformatted_20_Text"><text:span text:style-name="Source_20_Text"><text:span text:style-name="T2"><text:s text:c="8"/></text:span></text:span><text:span text:style-name="Source_20_Text"><text:span text:style-name="T1">self.state = np.array([new_θ, new_dθ_dt, action[0], action[1]])</text:span></text:span></text:p>
      <text:p text:style-name="Preformatted_20_Text"/>
      <text:p text:style-name="Preformatted_20_Text"><text:span text:style-name="Source_20_Text"><text:span text:style-name="T2"><text:s text:c="8"/></text:span></text:span><text:span text:style-name="Source_20_Text"><text:span text:style-name="T1"># Reward</text:span></text:span></text:p>
      <text:p text:style-name="Preformatted_20_Text"><text:span text:style-name="Source_20_Text"><text:span text:style-name="T2"><text:s text:c="8"/></text:span></text:span><text:span text:style-name="Source_20_Text"><text:span text:style-name="T1">reward = -θ**2 - 0.1 * dθ_dt**2</text:span></text:span></text:p>
      <text:p text:style-name="Preformatted_20_Text"><text:span text:style-name="Source_20_Text"><text:span text:style-name="T2"><text:s text:c="8"/></text:span></text:span><text:span text:style-name="Source_20_Text"><text:span text:style-name="T1">done = abs(new_θ) &gt; self.max_angle <text:s/># Fall condition</text:span></text:span></text:p>
      <text:p text:style-name="Preformatted_20_Text"><text:span text:style-name="Source_20_Text"><text:span text:style-name="T2"><text:s text:c="8"/></text:span></text:span><text:span text:style-name="Source_20_Text"><text:span text:style-name="T1">return self.state, reward, done, {}</text:span></text:span></text:p>
      <text:p text:style-name="Preformatted_20_Text"/>
      <text:p text:style-name="Preformatted_20_Text"><text:span text:style-name="Source_20_Text"><text:span text:style-name="T1"># Train the model</text:span></text:span></text:p>
      <text:p text:style-name="Preformatted_20_Text"><text:span text:style-name="Source_20_Text"><text:span text:style-name="T1">env = PendulumRobotEnv()</text:span></text:span></text:p>
      <text:p text:style-name="Preformatted_20_Text"><text:span text:style-name="Source_20_Text"><text:span text:style-name="T1">model = PPO("MlpPolicy", env, verbose=1)</text:span></text:span></text:p>
      <text:p text:style-name="Preformatted_20_Text"><text:span text:style-name="Source_20_Text"><text:span text:style-name="T1">model.learn(total_timesteps=100000)</text:span></text:span></text:p>
      <text:p text:style-name="Preformatted_20_Text"/>
      <text:p text:style-name="Preformatted_20_Text"><text:span text:style-name="Source_20_Text"><text:span text:style-name="T1"># Test the trained model</text:span></text:span></text:p>
      <text:p text:style-name="Preformatted_20_Text"><text:span text:style-name="Source_20_Text"><text:span text:style-name="T1">obs = env.reset()</text:span></text:span></text:p>
      <text:p text:style-name="Preformatted_20_Text"><text:span text:style-name="Source_20_Text"><text:span text:style-name="T1">for _ in range(1000):</text:span></text:span></text:p>
      <text:p text:style-name="Preformatted_20_Text"><text:span text:style-name="Source_20_Text"><text:span text:style-name="T2"><text:s text:c="4"/></text:span></text:span><text:span text:style-name="Source_20_Text"><text:span text:style-name="T1">action, _ = model.predict(obs)</text:span></text:span></text:p>
      <text:p text:style-name="Preformatted_20_Text"><text:span text:style-name="Source_20_Text"><text:span text:style-name="T2"><text:s text:c="4"/></text:span></text:span><text:span text:style-name="Source_20_Text"><text:span text:style-name="T1">obs, reward, done, _ = env.step(action)</text:span></text:span></text:p>
      <text:p text:style-name="Preformatted_20_Text"><text:span text:style-name="Source_20_Text"><text:span text:style-name="T2"><text:s text:c="4"/></text:span></text:span><text:span text:style-name="Source_20_Text"><text:span text:style-name="T1">if done:</text:span></text:span></text:p>
      <text:p text:style-name="P3"><text:span text:style-name="Source_20_Text"><text:span text:style-name="T2"><text:s text:c="8"/></text:span></text:span><text:span text:style-name="Source_20_Text"><text:span text:style-name="T1">obs = env.reset()</text:span></text:span></text:p>
      <text:p text:style-name="P10"/>
      <text:h text:style-name="Heading_20_3" text:outline-level="3">6. Challenges and Tips</text:h>
      <text:p text:style-name="P10"/>
      <text:list xml:id="list3836250112" text:style-name="L38">
        <text:list-item>
          <text:p text:style-name="P37">Simulation-to-Reality Gap: Train in simulation, then fine-tune on the real robot to account for noise and friction.</text:p>
        </text:list-item>
        <text:list-item>
          <text:p text:style-name="P37">Sensor Noise: Filter IMU data (e.g., with a Kalman filter) for stable inputs.</text:p>
        </text:list-item>
        <text:list-item>
          <text:p text:style-name="P37">Safety: Add limits to motor commands to prevent damage.</text:p>
        </text:list-item>
        <text:list-item>
          <text:p text:style-name="P37">Start Simple: Test with a prebuilt environment (e.g., Gym’s CartPole) to learn RL basics.</text:p>
        </text:list-item>
      </text:list>
      <text:p text:style-name="P10"/>
      <text:p text:style-name="P10"/>
      <text:h text:style-name="Heading_20_3" text:outline-level="3"><text:soft-page-break/>7. Alternative: Traditional Control + ML</text:h>
      <text:p text:style-name="P10">If RL feels overwhelming, start with a PID controller:</text:p>
      <text:p text:style-name="P10"/>
      <text:list xml:id="list2153034280" text:style-name="L39">
        <text:list-item>
          <text:p text:style-name="P38">Use ML to tune PID gains dynamically based on performance data.</text:p>
        </text:list-item>
        <text:list-item>
          <text:p text:style-name="P38">Gradually transition to RL for adaptability.</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witterChirp" svg:font-family="TwitterChirp, System"/>
    <style:font-face style:name="TwitterChirp1" svg:font-family="TwitterChirp, apple-system, BlinkMacSystemFont, 'Segoe UI', Roboto, Helvetica, Arial, sans-serif"/>
    <style:font-face style:name="inherit" svg:font-family="inherit"/>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02-22T09:19:41.465503598</meta:creation-date>
    <dc:date>2025-02-22T10:12:24.145604694</dc:date>
    <meta:editing-duration>PT9M43S</meta:editing-duration>
    <meta:editing-cycles>1</meta:editing-cycles>
    <meta:document-statistic meta:table-count="1" meta:image-count="0" meta:object-count="0" meta:page-count="9" meta:paragraph-count="249" meta:word-count="2394" meta:character-count="15782" meta:non-whitespace-character-count="13605"/>
    <meta:generator>LibreOffice/7.3.7.2$MacOSX_X86_64 LibreOffice_project/e114eadc50a9ff8d8c8a0567d6da8f454beeb84f</meta:generator>
  </office:meta>
</office:document-meta>
</file>