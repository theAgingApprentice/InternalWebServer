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monospace" svg:font-family="monospace"/>
    <style:font-face style:name="sans-serif" svg:font-family="sans-serif"/>
  </office:font-face-decls>
  <office:automatic-styles>
    <style:style style:name="P1" style:family="paragraph" style:parent-style-name="Standard">
      <style:paragraph-properties fo:margin-left="0cm" fo:margin-right="0cm" fo:text-indent="0cm" style:auto-text-indent="false"/>
      <style:text-properties fo:color="#000000" loext:opacity="100%" style:font-name="sans-serif" officeooo:paragraph-rsid="0011ec7b" fo:background-color="transparent"/>
    </style:style>
    <style:style style:name="P2" style:family="paragraph" style:parent-style-name="Subtitle">
      <style:paragraph-properties fo:margin-top="0cm" fo:margin-bottom="0cm" style:contextual-spacing="false"/>
    </style:style>
    <style:style style:name="P3" style:family="paragraph" style:parent-style-name="Text_20_body">
      <style:paragraph-properties fo:margin-left="0cm" fo:margin-right="0cm" fo:text-indent="0cm" style:auto-text-indent="false"/>
      <style:text-properties fo:color="#000000" loext:opacity="100%" style:font-name="sans-serif" officeooo:paragraph-rsid="0011ec7b" fo:background-color="transparent"/>
    </style:style>
    <style:style style:name="P4"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5"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 style:family="paragraph" style:parent-style-name="Text_20_body">
      <style:paragraph-properties fo:margin-left="0cm" fo:margin-right="0cm" fo:margin-top="0cm" fo:margin-bottom="0cm" style:contextual-spacing="false" fo:text-indent="0cm" style:auto-text-indent="false"/>
      <style:text-properties fo:color="#000000" loext:opacity="100%" style:font-name="sans-serif" fo:background-color="transparent"/>
    </style:style>
    <style:style style:name="P7"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 style:family="paragraph" style:parent-style-name="Text_20_body">
      <style:paragraph-properties fo:margin-left="0cm" fo:margin-right="0cm" fo:margin-top="0cm" fo:margin-bottom="0cm" style:contextual-spacing="false" fo:text-indent="0cm" style:auto-text-indent="false"/>
      <style:text-properties fo:color="#000000" loext:opacity="100%" style:font-name="sans-serif" officeooo:paragraph-rsid="0011ec7b" fo:background-color="transparent"/>
    </style:style>
    <style:style style:name="P9" style:family="paragraph" style:parent-style-name="Heading_20_2">
      <style:paragraph-properties fo:margin-top="0cm" fo:margin-bottom="0cm" style:contextual-spacing="false"/>
    </style:style>
    <style:style style:name="P10" style:family="paragraph" style:parent-style-name="Heading_20_2">
      <style:text-properties style:font-name="Liberation Sans" fo:font-size="18pt" style:font-size-asian="18pt" style:font-size-complex="18pt"/>
    </style:style>
    <style:style style:name="P11" style:family="paragraph" style:parent-style-name="Text_20_body">
      <style:paragraph-properties fo:margin-left="0cm" fo:margin-right="0cm" fo:text-indent="0cm" style:auto-text-indent="false"/>
      <style:text-properties officeooo:paragraph-rsid="0011ec7b"/>
    </style:style>
    <style:style style:name="P12"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3" style:family="paragraph" style:parent-style-name="Text_20_body">
      <style:paragraph-properties fo:margin-left="0cm" fo:margin-right="0cm" fo:text-indent="0cm" style:auto-text-indent="false"/>
      <style:text-properties fo:color="#000000" loext:opacity="100%" style:font-name="sans-serif" fo:background-color="transparent"/>
    </style:style>
    <style:style style:name="P14"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5"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6" style:family="paragraph" style:parent-style-name="Preformatted_20_Text" style:list-style-name="L5">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7" style:family="paragraph" style:parent-style-name="Text_20_body" style:list-style-name="L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8"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9" style:family="paragraph" style:parent-style-name="Text_20_body" style:list-style-name="L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0" style:family="paragraph" style:parent-style-name="Text_20_body" style:list-style-name="L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1" style:family="paragraph" style:parent-style-name="Preformatted_20_Text" style:list-style-name="L7">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2"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T1" style:family="text">
      <style:text-properties style:font-name="monospace" fo:font-size="10pt"/>
    </style:style>
    <style:style style:name="T2" style:family="text">
      <style:text-properties fo:color="#000000" loext:opacity="100%" fo:background-color="transparent" loext:char-shading-value="0"/>
    </style:style>
    <style:style style:name="T3" style:family="text">
      <style:text-properties fo:color="#000000" loext:opacity="100%" style:font-name="sans-serif" fo:background-color="transparent" loext:char-shading-value="0"/>
    </style:style>
    <style:style style:name="T4" style:family="text">
      <style:text-properties fo:color="#000000" loext:opacity="100%" style:font-name="monospace" fo:font-size="10pt" fo:background-color="transparent" loext:char-shading-value="0"/>
    </style:style>
    <style:style style:name="T5" style:family="text">
      <style:text-properties fo:color="#000000" loext:opacity="100%" style:font-name="Liberation Sans" fo:font-size="18pt" fo:background-color="transparent" loext:char-shading-value="0" style:font-size-asian="18pt" style:font-size-complex="18pt"/>
    </style:style>
    <style:style style:name="fr1" style:family="graphic" style:parent-style-name="Inline_20_Heading">
      <style:graphic-properties style:vertical-pos="middle" style:vertical-rel="text"/>
    </style:style>
    <text:list-style style:name="L1">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text:bullet-char="•">
        <style:list-level-properties text:space-before="2.002cm" text:min-label-width="0.499cm"/>
        <style:text-properties style:font-name="OpenSymbol"/>
      </text:list-level-style-bullet>
      <text:list-level-style-bullet text:level="3" text:style-name="Bullet_20_Symbols" text:bullet-char="•">
        <style:list-level-properties text:space-before="3.253cm" text:min-label-width="0.499cm"/>
        <style:text-properties style:font-name="OpenSymbol"/>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derstanding the ESP32 Firmware Upload Process with PlatformIO</text:p>
      <text:p text:style-name="P1"><draw:frame draw:style-name="fr1" draw:name="Frame1" text:anchor-type="as-char" draw:z-index="0"><draw:text-box fo:min-height="0cm" fo:min-width="0cm"><text:p text:style-name="P2">A Deep Dive into Memory, Bootloader, and Python Logic</text:p></draw:text-box></draw:frame><text:line-break/>Published: August 30, 2025 </text:p>
      <text:p text:style-name="P1"/>
      <text:p text:style-name="P1">The ESP32, a powerful dual-core microcontroller from Espressif Systems, is a favorite among hobbyist makers for its Wi-Fi, Bluetooth, and versatile GPIO capabilities. When using PlatformIO in Visual Studio Code (VS Code) on a Mac to develop for the ESP32, uploading firmware to the device’s flash memory is a critical task. This process involves a sophisticated interplay of the ESP32’s memory map, its bootloader, and PlatformIO’s Python-based tooling, specifically <text:span text:style-name="T1">esptool.py</text:span>. This technical article provides a comprehensive, end-to-end explanation of the firmware upload process, detailing the ESP32 memory map, the bootloader’s operation, and the logic of the Python script driving the upload. Written for hobbyist makers, this guide aims to demystify the process with a clear, technical perspective.</text:p>
      <text:p text:style-name="P1"/>
      <text:h text:style-name="Heading_20_1" text:outline-level="1">The ESP32 Memory Map: A Foundation for Firmware Storage</text:h>
      <text:p text:style-name="P3">The ESP32’s memory architecture is central to understanding how firmware is stored and executed. The ESP32 features multiple memory types, each serving distinct purposes. Below is an overview of the memory map relevant to firmware uploads:</text:p>
      <text:list text:style-name="L1">
        <text:list-item>
          <text:p text:style-name="P4">Internal SRAM: The ESP32 has two SRAM regions: SRAM0 (192 KB) and SRAM1 (328 KB). These are used for runtime data, including the stack, heap, and temporary buffers during firmware execution. SRAM is volatile and not used for permanent firmware storage.</text:p>
        </text:list-item>
        <text:list-item>
          <text:p text:style-name="P4">External SPI Flash: The ESP32 relies on external SPI flash (typically 4 MB, though 2 MB to 16 MB are common) for non-volatile storage of firmware, configuration, and user applications. The flash memory is mapped to the ESP32’s address space starting at <text:span text:style-name="T1">0x3F400000</text:span>.</text:p>
        </text:list-item>
        <text:list-item>
          <text:p text:style-name="P4">ROM: The ESP32 includes 448 KB of read-only memory (ROM) at <text:span text:style-name="T1">0x40000000</text:span>, containing Espressif’s low-level boot code and basic functions (e.g., UART drivers). This ROM is immutable and not used for user firmware.</text:p>
        </text:list-item>
        <text:list-item>
          <text:p text:style-name="P4">Instruction RAM (IRAM): A portion of SRAM1 can be mapped as IRAM for executing performance-critical code, starting at <text:span text:style-name="T1">0x40080000</text:span>.</text:p>
        </text:list-item>
        <text:list-item>
          <text:p text:style-name="P4">Data RAM (DRAM): Used for global variables and runtime data, mapped alongside IRAM in SRAM1.</text:p>
        </text:list-item>
        <text:list-item>
          <text:p text:style-name="P4">Flash Cache: The ESP32 uses a memory-mapped cache to accelerate access to SPI flash, mapped at <text:span text:style-name="T1">0x3F400000</text:span> to <text:span text:style-name="T1">0x3F7FFFFF</text:span>.</text:p>
        </text:list-item>
        <text:list-item>
          <text:p text:style-name="P4"/>
        </text:list-item>
      </text:list>
      <text:p text:style-name="P3"><text:soft-page-break/><draw:frame draw:style-name="fr1" draw:name="Frame2" text:anchor-type="as-char" draw:z-index="1"><draw:text-box fo:min-height="0cm" fo:min-width="0cm"><text:h text:style-name="Heading_20_2" text:outline-level="2">Firmware Storage in SPI Flash</text:h></draw:text-box></draw:frame><text:s/></text:p>
      <text:p text:style-name="P3">The firmware, compiled into a binary by PlatformIO, is stored in the SPI flash. The flash memory is partitioned to organize different components:</text:p>
      <text:list text:style-name="L2">
        <text:list-item>
          <text:p text:style-name="P5">Bootloader: Stored at offset <text:span text:style-name="T1">0x1000</text:span> (4 KB). This is the first code executed on boot.</text:p>
        </text:list-item>
        <text:list-item>
          <text:p text:style-name="P5">Partition Table: Located at <text:span text:style-name="T1">0x8000</text:span> (default, 3 KB). Defines the layout of the flash, including regions for the application, OTA updates, and file systems (e.g., SPIFFS).</text:p>
        </text:list-item>
        <text:list-item>
          <text:p text:style-name="P5">Application Firmware: Typically starts at <text:span text:style-name="T1">0x10000</text:span> (64 KB offset). This is the user program compiled from Arduino or ESP-IDF code.</text:p>
        </text:list-item>
        <text:list-item>
          <text:p text:style-name="P5">NVS (Non-Volatile Storage): Used for configuration data, often at a higher offset (e.g., <text:span text:style-name="T1">0x9000</text:span> or as defined in the partition table).</text:p>
        </text:list-item>
      </text:list>
      <text:p text:style-name="P6"/>
      <text:p text:style-name="P6">The memory map ensures that the bootloader, partition table, and application firmware are stored in specific, non-overlapping regions of the flash, allowing the ESP32 to locate and execute the correct code on boot.</text:p>
      <text:p text:style-name="P6"/>
      <text:h text:style-name="Heading_20_1" text:outline-level="1">The ESP32 Boot Sequence: From Power-On to Application</text:h>
      <text:p text:style-name="P3">The ESP32’s boot sequence is a critical process that prepares the microcontroller to run the uploaded firmware. Understanding this sequence helps clarify how PlatformIO interacts with the ESP32 during firmware uploads. The boot process involves the following steps:</text:p>
      <text:list text:style-name="L3">
        <text:list-item>
          <text:p text:style-name="P7">Power-On Reset or Hardware Reset: When the ESP32 is powered on or reset (via the EN pin), the chip initializes its hardware, including clocks and GPIOs. The ROM bootloader, embedded in the ESP32’s ROM, is the first code to execute.</text:p>
        </text:list-item>
        <text:list-item>
          <text:p text:style-name="P7">ROM Bootloader: The ROM bootloader, located at <text:span text:style-name="T1">0x40000000</text:span>, checks the state of GPIO0. If GPIO0 is low (grounded), the ESP32 enters download mode (also called bootloader mode). If GPIO0 is high or floating, it proceeds to load the second-stage bootloader from flash.</text:p>
        </text:list-item>
        <text:list-item>
          <text:p text:style-name="P7">Second-Stage Bootloader: Stored at <text:span text:style-name="T1">0x1000</text:span> in SPI flash, this bootloader (provided by Espressif’s SDK) initializes the SPI flash interface, reads the partition table at <text:span text:style-name="T1">0x8000</text:span>, and locates the application firmware (usually at <text:span text:style-name="T1">0x10000</text:span>). It performs basic integrity checks and loads the firmware into SRAM for execution.</text:p>
        </text:list-item>
        <text:list-item>
          <text:p text:style-name="P7">Application Execution: Once the application firmware is loaded, the bootloader transfers control to the application’s entry point, and the user program begins running. If the firmware is invalid or missing, the bootloader may fall back to download mode.</text:p>
        </text:list-item>
      </text:list>
      <text:p text:style-name="P8"/>
      <text:p text:style-name="P8"/>
      <text:p text:style-name="P8"/>
      <text:p text:style-name="P8"/>
      <text:p text:style-name="P8"><text:soft-page-break/><draw:frame draw:style-name="fr1" draw:name="Frame3" text:anchor-type="as-char" draw:z-index="2"><draw:text-box fo:min-height="0cm" fo:min-width="0cm"><text:h text:style-name="P9" text:outline-level="2">Download Mode for Firmware Uploads</text:h></draw:text-box></draw:frame><text:s/></text:p>
      <text:p text:style-name="P8">During firmware uploads, PlatformIO forces the ESP32 into download mode by manipulating control signals (DTR and RTS) to reset the chip and hold GPIO0 low. This mode allows the ESP32 to accept new firmware via UART0 (GPIO1/TX, GPIO3/RX).</text:p>
      <text:h text:style-name="Heading_20_1" text:outline-level="1">PlatformIO’s Python Script </text:h>
      <text:h text:style-name="P10" text:outline-level="2"><text:span text:style-name="T2">The Logic of </text:span><text:span text:style-name="T2">esptool.py</text:span></text:h>
      <text:p text:style-name="P11"><text:span text:style-name="T3">PlatformIO uses </text:span><text:span text:style-name="T4">esptool.py</text:span><text:span text:style-name="T3">, a Python script developed by Espressif, to manage the firmware upload process. This script handles communication with the ESP32’s bootloader over UART, ensuring reliable transfer of the compiled binary to the SPI flash. Below is a detailed breakdown of the script’s logic, based on its typical implementation (e.g., version 4.x, commonly used with PlatformIO).</text:span></text:p>
      <text:h text:style-name="Heading_20_2" text:outline-level="2"><text:span text:style-name="T3">Key Components of</text:span><text:span text:style-name="T5"> </text:span><text:span text:style-name="T5">esptool.py</text:span></text:h>
      <text:list text:style-name="L4">
        <text:list-item>
          <text:p text:style-name="P12">Command-Line Interface: <text:span text:style-name="T1">esptool.py</text:span> accepts parameters from PlatformIO, such as the serial port (e.g., <text:span text:style-name="T1">/dev/cu.SLAB_USBtoUART</text:span>), baud rate (e.g., 921600), and binary file paths (e.g., <text:span text:style-name="T1">firmware.bin</text:span>, <text:span text:style-name="T1">bootloader.bin</text:span>).</text:p>
        </text:list-item>
        <text:list-item>
          <text:p text:style-name="P12">Serial Communication: Uses Python’s <text:span text:style-name="T1">pyserial</text:span> library to communicate with the ESP32 via the USB-to-UART bridge (e.g., CP2102).</text:p>
        </text:list-item>
        <text:list-item>
          <text:p text:style-name="P12">Protocol Implementation: Implements Espressif’s serial bootloader protocol, which defines commands for synchronization, flash writing, and verification.</text:p>
        </text:list-item>
        <text:list-item>
          <text:p text:style-name="P12">Control Signal Management: Manipulates DTR (Data Terminal Ready) and RTS (Request to Send) lines to reset the ESP32 and enter download mode.</text:p>
        </text:list-item>
      </text:list>
      <text:p text:style-name="P13"/>
      <text:h text:style-name="P10" text:outline-level="2">Logic Flow of esptool.py for Firmware Upload</text:h>
      <text:p text:style-name="P3">The following steps outline the logic of <text:span text:style-name="T1">esptool.py</text:span> during a firmware upload, as executed by PlatformIO:</text:p>
      <text:list text:style-name="L5">
        <text:list-item>
          <text:p text:style-name="P14">Initialization:</text:p>
          <text:list>
            <text:list-item>
              <text:p text:style-name="P14">PlatformIO invokes <text:span text:style-name="T1">esptool.py</text:span> with arguments specifying the target board (e.g., <text:span text:style-name="T1">esp32dev</text:span>), serial port, baud rate, and binary files (bootloader, partition table, and application firmware).</text:p>
            </text:list-item>
            <text:list-item>
              <text:p text:style-name="P14">Example command: </text:p>
              <text:p text:style-name="P15">bash</text:p>
              <text:p text:style-name="P16"><text:span text:style-name="Source_20_Text"><text:span text:style-name="T4">esptool.py --chip esp32 --port /dev/cu.SLAB_USBtoUART --baud 921600 write_flash 0x1000 bootloader.bin 0x8000 partitions.bin 0x10000 firmware.bin</text:span></text:span></text:p>
            </text:list-item>
            <text:list-item>
              <text:p text:style-name="P14"><text:soft-page-break/>The script opens the serial port using <text:span text:style-name="T1">pyserial</text:span> and configures it for the specified baud rate (e.g., 921600 bps, 8N1).</text:p>
            </text:list-item>
          </text:list>
        </text:list-item>
        <text:list-item>
          <text:p text:style-name="P14">Entering Bootloader Mode:</text:p>
          <text:list>
            <text:list-item>
              <text:p text:style-name="P14">The script toggles DTR and RTS lines to reset the ESP32 and pull GPIO0 low, forcing the chip into download mode. This is typically done using a sequence like:</text:p>
              <text:list>
                <text:list-item>
                  <text:p text:style-name="P14">Set DTR high, RTS high → Reset ESP32 (EN pin low).</text:p>
                </text:list-item>
                <text:list-item>
                  <text:p text:style-name="P14">Set DTR low, RTS low, GPIO0 low → Enter bootloader mode.</text:p>
                </text:list-item>
              </text:list>
            </text:list-item>
            <text:list-item>
              <text:p text:style-name="P14">The timing of these signals is critical and handled by <text:span text:style-name="T1">pyserial</text:span>’s control line APIs.</text:p>
            </text:list-item>
          </text:list>
        </text:list-item>
        <text:list-item>
          <text:p text:style-name="P14">Synchronization:</text:p>
          <text:list>
            <text:list-item>
              <text:p text:style-name="P14"><text:span text:style-name="T1">esptool.py</text:span> sends a SYNC command (a 36-byte frame starting with <text:span text:style-name="T1">0x07 0x07 0x12 0x20</text:span>) to the ESP32’s UART0.</text:p>
            </text:list-item>
            <text:list-item>
              <text:p text:style-name="P14">The ESP32’s ROM bootloader responds with a confirmation frame, indicating it’s ready to receive commands.</text:p>
            </text:list-item>
            <text:list-item>
              <text:p text:style-name="P14">If synchronization fails (e.g., due to incorrect baud rate or cable issues), <text:span text:style-name="T1">esptool.py</text:span> retries multiple times before aborting.</text:p>
            </text:list-item>
          </text:list>
        </text:list-item>
        <text:list-item>
          <text:p text:style-name="P14">Flash Writing:</text:p>
          <text:list>
            <text:list-item>
              <text:p text:style-name="P14">The script reads the binary files (e.g., <text:span text:style-name="T1">bootloader.bin</text:span>, <text:span text:style-name="T1">partitions.bin</text:span>, <text:span text:style-name="T1">firmware.bin</text:span>) and sends them to the ESP32 in chunks (typically 4 KB).</text:p>
            </text:list-item>
            <text:list-item>
              <text:p text:style-name="P14">Each chunk is encapsulated in a command frame with a header, data, and checksum (using a simple XOR-based algorithm).</text:p>
            </text:list-item>
            <text:list-item>
              <text:p text:style-name="P14">The ESP32’s bootloader writes each chunk to the specified flash offset (e.g., <text:span text:style-name="T1">0x1000</text:span> for bootloader, <text:span text:style-name="T1">0x10000</text:span> for firmware) and responds with an acknowledgment.</text:p>
            </text:list-item>
            <text:list-item>
              <text:p text:style-name="P14"><text:span text:style-name="T1">esptool.py</text:span> verifies the write operation by reading back a checksum or using a <text:span text:style-name="T1">FLASH_END</text:span> command.</text:p>
            </text:list-item>
          </text:list>
        </text:list-item>
        <text:list-item>
          <text:p text:style-name="P14">Verification and Completion:</text:p>
          <text:list>
            <text:list-item>
              <text:p text:style-name="P14">After writing all chunks, <text:span text:style-name="T1">esptool.py</text:span> sends a command to verify the flash contents, ensuring data integrity.</text:p>
            </text:list-item>
            <text:list-item>
              <text:p text:style-name="P14">The script issues a reset command (toggling DTR/RTS) to exit bootloader mode and start the new firmware.</text:p>
            </text:list-item>
            <text:list-item>
              <text:p text:style-name="P14">If successful, the ESP32 boots into the new application; otherwise, <text:span text:style-name="T1">esptool.py</text:span> reports an error (e.g., “Invalid header” or “Timeout waiting for response”).</text:p>
            </text:list-item>
          </text:list>
        </text:list-item>
      </text:list>
      <text:h text:style-name="Heading_20_2" text:outline-level="2" text:is-list-header="true">Error Handling</text:h>
      <text:list text:style-name="L6">
        <text:list-item>
          <text:p text:style-name="P17"><text:span text:style-name="T1">esptool.py</text:span> includes robust error handling for common issues, such as:</text:p>
          <text:list>
            <text:list-item>
              <text:p text:style-name="P17">Serial Port Errors: Checks for port availability and correct USB-to-UART driver installation.</text:p>
            </text:list-item>
            <text:list-item>
              <text:p text:style-name="P17">Timeout Errors: Retries commands if the ESP32 doesn’t respond within a set period (e.g., 1 second).</text:p>
            </text:list-item>
            <text:list-item>
              <text:p text:style-name="P17"><text:soft-page-break/>Checksum Mismatches: Re-sends chunks if the ESP32 reports a verification failure.</text:p>
            </text:list-item>
          </text:list>
        </text:list-item>
        <text:list-item>
          <text:p text:style-name="P17">PlatformIO displays these errors in the VS Code terminal, guiding users to troubleshoot (e.g., check USB cable, baud rate, or GPIO0 state).</text:p>
        </text:list-item>
      </text:list>
      <text:p text:style-name="P18"/>
      <text:h text:style-name="Heading_20_1" text:outline-level="1">End-to-End Firmware Upload Process</text:h>
      <text:p text:style-name="P3">The firmware upload process integrates the ESP32’s memory map, bootloader, and <text:span text:style-name="T1">esptool.py</text:span> logic into a seamless workflow. Here’s the complete sequence:</text:p>
      <text:list text:style-name="L7">
        <text:list-item>
          <text:p text:style-name="P19">Code Development:</text:p>
          <text:list>
            <text:list-item>
              <text:p text:style-name="P19">The maker writes Arduino or ESP-IDF code in PlatformIO, configuring <text:span text:style-name="T1">platformio.ini</text:span> with the board type (<text:span text:style-name="T1">esp32dev</text:span>), framework (<text:span text:style-name="T1">arduino</text:span> or <text:span text:style-name="T1">espidf</text:span>), and upload settings (e.g., <text:span text:style-name="T1">upload_speed = 921600</text:span>).</text:p>
            </text:list-item>
            <text:list-item>
              <text:p text:style-name="P19">Example <text:span text:style-name="T1">platformio.ini</text:span>:</text:p>
              <text:p text:style-name="P20">ini</text:p>
              <text:p text:style-name="P21"><text:span text:style-name="Source_20_Text"><text:span text:style-name="T4">[env:esp32dev]</text:span></text:span></text:p>
              <text:p text:style-name="P21"><text:span text:style-name="Source_20_Text"><text:span text:style-name="T4">platform = espressif32</text:span></text:span></text:p>
              <text:p text:style-name="P21"><text:span text:style-name="Source_20_Text"><text:span text:style-name="T4">board = esp32dev</text:span></text:span></text:p>
              <text:p text:style-name="P21"><text:span text:style-name="Source_20_Text"><text:span text:style-name="T4">framework = arduino</text:span></text:span></text:p>
              <text:p text:style-name="P21"><text:span text:style-name="Source_20_Text"><text:span text:style-name="T4">upload_speed = 921600</text:span></text:span></text:p>
              <text:p text:style-name="P21"><text:span text:style-name="Source_20_Text"><text:span text:style-name="T4">monitor_speed = 115200</text:span></text:span></text:p>
            </text:list-item>
          </text:list>
        </text:list-item>
        <text:list-item>
          <text:p text:style-name="P19">Compilation:</text:p>
          <text:list>
            <text:list-item>
              <text:p text:style-name="P19">PlatformIO compiles the code into binary files: <text:span text:style-name="T1">bootloader.bin</text:span>, <text:span text:style-name="T1">partitions.bin</text:span>, and <text:span text:style-name="T1">firmware.bin</text:span>. These are generated based on the ESP32’s memory map and partition table.</text:p>
            </text:list-item>
          </text:list>
        </text:list-item>
        <text:list-item>
          <text:p text:style-name="P19">Device Connection:</text:p>
          <text:list>
            <text:list-item>
              <text:p text:style-name="P19">The ESP32 board is connected to the Mac via a USB cable, with the USB-to-UART bridge (e.g., CP2102) enumerating as a serial port (e.g., <text:span text:style-name="T1">/dev/cu.SLAB_USBtoUART</text:span>).</text:p>
            </text:list-item>
            <text:list-item>
              <text:p text:style-name="P19">The Mac’s USB driver and <text:span text:style-name="T1">pyserial</text:span> handle communication at the transport layer.</text:p>
            </text:list-item>
          </text:list>
        </text:list-item>
        <text:list-item>
          <text:p text:style-name="P19">Firmware Upload:</text:p>
          <text:list>
            <text:list-item>
              <text:p text:style-name="P19">PlatformIO invokes <text:span text:style-name="T1">esptool.py</text:span> to transfer the binaries to the ESP32.</text:p>
            </text:list-item>
            <text:list-item>
              <text:p text:style-name="P19">The script resets the ESP32 into download mode, synchronizes with the bootloader, and writes the binaries to their respective flash offsets (<text:span text:style-name="T1">0x1000</text:span>, <text:span text:style-name="T1">0x8000</text:span>, <text:span text:style-name="T1">0x10000</text:span>).</text:p>
            </text:list-item>
            <text:list-item>
              <text:p text:style-name="P19">The bootloader writes the data to SPI flash and acknowledges each chunk.</text:p>
            </text:list-item>
          </text:list>
        </text:list-item>
        <text:list-item>
          <text:p text:style-name="P19">Execution:</text:p>
          <text:list>
            <text:list-item>
              <text:p text:style-name="P19">After verification, <text:span text:style-name="T1">esptool.py</text:span> resets the ESP32, which boots into the second-stage bootloader.</text:p>
            </text:list-item>
            <text:list-item>
              <text:p text:style-name="P19"><text:soft-page-break/>The bootloader loads the application firmware from flash into SRAM and starts execution.</text:p>
            </text:list-item>
            <text:list-item>
              <text:p text:style-name="P19">The maker can monitor the serial output in VS Code’s terminal (e.g., via <text:span text:style-name="T1">Serial.println()</text:span> at 115200 baud) to verify the program’s operation.</text:p>
            </text:list-item>
          </text:list>
        </text:list-item>
      </text:list>
      <text:p text:style-name="P18"/>
      <text:h text:style-name="Heading_20_1" text:outline-level="1">Practical Tips for Hobbyists</text:h>
      <text:list text:style-name="L8">
        <text:list-item>
          <text:p text:style-name="P22">Verify USB-to-UART Drivers: Ensure the CP2102 or equivalent driver is installed on macOS. Download from the manufacturer (e.g., Silicon Labs) if the port doesn’t appear in <text:span text:style-name="T1">/dev</text:span>.</text:p>
        </text:list-item>
        <text:list-item>
          <text:p text:style-name="P22">Check Baud Rate: Use a high baud rate (e.g., 921600) for faster uploads, but reduce it (e.g., to 115200) if errors occur due to cable or driver limitations.</text:p>
        </text:list-item>
        <text:list-item>
          <text:p text:style-name="P22">Monitor GPIO0: If the ESP32 doesn’t enter bootloader mode, check GPIO0’s state during reset. Some boards require a manual button press to ground GPIO0.</text:p>
        </text:list-item>
        <text:list-item>
          <text:p text:style-name="P22">Use a Logic Analyzer: Connect a Saleae Logic analyzer to UART0 (GPIO1/TX, GPIO3/RX) to visualize the SYNC frames, data chunks, and acknowledgments during upload.</text:p>
        </text:list-item>
        <text:list-item>
          <text:p text:style-name="P22">Debugging Errors: If <text:span text:style-name="T1">esptool.py</text:span> fails, check the VS Code terminal for specific errors (e.g., “Failed to connect to ESP32: Timed out waiting for packet header”). Common fixes include using a data-capable USB cable or rechecking the serial port.</text:p>
        </text:list-item>
      </text:list>
      <text:p text:style-name="P6"/>
      <text:h text:style-name="Heading_20_1" text:outline-level="1">Conclusion</text:h>
      <text:p text:style-name="P8">Uploading firmware to the ESP32 using PlatformIO is a fascinating blend of hardware and software engineering. The ESP32’s memory map organizes the bootloader, partition table, and application firmware in SPI flash, while the boot sequence ensures reliable execution. PlatformIO’s <text:span text:style-name="T1">esptool.py</text:span> script orchestrates the upload process, leveraging UART communication and Espressif’s bootloader protocol to transfer binaries efficiently. By understanding the memory map, boot sequence, and Python logic, hobbyist makers can confidently develop, debug, and deploy ESP32 projects, unlocking the full potential of this versatile microcontroller for IoT and embedded applications. Whether you’re blinking an LED or building a smart home device, mastering this process is a key step in your maker journe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30T18:44:00.534985000</meta:creation-date>
    <dc:date>2025-08-30T18:56:18.703246000</dc:date>
    <meta:editing-duration>PT38S</meta:editing-duration>
    <meta:editing-cycles>1</meta:editing-cycles>
    <meta:document-statistic meta:table-count="0" meta:image-count="0" meta:object-count="0" meta:page-count="6" meta:paragraph-count="103" meta:word-count="1883" meta:character-count="12181" meta:non-whitespace-character-count="10471"/>
    <meta:generator>LibreOffice/25.2.2.2$MacOSX_AARCH64 LibreOffice_project/7370d4be9e3cf6031a51beef54ff3bda878e3fac</meta:generator>
  </office:meta>
</office:document-meta>
</file>