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Sans" fo:font-size="11pt" fo:font-weight="normal" officeooo:rsid="000cdb91" officeooo:paragraph-rsid="000cdb91" style:font-size-asian="11pt" style:font-weight-asian="normal" style:font-size-complex="11pt" style:font-weight-complex="normal"/>
    </style:style>
    <style:style style:name="P2" style:family="paragraph" style:parent-style-name="Standard" style:list-style-name="L1">
      <style:text-properties style:use-window-font-color="true" loext:opacity="0%" style:font-name="Liberation Sans" fo:font-size="11pt" fo:font-weight="normal" officeooo:rsid="000cdb91" officeooo:paragraph-rsid="000cdb9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use-window-font-color="true" loext:opacity="0%" style:font-name="Liberation Sans" fo:font-size="11pt" fo:font-weight="normal" officeooo:rsid="000cdb91" officeooo:paragraph-rsid="000cdb9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use-window-font-color="true" loext:opacity="0%" style:font-name="Liberation Sans" fo:font-size="11pt" fo:font-weight="normal" officeooo:rsid="000d1973" officeooo:paragraph-rsid="000d1973" style:font-size-asian="11pt" style:font-weight-asian="normal" style:font-size-complex="11pt" style:font-weight-complex="normal"/>
    </style:style>
    <style:style style:name="P5" style:family="paragraph" style:parent-style-name="Standard" style:list-style-name="L2">
      <style:text-properties officeooo:paragraph-rsid="000d1973"/>
    </style:style>
    <style:style style:name="T1" style:family="text">
      <style:text-properties fo:color="#000000" loext:opacity="100%" style:font-name="Menlo-Regular" fo:font-size="11pt" fo:font-weight="normal" officeooo:rsid="000d1973" style:font-size-asian="11pt" style:font-weight-asian="normal" style:font-size-complex="11pt" style:font-weight-complex="normal"/>
    </style:style>
    <style:style style:name="T2" style:family="text">
      <style:text-properties officeooo:rsid="000cfcd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ing backups of Raspberry Pi web site</text:p>
      <text:p text:style-name="P1"/>
      <text:p text:style-name="P1">Manual steps (this works):</text:p>
      <text:list xml:id="list3115466895" text:style-name="L1">
        <text:list-item>
          <text:p text:style-name="P2">SSH to Rasberry Pi and user Pi</text:p>
        </text:list-item>
        <text:list-item>
          <text:p text:style-name="P2">SU andrew</text:p>
        </text:list-item>
        <text:list-item>
          <text:p text:style-name="P2">sudo zip -r /var/www/webbackups/test.zip /var/www/html/</text:p>
        </text:list-item>
      </text:list>
      <text:p text:style-name="P1"/>
      <text:p text:style-name="P1">Script steps (work<text:span text:style-name="T2">s</text:span>):</text:p>
      <text:list xml:id="list231551279687299" text:continue-numbering="true" text:style-name="L1">
        <text:list-item>
          <text:p text:style-name="P2">SSH to Rasberry Pi and user Pi</text:p>
        </text:list-item>
        <text:list-item>
          <text:p text:style-name="P2">SU andrew</text:p>
        </text:list-item>
        <text:list-item>
          <text:p text:style-name="P2"><text:span text:style-name="T2">sudo</text:span> ./wb.sh</text:p>
        </text:list-item>
      </text:list>
      <text:p text:style-name="P1"/>
      <text:p text:style-name="P4">Manually deleting old backups (this works):</text:p>
      <text:list xml:id="list1223843493" text:style-name="L2">
        <text:list-item>
          <text:p text:style-name="P5"><text:span text:style-name="T1">sudo rm /var/www/webbackups/&lt;filename&gt;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1-04T23:00:25.728357478</meta:creation-date>
    <dc:date>2025-01-04T23:15:50.319600839</dc:date>
    <meta:editing-duration>PT2M23S</meta:editing-duration>
    <meta:editing-cycles>2</meta:editing-cycles>
    <meta:generator>LibreOffice/7.3.7.2$MacOSX_X86_64 LibreOffice_project/e114eadc50a9ff8d8c8a0567d6da8f454beeb84f</meta:generator>
    <meta:document-statistic meta:table-count="0" meta:image-count="0" meta:object-count="0" meta:page-count="1" meta:paragraph-count="11" meta:word-count="55" meta:character-count="323" meta:non-whitespace-character-count="286"/>
  </office:meta>
</office:document-meta>
</file>