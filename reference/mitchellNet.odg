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" style:family="graphic">
      <style:graphic-properties loext:decorative="false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5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9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9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" style:family="graphic" style:parent-style-name="standard">
      <style:graphic-properties draw:stroke="none" svg:stroke-color="#000000" draw:fill="none" draw:fill-color="#ffffff" fo:min-height="3.689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" style:family="graphic" style:parent-style-name="standard">
      <style:graphic-properties draw:stroke="none" svg:stroke-color="#000000" draw:fill="none" draw:fill-color="#ffffff" fo:min-height="3.889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fo:min-height="5.185cm" loext:decorative="false"/>
      <style:paragraph-properties style:writing-mode="lr-tb"/>
    </style:style>
    <style:style style:name="gr118" style:family="graphic" style:parent-style-name="standard">
      <style:graphic-properties draw:textarea-vertical-align="middle" loext:decorative="false"/>
    </style:style>
    <style:style style:name="gr119" style:family="graphic" style:parent-style-name="standard">
      <style:graphic-properties draw:stroke="none" svg:stroke-color="#000000" draw:fill="none" draw:fill-color="#ffffff" fo:min-height="2.75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5" style:family="graphic" style:parent-style-name="standard">
      <style:graphic-properties draw:stroke="none" svg:stroke-color="#000000" draw:fill="none" draw:fill-color="#ffffff" fo:min-height="2.161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1" style:family="graphic" style:parent-style-name="objectwithoutfill">
      <style:graphic-properties draw:fill="none" draw:textarea-vertical-align="middle" loext:decorative="false"/>
    </style:style>
    <style:style style:name="gr152" style:family="graphic" style:parent-style-name="standard">
      <style:graphic-properties draw:stroke="none" svg:stroke-color="#000000" draw:fill="none" draw:fill-color="#ffffff" fo:min-height="2.593cm" loext:decorative="false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8" style:family="graphic" style:parent-style-name="standard">
      <style:graphic-properties draw:stroke="none" svg:stroke-color="#000000" draw:fill="none" draw:fill-color="#ffffff" fo:min-height="2.01cm" loext:decorative="false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fill-gradient-name="Light_20_Red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3" draw:id="id3"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2" draw:text-style-name="P1" draw:layer="layout" svg:width="1.279cm" svg:height="0.769cm" svg:x="18.567cm" svg:y="15.388cm" svg:viewBox="0 0 1280 770" svg:d="M0 770c328 0 1173-362 1257-498 83-136-84-272-168-272 0 194-1089 447-1089 770z">
            <text:p/>
          </draw:path>
          <draw:g draw:style-name="gr3">
            <draw:polygon draw:style-name="gr4" draw:text-style-name="P2" draw:layer="layout" svg:width="1.172cm" svg:height="1.177cm" svg:x="17.333cm" svg:y="15.025cm" svg:viewBox="0 0 1173 1178" draw:points="0,544 0,0 1173,634 1173,1178">
              <text:p/>
            </draw:polygon>
            <draw:polygon draw:style-name="gr5" draw:text-style-name="P3" draw:layer="layout" svg:width="1.171cm" svg:height="1.177cm" svg:x="18.506cm" svg:y="15.025cm" svg:viewBox="0 0 1172 1178" draw:points="0,1178 0,634 1172,0 1172,544">
              <text:p/>
            </draw:polygon>
            <draw:polygon draw:style-name="gr6" draw:text-style-name="P4" draw:layer="layout" svg:width="2.344cm" svg:height="1.268cm" svg:x="17.333cm" svg:y="14.391cm" svg:viewBox="0 0 2345 1269" draw:points="1173,1269 0,634 1173,0 2345,634">
              <text:p/>
            </draw:polygon>
            <draw:polygon draw:style-name="gr7" draw:text-style-name="P5" draw:layer="layout" svg:width="2.344cm" svg:height="1.811cm" svg:x="17.333cm" svg:y="14.391cm" svg:viewBox="0 0 2345 1812" draw:points="0,1178 0,634 1173,0 2345,634 2345,1178 1173,1812">
              <text:p/>
            </draw:polygon>
            <draw:polyline draw:style-name="gr8" draw:text-style-name="P6" draw:layer="layout" svg:width="1.172cm" svg:height="0.633cm" svg:x="18.338cm" svg:y="14.935cm" svg:viewBox="0 0 1173 634" draw:points="1173,91 1005,91 670,0 503,0 503,91 670,272 669,362 502,362 167,272 0,272 0,362 168,544 168,634">
              <text:p/>
            </draw:polyline>
            <draw:polyline draw:style-name="gr9" draw:text-style-name="P6" draw:layer="layout" svg:width="1.172cm" svg:height="0.633cm" svg:x="18.087cm" svg:y="14.799cm" svg:viewBox="0 0 1173 634" draw:points="1005,0 1005,91 1173,272 1173,362 1005,362 670,272 503,272 503,362 670,544 670,634 503,634 168,544 0,544">
              <text:p/>
            </draw:polyline>
            <draw:polyline draw:style-name="gr10" draw:text-style-name="P6" draw:layer="layout" svg:width="1.172cm" svg:height="0.633cm" svg:x="17.752cm" svg:y="14.617cm" svg:viewBox="0 0 1173 634" draw:points="1173,91 1005,91 670,0 503,0 503,91 670,272 669,362 502,362 167,272 0,272 0,362 168,544 168,634">
              <text:p/>
            </draw:polyline>
            <draw:polyline draw:style-name="gr11" draw:text-style-name="P6" draw:layer="layout" svg:width="1.172cm" svg:height="0.633cm" svg:x="17.5cm" svg:y="14.481cm" svg:viewBox="0 0 1173 634" draw:points="1005,0 1005,91 1173,272 1173,362 1005,362 670,272 503,272 503,362 670,544 670,634 503,634 168,544 0,544">
              <text:p/>
            </draw:polyline>
            <draw:polygon draw:style-name="gr12" draw:text-style-name="P7" draw:layer="layout" svg:width="0.167cm" svg:height="1.041cm" svg:x="18.422cm" svg:y="13.983cm" svg:viewBox="0 0 168 1042" draw:points="84,1042 84,181 0,91 84,0 168,91 84,181">
              <text:p/>
            </draw:polygon>
            <draw:path draw:style-name="gr13" draw:text-style-name="P8" draw:layer="layout" svg:width="0.125cm" svg:height="0.271cm" svg:x="18.673cm" svg:y="13.938cm" svg:viewBox="0 0 126 272" svg:d="M0 0c168 45 168 227 0 272">
              <text:p/>
            </draw:path>
            <draw:path draw:style-name="gr14" draw:text-style-name="P8" draw:layer="layout" svg:width="0.125cm" svg:height="0.271cm" svg:x="18.213cm" svg:y="13.938cm" svg:viewBox="0 0 126 272" svg:d="M126 0c-168 45-168 227 0 272">
              <text:p/>
            </draw:path>
            <draw:path draw:style-name="gr15" draw:text-style-name="P8" draw:layer="layout" svg:width="0.125cm" svg:height="0.452cm" svg:x="18.045cm" svg:y="13.847cm" svg:viewBox="0 0 126 453" svg:d="M126 0c-168 45-168 408 0 453">
              <text:p/>
            </draw:path>
            <draw:path draw:style-name="gr16" draw:text-style-name="P8" draw:layer="layout" svg:width="0.124cm" svg:height="0.452cm" svg:x="18.841cm" svg:y="13.847cm" svg:viewBox="0 0 125 453" svg:d="M0 0c167 45 167 408 0 453">
              <text:p/>
            </draw:path>
            <draw:path draw:style-name="gr17" draw:text-style-name="P8" draw:layer="layout" svg:width="0.125cm" svg:height="0.633cm" svg:x="17.878cm" svg:y="13.757cm" svg:viewBox="0 0 126 634" svg:d="M126 0c-168 45-168 589 0 634">
              <text:p/>
            </draw:path>
            <draw:path draw:style-name="gr18" draw:text-style-name="P8" draw:layer="layout" svg:width="0.122cm" svg:height="0.633cm" svg:x="19.008cm" svg:y="13.757cm" svg:viewBox="0 0 123 634" svg:d="M0 0c168 45 160 579 0 634">
              <text:p/>
            </draw:path>
            <draw:path draw:style-name="gr19" draw:text-style-name="P8" draw:layer="layout" svg:width="0.125cm" svg:height="0.814cm" svg:x="17.71cm" svg:y="13.666cm" svg:viewBox="0 0 126 815" svg:d="M126 0c-168 45-168 770 0 815">
              <text:p/>
            </draw:path>
            <draw:path draw:style-name="gr20" draw:text-style-name="P8" draw:layer="layout" svg:width="0.124cm" svg:height="0.814cm" svg:x="19.176cm" svg:y="13.666cm" svg:viewBox="0 0 125 815" svg:d="M0 0c167 45 167 770 0 815">
              <text:p/>
            </draw:path>
          </draw:g>
        </draw:g>
        <draw:g draw:style-name="gr1" xml:id="id1" draw:id="id1"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21" draw:text-style-name="P1" draw:layer="layout" svg:width="1.851cm" svg:height="1.189cm" svg:x="8.814cm" svg:y="7.573cm" svg:viewBox="0 0 1852 1190" svg:d="M0 1190c475 0 1698-560 1819-770s-121-420-242-420c0 300-1577 690-1577 1190z">
            <text:p/>
          </draw:path>
          <draw:g draw:style-name="gr3">
            <draw:polygon draw:style-name="gr22" draw:text-style-name="P2" draw:layer="layout" svg:width="1.697cm" svg:height="1.819cm" svg:x="7.028cm" svg:y="7.013cm" svg:viewBox="0 0 1698 1820" draw:points="0,840 0,0 1698,980 1698,1820">
              <text:p/>
            </draw:polygon>
            <draw:polygon draw:style-name="gr23" draw:text-style-name="P3" draw:layer="layout" svg:width="1.696cm" svg:height="1.819cm" svg:x="8.726cm" svg:y="7.013cm" svg:viewBox="0 0 1697 1820" draw:points="0,1820 0,980 1697,0 1697,840">
              <text:p/>
            </draw:polygon>
            <draw:polygon draw:style-name="gr24" draw:text-style-name="P4" draw:layer="layout" svg:width="3.394cm" svg:height="1.959cm" svg:x="7.028cm" svg:y="6.033cm" svg:viewBox="0 0 3395 1960" draw:points="1698,1960 0,980 1698,0 3395,980">
              <text:p/>
            </draw:polygon>
            <draw:polygon draw:style-name="gr25" draw:text-style-name="P5" draw:layer="layout" svg:width="3.394cm" svg:height="2.799cm" svg:x="7.028cm" svg:y="6.033cm" svg:viewBox="0 0 3395 2800" draw:points="0,1820 0,980 1698,0 3395,980 3395,1820 1698,2800">
              <text:p/>
            </draw:polygon>
            <draw:polygon draw:style-name="gr26" draw:text-style-name="P6" draw:layer="layout" svg:width="0.848cm" svg:height="0.489cm" svg:x="9.088cm" svg:y="6.943cm" svg:viewBox="0 0 849 490" draw:points="728,140 121,490 0,420 607,70 486,0 849,0 849,210">
              <text:p/>
            </draw:polygon>
            <draw:polygon draw:style-name="gr27" draw:text-style-name="P6" draw:layer="layout" svg:width="0.847cm" svg:height="0.489cm" svg:x="8.24cm" svg:y="7.013cm" svg:viewBox="0 0 848 490" draw:points="243,420 364,490 0,490 0,280 121,350 727,0 848,70">
              <text:p/>
            </draw:polygon>
            <draw:polygon draw:style-name="gr28" draw:text-style-name="P6" draw:layer="layout" svg:width="0.847cm" svg:height="0.489cm" svg:x="8.361cm" svg:y="6.523cm" svg:viewBox="0 0 848 490" draw:points="727,140 121,490 0,420 606,70 485,0 848,0 848,210">
              <text:p/>
            </draw:polygon>
            <draw:polygon draw:style-name="gr29" draw:text-style-name="P6" draw:layer="layout" svg:width="0.847cm" svg:height="0.489cm" svg:x="7.512cm" svg:y="6.593cm" svg:viewBox="0 0 848 490" draw:points="243,420 364,490 0,490 0,280 121,350 727,0 848,70">
              <text:p/>
            </draw:polygon>
          </draw:g>
        </draw:g>
        <draw:g draw:style-name="gr1" xml:id="id5" draw:id="id5">
          <draw:path draw:style-name="gr30" draw:text-style-name="P1" draw:layer="layout" svg:width="1.09cm" svg:height="0.979cm" svg:x="4.19cm" svg:y="8.282cm" svg:viewBox="0 0 1091 980" svg:d="M0 980c475 0 1091-280 1091-560s-18-420-364-420c0 300-727 579-727 980z">
            <text:p/>
          </draw:path>
          <draw:g draw:style-name="gr3">
            <draw:path draw:style-name="gr31" draw:text-style-name="P9" draw:layer="layout" svg:width="2.666cm" svg:height="1.68cm" svg:x="2.251cm" svg:y="7.652cm" svg:viewBox="0 0 2667 1681" svg:d="M2667 0c0 0 0 1121-1 840 2 491-575 841-1331 841s-1334-350-1335-841c1 1 0-350 0-840 0 490 606 840 1334 840s1333-350 1333-840z">
              <text:p/>
            </draw:path>
            <draw:path draw:style-name="gr32" draw:text-style-name="P10" draw:layer="layout" svg:width="2.665cm" svg:height="1.678cm" svg:x="2.25cm" svg:y="6.812cm" svg:viewBox="0 0 2666 1679" svg:d="M1333 0c756 0 1333 363 1333 839s-577 840-1333 840-1333-364-1333-840 577-839 1333-839z">
              <text:p/>
            </draw:path>
            <draw:polygon draw:style-name="gr33" draw:text-style-name="P6" draw:layer="layout" svg:width="0.727cm" svg:height="0.419cm" svg:x="3.705cm" svg:y="7.722cm" svg:viewBox="0 0 728 420" draw:points="364,0 243,70 728,350 606,420 121,140 0,210 0,0">
              <text:p/>
            </draw:polygon>
            <draw:polygon draw:style-name="gr34" draw:text-style-name="P6" draw:layer="layout" svg:width="0.726cm" svg:height="0.419cm" svg:x="2.735cm" svg:y="7.162cm" svg:viewBox="0 0 727 420" draw:points="606,280 727,210 727,420 363,420 484,350 0,70 121,0">
              <text:p/>
            </draw:polygon>
            <draw:polygon draw:style-name="gr35" draw:text-style-name="P6" draw:layer="layout" svg:width="0.727cm" svg:height="0.419cm" svg:x="2.735cm" svg:y="7.722cm" svg:viewBox="0 0 728 420" draw:points="121,280 607,0 728,70 242,350 363,420 0,420 0,210">
              <text:p/>
            </draw:polygon>
            <draw:polygon draw:style-name="gr36" draw:text-style-name="P6" draw:layer="layout" svg:width="0.726cm" svg:height="0.419cm" svg:x="3.705cm" svg:y="7.162cm" svg:viewBox="0 0 727 420" draw:points="484,70 363,0 727,0 727,210 606,140 121,420 0,350">
              <text:p/>
            </draw:polygon>
            <draw:path draw:style-name="gr37" draw:text-style-name="P10" draw:layer="layout" svg:width="2.665cm" svg:height="0.839cm" svg:x="2.25cm" svg:y="7.932cm" svg:viewBox="0 0 2666 840" svg:d="M2666 0c0 476-577 840-1333 840s-1333-364-1333-840">
              <text:p/>
            </draw:path>
            <draw:line draw:style-name="gr38" draw:text-style-name="P11" draw:layer="layout" svg:x1="2.371cm" svg:y1="8.002cm" svg:x2="2.371cm" svg:y2="8.282cm">
              <text:p/>
            </draw:line>
            <draw:line draw:style-name="gr39" draw:text-style-name="P11" draw:layer="layout" svg:x1="2.614cm" svg:y1="8.212cm" svg:x2="2.614cm" svg:y2="8.492cm">
              <text:p/>
            </draw:line>
            <draw:line draw:style-name="gr40" draw:text-style-name="P11" draw:layer="layout" svg:x1="2.977cm" svg:y1="8.422cm" svg:x2="2.977cm" svg:y2="8.702cm">
              <text:p/>
            </draw:line>
            <draw:line draw:style-name="gr41" draw:text-style-name="P11" draw:layer="layout" svg:x1="3.341cm" svg:y1="8.492cm" svg:x2="3.341cm" svg:y2="8.772cm">
              <text:p/>
            </draw:line>
            <draw:line draw:style-name="gr42" draw:text-style-name="P11" draw:layer="layout" svg:x1="3.826cm" svg:y1="8.492cm" svg:x2="3.826cm" svg:y2="8.772cm">
              <text:p/>
            </draw:line>
            <draw:line draw:style-name="gr43" draw:text-style-name="P11" draw:layer="layout" svg:x1="4.19cm" svg:y1="8.422cm" svg:x2="4.19cm" svg:y2="8.702cm">
              <text:p/>
            </draw:line>
            <draw:line draw:style-name="gr44" draw:text-style-name="P11" draw:layer="layout" svg:x1="4.554cm" svg:y1="8.212cm" svg:x2="4.554cm" svg:y2="8.492cm">
              <text:p/>
            </draw:line>
            <draw:line draw:style-name="gr45" draw:text-style-name="P11" draw:layer="layout" svg:x1="4.796cm" svg:y1="8.002cm" svg:x2="4.796cm" svg:y2="8.282cm">
              <text:p/>
            </draw:line>
            <draw:line draw:style-name="gr46" draw:text-style-name="P11" draw:layer="layout" svg:x1="3.584cm" svg:y1="8.772cm" svg:x2="3.584cm" svg:y2="9.052cm">
              <text:p/>
            </draw:line>
            <draw:line draw:style-name="gr47" draw:text-style-name="P11" draw:layer="layout" svg:x1="4.069cm" svg:y1="8.702cm" svg:x2="4.069cm" svg:y2="8.982cm">
              <text:p/>
            </draw:line>
            <draw:line draw:style-name="gr48" draw:text-style-name="P11" draw:layer="layout" svg:x1="4.432cm" svg:y1="8.562cm" svg:x2="4.432cm" svg:y2="8.842cm">
              <text:p/>
            </draw:line>
            <draw:line draw:style-name="gr49" draw:text-style-name="P11" draw:layer="layout" svg:x1="4.675cm" svg:y1="8.422cm" svg:x2="4.675cm" svg:y2="8.702cm">
              <text:p/>
            </draw:line>
            <draw:line draw:style-name="gr50" draw:text-style-name="P11" draw:layer="layout" svg:x1="3.099cm" svg:y1="8.702cm" svg:x2="3.099cm" svg:y2="8.982cm">
              <text:p/>
            </draw:line>
            <draw:line draw:style-name="gr51" draw:text-style-name="P11" draw:layer="layout" svg:x1="2.735cm" svg:y1="8.562cm" svg:x2="2.735cm" svg:y2="8.842cm">
              <text:p/>
            </draw:line>
            <draw:line draw:style-name="gr52" draw:text-style-name="P11" draw:layer="layout" svg:x1="2.492cm" svg:y1="8.422cm" svg:x2="2.492cm" svg:y2="8.702cm">
              <text:p/>
            </draw:line>
            <draw:path draw:style-name="gr53" draw:text-style-name="P10" draw:layer="layout" svg:width="2.665cm" svg:height="0.839cm" svg:x="2.25cm" svg:y="8.212cm" svg:viewBox="0 0 2666 840" svg:d="M2666 0c0 476-577 840-1333 840s-1333-364-1333-840">
              <text:p/>
            </draw:path>
            <draw:line draw:style-name="gr54" draw:text-style-name="P11" draw:layer="layout" svg:x1="2.371cm" svg:y1="8.562cm" svg:x2="2.371cm" svg:y2="8.842cm">
              <text:p/>
            </draw:line>
            <draw:line draw:style-name="gr55" draw:text-style-name="P11" draw:layer="layout" svg:x1="2.614cm" svg:y1="8.772cm" svg:x2="2.614cm" svg:y2="9.052cm">
              <text:p/>
            </draw:line>
            <draw:line draw:style-name="gr56" draw:text-style-name="P11" draw:layer="layout" svg:x1="2.977cm" svg:y1="8.982cm" svg:x2="2.977cm" svg:y2="9.262cm">
              <text:p/>
            </draw:line>
            <draw:line draw:style-name="gr57" draw:text-style-name="P11" draw:layer="layout" svg:x1="3.341cm" svg:y1="9.052cm" svg:x2="3.341cm" svg:y2="9.332cm">
              <text:p/>
            </draw:line>
            <draw:line draw:style-name="gr58" draw:text-style-name="P11" draw:layer="layout" svg:x1="3.826cm" svg:y1="9.052cm" svg:x2="3.826cm" svg:y2="9.332cm">
              <text:p/>
            </draw:line>
            <draw:line draw:style-name="gr59" draw:text-style-name="P11" draw:layer="layout" svg:x1="4.19cm" svg:y1="8.982cm" svg:x2="4.19cm" svg:y2="9.262cm">
              <text:p/>
            </draw:line>
            <draw:line draw:style-name="gr60" draw:text-style-name="P11" draw:layer="layout" svg:x1="4.554cm" svg:y1="8.772cm" svg:x2="4.554cm" svg:y2="9.052cm">
              <text:p/>
            </draw:line>
            <draw:line draw:style-name="gr61" draw:text-style-name="P11" draw:layer="layout" svg:x1="4.796cm" svg:y1="8.562cm" svg:x2="4.796cm" svg:y2="8.842cm">
              <text:p/>
            </draw:line>
            <draw:path draw:style-name="gr62" draw:text-style-name="P12" draw:layer="layout" svg:width="2.667cm" svg:height="2.519cm" svg:x="2.25cm" svg:y="6.812cm" svg:viewBox="0 0 2668 2520" svg:d="M1333 0c756 0 1335 364 1335 840l-1 840c0 490-606 840-1333 840s-1334-350-1334-840c0 0 1-840 0-841 0-476 577-839 1333-839z">
              <text:p/>
            </draw:path>
            <draw:polygon draw:style-name="gr63" draw:text-style-name="P7" draw:layer="layout" svg:width="0.242cm" svg:height="1.609cm" svg:x="3.462cm" svg:y="6.043cm" svg:viewBox="0 0 243 1610" draw:points="122,1610 122,280 0,140 122,0 243,140 122,280">
              <text:p/>
            </draw:polygon>
            <draw:path draw:style-name="gr64" draw:text-style-name="P8" draw:layer="layout" svg:width="0.181cm" svg:height="0.419cm" svg:x="3.826cm" svg:y="5.973cm" svg:viewBox="0 0 182 420" svg:d="M0 0c243 70 243 350 0 420">
              <text:p/>
            </draw:path>
            <draw:path draw:style-name="gr65" draw:text-style-name="P8" draw:layer="layout" svg:width="0.181cm" svg:height="0.419cm" svg:x="3.16cm" svg:y="5.973cm" svg:viewBox="0 0 182 420" svg:d="M182 0c-243 70-243 350 0 420">
              <text:p/>
            </draw:path>
            <draw:path draw:style-name="gr66" draw:text-style-name="P8" draw:layer="layout" svg:width="0.181cm" svg:height="0.699cm" svg:x="2.917cm" svg:y="5.833cm" svg:viewBox="0 0 182 700" svg:d="M182 0c-243 70-243 630 0 700">
              <text:p/>
            </draw:path>
            <draw:path draw:style-name="gr67" draw:text-style-name="P8" draw:layer="layout" svg:width="0.181cm" svg:height="0.699cm" svg:x="4.069cm" svg:y="5.833cm" svg:viewBox="0 0 182 700" svg:d="M0 0c242 70 242 630 0 700">
              <text:p/>
            </draw:path>
            <draw:path draw:style-name="gr68" draw:text-style-name="P8" draw:layer="layout" svg:width="0.181cm" svg:height="0.979cm" svg:x="2.675cm" svg:y="5.693cm" svg:viewBox="0 0 182 980" svg:d="M182 0c-243 70-243 910 0 980">
              <text:p/>
            </draw:path>
            <draw:path draw:style-name="gr69" draw:text-style-name="P8" draw:layer="layout" svg:width="0.177cm" svg:height="0.979cm" svg:x="4.311cm" svg:y="5.693cm" svg:viewBox="0 0 178 980" svg:d="M0 0c243 70 232 894 0 980">
              <text:p/>
            </draw:path>
            <draw:path draw:style-name="gr70" draw:text-style-name="P8" draw:layer="layout" svg:width="0.181cm" svg:height="1.259cm" svg:x="2.432cm" svg:y="5.553cm" svg:viewBox="0 0 182 1260" svg:d="M182 0c-243 70-243 1190 0 1260">
              <text:p/>
            </draw:path>
            <draw:path draw:style-name="gr71" draw:text-style-name="P8" draw:layer="layout" svg:width="0.181cm" svg:height="1.259cm" svg:x="4.554cm" svg:y="5.553cm" svg:viewBox="0 0 182 1260" svg:d="M0 0c242 70 242 1190 0 1260">
              <text:p/>
            </draw:path>
          </draw:g>
        </draw:g>
        <draw:g draw:style-name="gr1" xml:id="id2" draw:id="id2"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72" draw:text-style-name="P1" draw:layer="layout" svg:width="1.279cm" svg:height="0.769cm" svg:x="18.553cm" svg:y="19.185cm" svg:viewBox="0 0 1280 770" svg:d="M0 770c328 0 1173-362 1257-498 83-136-84-272-168-272 0 194-1089 447-1089 770z">
            <text:p/>
          </draw:path>
          <draw:g draw:style-name="gr3">
            <draw:polygon draw:style-name="gr73" draw:text-style-name="P2" draw:layer="layout" svg:width="1.172cm" svg:height="1.177cm" svg:x="17.319cm" svg:y="18.822cm" svg:viewBox="0 0 1173 1178" draw:points="0,544 0,0 1173,634 1173,1178">
              <text:p/>
            </draw:polygon>
            <draw:polygon draw:style-name="gr74" draw:text-style-name="P3" draw:layer="layout" svg:width="1.171cm" svg:height="1.177cm" svg:x="18.492cm" svg:y="18.822cm" svg:viewBox="0 0 1172 1178" draw:points="0,1178 0,634 1172,0 1172,544">
              <text:p/>
            </draw:polygon>
            <draw:polygon draw:style-name="gr75" draw:text-style-name="P4" draw:layer="layout" svg:width="2.344cm" svg:height="1.268cm" svg:x="17.319cm" svg:y="18.188cm" svg:viewBox="0 0 2345 1269" draw:points="1173,1269 0,634 1173,0 2345,634">
              <text:p/>
            </draw:polygon>
            <draw:polygon draw:style-name="gr76" draw:text-style-name="P5" draw:layer="layout" svg:width="2.344cm" svg:height="1.811cm" svg:x="17.319cm" svg:y="18.188cm" svg:viewBox="0 0 2345 1812" draw:points="0,1178 0,634 1173,0 2345,634 2345,1178 1173,1812">
              <text:p/>
            </draw:polygon>
            <draw:polyline draw:style-name="gr77" draw:text-style-name="P6" draw:layer="layout" svg:width="1.172cm" svg:height="0.633cm" svg:x="18.324cm" svg:y="18.732cm" svg:viewBox="0 0 1173 634" draw:points="1173,91 1005,91 670,0 503,0 503,91 670,272 669,362 502,362 167,272 0,272 0,362 168,544 168,634">
              <text:p/>
            </draw:polyline>
            <draw:polyline draw:style-name="gr78" draw:text-style-name="P6" draw:layer="layout" svg:width="1.172cm" svg:height="0.633cm" svg:x="18.073cm" svg:y="18.596cm" svg:viewBox="0 0 1173 634" draw:points="1005,0 1005,91 1173,272 1173,362 1005,362 670,272 503,272 503,362 670,544 670,634 503,634 168,544 0,544">
              <text:p/>
            </draw:polyline>
            <draw:polyline draw:style-name="gr79" draw:text-style-name="P6" draw:layer="layout" svg:width="1.172cm" svg:height="0.633cm" svg:x="17.738cm" svg:y="18.414cm" svg:viewBox="0 0 1173 634" draw:points="1173,91 1005,91 670,0 503,0 503,91 670,272 669,362 502,362 167,272 0,272 0,362 168,544 168,634">
              <text:p/>
            </draw:polyline>
            <draw:polyline draw:style-name="gr80" draw:text-style-name="P6" draw:layer="layout" svg:width="1.172cm" svg:height="0.633cm" svg:x="17.486cm" svg:y="18.278cm" svg:viewBox="0 0 1173 634" draw:points="1005,0 1005,91 1173,272 1173,362 1005,362 670,272 503,272 503,362 670,544 670,634 503,634 168,544 0,544">
              <text:p/>
            </draw:polyline>
            <draw:polygon draw:style-name="gr81" draw:text-style-name="P7" draw:layer="layout" svg:width="0.167cm" svg:height="1.041cm" svg:x="18.408cm" svg:y="17.78cm" svg:viewBox="0 0 168 1042" draw:points="84,1042 84,181 0,91 84,0 168,91 84,181">
              <text:p/>
            </draw:polygon>
            <draw:path draw:style-name="gr82" draw:text-style-name="P8" draw:layer="layout" svg:width="0.125cm" svg:height="0.271cm" svg:x="18.659cm" svg:y="17.735cm" svg:viewBox="0 0 126 272" svg:d="M0 0c168 45 168 227 0 272">
              <text:p/>
            </draw:path>
            <draw:path draw:style-name="gr83" draw:text-style-name="P8" draw:layer="layout" svg:width="0.125cm" svg:height="0.271cm" svg:x="18.199cm" svg:y="17.735cm" svg:viewBox="0 0 126 272" svg:d="M126 0c-168 45-168 227 0 272">
              <text:p/>
            </draw:path>
            <draw:path draw:style-name="gr84" draw:text-style-name="P8" draw:layer="layout" svg:width="0.125cm" svg:height="0.452cm" svg:x="18.031cm" svg:y="17.644cm" svg:viewBox="0 0 126 453" svg:d="M126 0c-168 45-168 408 0 453">
              <text:p/>
            </draw:path>
            <draw:path draw:style-name="gr85" draw:text-style-name="P8" draw:layer="layout" svg:width="0.124cm" svg:height="0.452cm" svg:x="18.827cm" svg:y="17.644cm" svg:viewBox="0 0 125 453" svg:d="M0 0c167 45 167 408 0 453">
              <text:p/>
            </draw:path>
            <draw:path draw:style-name="gr86" draw:text-style-name="P8" draw:layer="layout" svg:width="0.125cm" svg:height="0.633cm" svg:x="17.864cm" svg:y="17.554cm" svg:viewBox="0 0 126 634" svg:d="M126 0c-168 45-168 589 0 634">
              <text:p/>
            </draw:path>
            <draw:path draw:style-name="gr87" draw:text-style-name="P8" draw:layer="layout" svg:width="0.122cm" svg:height="0.633cm" svg:x="18.994cm" svg:y="17.554cm" svg:viewBox="0 0 123 634" svg:d="M0 0c168 45 160 579 0 634">
              <text:p/>
            </draw:path>
            <draw:path draw:style-name="gr88" draw:text-style-name="P8" draw:layer="layout" svg:width="0.125cm" svg:height="0.814cm" svg:x="17.696cm" svg:y="17.463cm" svg:viewBox="0 0 126 815" svg:d="M126 0c-168 45-168 770 0 815">
              <text:p/>
            </draw:path>
            <draw:path draw:style-name="gr89" draw:text-style-name="P8" draw:layer="layout" svg:width="0.124cm" svg:height="0.814cm" svg:x="19.162cm" svg:y="17.463cm" svg:viewBox="0 0 125 815" svg:d="M0 0c167 45 167 770 0 815">
              <text:p/>
            </draw:path>
          </draw:g>
        </draw:g>
        <draw:g draw:style-name="gr1" xml:id="id4" draw:id="id4"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90" draw:text-style-name="P1" draw:layer="layout" svg:width="1.279cm" svg:height="0.769cm" svg:x="18.65cm" svg:y="11.555cm" svg:viewBox="0 0 1280 770" svg:d="M0 770c328 0 1173-362 1257-498 83-136-84-272-168-272 0 194-1089 447-1089 770z">
            <text:p/>
          </draw:path>
          <draw:g draw:style-name="gr3">
            <draw:polygon draw:style-name="gr91" draw:text-style-name="P2" draw:layer="layout" svg:width="1.172cm" svg:height="1.177cm" svg:x="17.416cm" svg:y="11.192cm" svg:viewBox="0 0 1173 1178" draw:points="0,544 0,0 1173,634 1173,1178">
              <text:p/>
            </draw:polygon>
            <draw:polygon draw:style-name="gr92" draw:text-style-name="P3" draw:layer="layout" svg:width="1.171cm" svg:height="1.177cm" svg:x="18.589cm" svg:y="11.192cm" svg:viewBox="0 0 1172 1178" draw:points="0,1178 0,634 1172,0 1172,544">
              <text:p/>
            </draw:polygon>
            <draw:polygon draw:style-name="gr93" draw:text-style-name="P4" draw:layer="layout" svg:width="2.344cm" svg:height="1.268cm" svg:x="17.416cm" svg:y="10.558cm" svg:viewBox="0 0 2345 1269" draw:points="1173,1269 0,634 1173,0 2345,634">
              <text:p/>
            </draw:polygon>
            <draw:polygon draw:style-name="gr94" draw:text-style-name="P5" draw:layer="layout" svg:width="2.344cm" svg:height="1.811cm" svg:x="17.416cm" svg:y="10.558cm" svg:viewBox="0 0 2345 1812" draw:points="0,1178 0,634 1173,0 2345,634 2345,1178 1173,1812">
              <text:p/>
            </draw:polygon>
            <draw:polyline draw:style-name="gr95" draw:text-style-name="P6" draw:layer="layout" svg:width="1.172cm" svg:height="0.633cm" svg:x="18.421cm" svg:y="11.102cm" svg:viewBox="0 0 1173 634" draw:points="1173,91 1005,91 670,0 503,0 503,91 670,272 669,362 502,362 167,272 0,272 0,362 168,544 168,634">
              <text:p/>
            </draw:polyline>
            <draw:polyline draw:style-name="gr96" draw:text-style-name="P6" draw:layer="layout" svg:width="1.172cm" svg:height="0.633cm" svg:x="18.17cm" svg:y="10.966cm" svg:viewBox="0 0 1173 634" draw:points="1005,0 1005,91 1173,272 1173,362 1005,362 670,272 503,272 503,362 670,544 670,634 503,634 168,544 0,544">
              <text:p/>
            </draw:polyline>
            <draw:polyline draw:style-name="gr97" draw:text-style-name="P6" draw:layer="layout" svg:width="1.172cm" svg:height="0.633cm" svg:x="17.835cm" svg:y="10.784cm" svg:viewBox="0 0 1173 634" draw:points="1173,91 1005,91 670,0 503,0 503,91 670,272 669,362 502,362 167,272 0,272 0,362 168,544 168,634">
              <text:p/>
            </draw:polyline>
            <draw:polyline draw:style-name="gr98" draw:text-style-name="P6" draw:layer="layout" svg:width="1.172cm" svg:height="0.633cm" svg:x="17.583cm" svg:y="10.648cm" svg:viewBox="0 0 1173 634" draw:points="1005,0 1005,91 1173,272 1173,362 1005,362 670,272 503,272 503,362 670,544 670,634 503,634 168,544 0,544">
              <text:p/>
            </draw:polyline>
            <draw:polygon draw:style-name="gr99" draw:text-style-name="P7" draw:layer="layout" svg:width="0.167cm" svg:height="1.041cm" svg:x="18.505cm" svg:y="10.15cm" svg:viewBox="0 0 168 1042" draw:points="84,1042 84,181 0,91 84,0 168,91 84,181">
              <text:p/>
            </draw:polygon>
            <draw:path draw:style-name="gr100" draw:text-style-name="P8" draw:layer="layout" svg:width="0.125cm" svg:height="0.271cm" svg:x="18.756cm" svg:y="10.105cm" svg:viewBox="0 0 126 272" svg:d="M0 0c168 45 168 227 0 272">
              <text:p/>
            </draw:path>
            <draw:path draw:style-name="gr101" draw:text-style-name="P8" draw:layer="layout" svg:width="0.125cm" svg:height="0.271cm" svg:x="18.296cm" svg:y="10.105cm" svg:viewBox="0 0 126 272" svg:d="M126 0c-168 45-168 227 0 272">
              <text:p/>
            </draw:path>
            <draw:path draw:style-name="gr102" draw:text-style-name="P8" draw:layer="layout" svg:width="0.125cm" svg:height="0.452cm" svg:x="18.128cm" svg:y="10.014cm" svg:viewBox="0 0 126 453" svg:d="M126 0c-168 45-168 408 0 453">
              <text:p/>
            </draw:path>
            <draw:path draw:style-name="gr103" draw:text-style-name="P8" draw:layer="layout" svg:width="0.124cm" svg:height="0.452cm" svg:x="18.924cm" svg:y="10.014cm" svg:viewBox="0 0 125 453" svg:d="M0 0c167 45 167 408 0 453">
              <text:p/>
            </draw:path>
            <draw:path draw:style-name="gr104" draw:text-style-name="P8" draw:layer="layout" svg:width="0.125cm" svg:height="0.633cm" svg:x="17.961cm" svg:y="9.924cm" svg:viewBox="0 0 126 634" svg:d="M126 0c-168 45-168 589 0 634">
              <text:p/>
            </draw:path>
            <draw:path draw:style-name="gr105" draw:text-style-name="P8" draw:layer="layout" svg:width="0.122cm" svg:height="0.633cm" svg:x="19.091cm" svg:y="9.924cm" svg:viewBox="0 0 123 634" svg:d="M0 0c168 45 160 579 0 634">
              <text:p/>
            </draw:path>
            <draw:path draw:style-name="gr106" draw:text-style-name="P8" draw:layer="layout" svg:width="0.125cm" svg:height="0.814cm" svg:x="17.793cm" svg:y="9.833cm" svg:viewBox="0 0 126 815" svg:d="M126 0c-168 45-168 770 0 815">
              <text:p/>
            </draw:path>
            <draw:path draw:style-name="gr107" draw:text-style-name="P8" draw:layer="layout" svg:width="0.124cm" svg:height="0.814cm" svg:x="19.259cm" svg:y="9.833cm" svg:viewBox="0 0 125 815" svg:d="M0 0c167 45 167 770 0 815">
              <text:p/>
            </draw:path>
          </draw:g>
        </draw:g>
        <draw:frame draw:style-name="gr108" draw:text-style-name="P13" draw:layer="layout" svg:width="6.584cm" svg:height="3.939cm" svg:x="1.25cm" svg:y="1.279cm">
          <draw:text-box>
            <text:p><text:span text:style-name="T1">HW: 3000 Home Hub</text:span></text:p>
            <text:p><text:span text:style-name="T1">IP: 192.168.2.1</text:span></text:p>
            <text:p><text:span text:style-name="T1">Mask: 255.255.255.0</text:span></text:p>
            <text:p><text:span text:style-name="T1">SSID1: MN_LIVINGROOM</text:span></text:p>
            <text:p><text:span text:style-name="T1">SSID2: N/A</text:span></text:p>
            <text:p><text:span text:style-name="T1">Access PW: 5194741299</text:span></text:p>
            <text:p><text:span text:style-name="T1">Admin PW: t0ta7r1p0ff</text:span></text:p>
            <text:p><text:span text:style-name="T1">DHCP Range: <text:s/>192.168.2.20...254</text:span></text:p>
          </draw:text-box>
        </draw:frame>
        <draw:g draw:style-name="gr1" xml:id="id6" draw:id="id6"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1.249cm" svg:y="2.576cm"/>
          <draw:glue-point draw:id="10" svg:x="3.75cm" svg:y="2.051cm"/>
          <draw:glue-point draw:id="11" svg:x="-0.554cm" svg:y="-2.824cm"/>
          <draw:path draw:style-name="gr109" draw:text-style-name="P1" draw:layer="layout" svg:width="0.823cm" svg:height="0.583cm" svg:x="5.676cm" svg:y="18.082cm" svg:viewBox="0 0 824 584" svg:d="M13 584c201 0 730-97 803-341 73-243-385-243-586-243 0 146-294 97-217 584z">
            <text:p/>
          </draw:path>
          <draw:g draw:style-name="gr3">
            <draw:polygon draw:style-name="gr110" draw:text-style-name="P14" draw:layer="layout" svg:width="3.664cm" svg:height="5.353cm" svg:x="2.021cm" svg:y="13.312cm" svg:viewBox="0 0 3665 5354" draw:points="0,2920 0,0 3665,2434 3665,5354">
              <text:p/>
            </draw:polygon>
            <draw:polygon draw:style-name="gr111" draw:text-style-name="P15" draw:layer="layout" svg:width="3.371cm" svg:height="4.574cm" svg:x="2.168cm" svg:y="13.604cm" svg:viewBox="0 0 3372 4575" draw:points="0,2336 0,0 3372,2287 3372,4575">
              <text:p/>
            </draw:polygon>
            <draw:polygon draw:style-name="gr112" draw:text-style-name="P16" draw:layer="layout" svg:width="3.884cm" svg:height="2.579cm" svg:x="2.021cm" svg:y="13.166cm" svg:viewBox="0 0 3885 2580" draw:points="3665,2580 0,146 220,0 3885,2434">
              <text:p/>
            </draw:polygon>
            <draw:polygon draw:style-name="gr113" draw:text-style-name="P17" draw:layer="layout" svg:width="0.219cm" svg:height="3.065cm" svg:x="5.686cm" svg:y="15.6cm" svg:viewBox="0 0 220 3066" draw:points="0,3066 0,146 220,0 220,2920">
              <text:p/>
            </draw:polygon>
            <draw:polygon draw:style-name="gr114" draw:text-style-name="P5" draw:layer="layout" svg:width="3.884cm" svg:height="5.499cm" svg:x="2.021cm" svg:y="13.166cm" svg:viewBox="0 0 3885 5500" draw:points="220,0 3885,2434 3885,5354 3665,5500 0,3066 0,146">
              <text:p/>
            </draw:polygon>
            <draw:polygon draw:style-name="gr115" draw:text-style-name="P18" draw:layer="layout" svg:width="0.146cm" svg:height="0.193cm" svg:x="3.78cm" svg:y="17.157cm" svg:viewBox="0 0 147 194" draw:points="0,97 0,0 147,97 147,194">
              <text:p/>
            </draw:polygon>
          </draw:g>
        </draw:g>
        <draw:frame draw:style-name="gr116" draw:text-style-name="P13" draw:layer="layout" svg:width="6.584cm" svg:height="4.139cm" svg:x="4.249cm" svg:y="9.916cm">
          <draw:text-box>
            <text:p><text:span text:style-name="T1">HW: Netgear TL-SG108 8 port</text:span></text:p>
            <text:p><text:span text:style-name="T1">Port 1: Bell 3000 Home Hub</text:span></text:p>
            <text:p text:style-name="P19"><text:span text:style-name="T1">Port 2: N/A </text:span></text:p>
            <text:p text:style-name="P19"><text:span text:style-name="T1">Port 3: N/A</text:span></text:p>
            <text:p text:style-name="P19"><text:span text:style-name="T1">Port 4: N/A</text:span></text:p>
            <text:p text:style-name="P19"><text:span text:style-name="T1">Port 5: N/A</text:span></text:p>
            <text:p text:style-name="P19"><text:span text:style-name="T1">Port 6: Master bedroom (unused)</text:span></text:p>
            <text:p text:style-name="P19"><text:span text:style-name="T1">Port 7: Workshop</text:span></text:p>
            <text:p text:style-name="P19"><text:span text:style-name="T1">Port 8: Electronics lab</text:span></text:p>
          </draw:text-box>
        </draw:frame>
        <draw:frame draw:style-name="gr117" draw:text-style-name="P13" draw:layer="layout" svg:width="6.584cm" svg:height="5.435cm" svg:x="10.75cm" svg:y="15.083cm">
          <draw:text-box>
            <text:p><text:span text:style-name="T1">HW: Wavlink AC1200</text:span></text:p>
            <text:p><text:span text:style-name="T1">MAC: 80:3F:5D:64:39:02</text:span></text:p>
            <text:p><text:span text:style-name="T1">IP: 192.168.2.4</text:span></text:p>
            <text:p><text:span text:style-name="T1">Mask: 255.255.255.0</text:span></text:p>
            <text:p><text:span text:style-name="T1">SSID1: MN_Outside</text:span></text:p>
            <text:p><text:span text:style-name="T1">SSID2: N/A (Auto dual band)</text:span></text:p>
            <text:p><text:span text:style-name="T1">Access PW: 5194741299</text:span></text:p>
            <text:p><text:span text:style-name="T1">Admin PW: admin, t0ta7r1p0ff</text:span></text:p>
            <text:p><text:span text:style-name="T1"/></text:p>
            <text:p><text:span text:style-name="T1">NOTE: Power cable on deck for AP is yellow.</text:span></text:p>
            <text:p><text:span text:style-name="T1"/></text:p>
          </draw:text-box>
        </draw:frame>
        <draw:frame draw:style-name="gr108" draw:text-style-name="P13" draw:layer="layout" svg:width="6.584cm" svg:height="3.939cm" svg:x="1.666cm" svg:y="18.311cm">
          <draw:text-box>
            <text:p><text:span text:style-name="T1">HW: Living room TV</text:span></text:p>
            <text:p><text:span text:style-name="T1">IP: 192.168.2.??</text:span></text:p>
            <text:p><text:span text:style-name="T1">Mask: 255.255.255.0</text:span></text:p>
            <text:p><text:span text:style-name="T1"/></text:p>
          </draw:text-box>
        </draw:frame>
        <draw:connector draw:style-name="gr118" draw:text-style-name="P20" draw:layer="layout" draw:line-skew="-3.159cm" svg:x1="10.666cm" svg:y1="7.433cm" svg:x2="17.319cm" svg:y2="18.731cm" draw:start-shape="id1" draw:end-shape="id2" svg:d="M10666 7433h167v11298h6486" svg:viewBox="0 0 6654 11299">
          <text:p/>
        </draw:connector>
        <draw:connector draw:style-name="gr118" draw:text-style-name="P20" draw:layer="layout" draw:line-skew="-3.167cm" svg:x1="10.666cm" svg:y1="7.433cm" svg:x2="17.333cm" svg:y2="14.934cm" draw:start-shape="id1" draw:start-glue-point="1" draw:end-shape="id3" svg:d="M10666 7433h167v7501h6500" svg:viewBox="0 0 6668 7502">
          <text:p/>
        </draw:connector>
        <draw:connector draw:style-name="gr118" draw:text-style-name="P20" draw:layer="layout" draw:line-skew="-3.208cm" svg:x1="10.666cm" svg:y1="7.433cm" svg:x2="17.416cm" svg:y2="11.101cm" draw:start-shape="id1" draw:start-glue-point="1" draw:end-shape="id4" svg:d="M10666 7433h167v3668h6583" svg:viewBox="0 0 6751 3669">
          <text:p/>
        </draw:connector>
        <draw:connector draw:style-name="gr118" draw:text-style-name="P20" draw:layer="layout" svg:x1="5.281cm" svg:y1="7.443cm" svg:x2="7.028cm" svg:y2="7.433cm" draw:start-shape="id5" draw:end-shape="id1" svg:d="M5281 7443h864v-10h883" svg:viewBox="0 0 1748 11">
          <text:p/>
        </draw:connector>
        <draw:connector draw:style-name="gr118" draw:text-style-name="P20" draw:layer="layout" svg:x1="3.765cm" svg:y1="9.333cm" svg:x2="2.241cm" svg:y2="13.166cm" draw:start-shape="id5" draw:end-shape="id6" draw:end-glue-point="8" svg:d="M3765 9333v1917h-1524v1916" svg:viewBox="0 0 1525 3834">
          <text:p/>
        </draw:connector>
        <draw:frame draw:style-name="gr119" draw:text-style-name="P21" draw:layer="layout" svg:width="9.417cm" svg:height="3cm" svg:x="9.166cm" svg:y="1cm">
          <draw:text-box>
            <text:p>MitchellNET Cat5 wiring</text:p>
            <text:p>June 30, 2025</text:p>
          </draw:text-box>
        </draw:frame>
        <draw:frame draw:style-name="gr116" draw:text-style-name="P13" draw:layer="layout" svg:width="7.048cm" svg:height="4.139cm" svg:x="10.889cm" svg:y="11.273cm">
          <draw:text-box>
            <text:p><text:span text:style-name="T1">HW: tp-Link AC1750 (Archer C7 V2)</text:span></text:p>
            <text:p><text:span text:style-name="T1">MAC: 30:b5:c2:fb:2b:2a</text:span></text:p>
            <text:p><text:span text:style-name="T1">IP: 192.168.2.3</text:span></text:p>
            <text:p><text:span text:style-name="T1">Mask: 255.255.255.0</text:span></text:p>
            <text:p><text:span text:style-name="T1">SSID1: MN_Workshop_2.4Ghz</text:span></text:p>
            <text:p><text:span text:style-name="T1">SSID2: MN_Workshop_5.0Ghz</text:span></text:p>
            <text:p><text:span text:style-name="T1">Access PW: 5194741299</text:span></text:p>
            <text:p><text:span text:style-name="T1">Admin PW: admin, t0ta7r1p0ff</text:span></text:p>
            <text:p><text:span text:style-name="T1"/></text:p>
          </draw:text-box>
        </draw:frame>
        <draw:frame draw:style-name="gr116" draw:text-style-name="P13" draw:layer="layout" svg:width="7.333cm" svg:height="4.139cm" svg:x="10.833cm" svg:y="7.5cm">
          <draw:text-box>
            <text:p><text:span text:style-name="T1">HW: tp-Link AC1200 (Archer A6 V4.0)</text:span></text:p>
            <text:p><text:span text:style-name="T1">MAC: 50:91:e3:f7:14:a3</text:span></text:p>
            <text:p><text:span text:style-name="T1">IP: 192.168.2.2</text:span></text:p>
            <text:p><text:span text:style-name="T1">Mask: 255.255.255.0</text:span></text:p>
            <text:p><text:span text:style-name="T1">SSID1: MN_DS_Office_2.4Ghz</text:span></text:p>
            <text:p><text:span text:style-name="T1">SSID2: MN_DS_Office_5.0Ghz</text:span></text:p>
            <text:p><text:span text:style-name="T1">Access PW: 5194741299</text:span></text:p>
            <text:p><text:span text:style-name="T1">Admin PW: admin, t0ta7r1p0ff</text:span></text:p>
            <text:p><text:span text:style-name="T1"/></text:p>
          </draw:text-box>
        </draw:frame>
        <draw:g draw:style-name="gr1" xml:id="id8" draw:id="id8">
          <draw:glue-point draw:id="4" svg:x="-2cm" svg:y="-5cm"/>
          <draw:glue-point draw:id="5" svg:x="0cm" svg:y="-4.09cm"/>
          <draw:glue-point draw:id="6" svg:x="3cm" svg:y="-2.727cm"/>
          <draw:glue-point draw:id="7" svg:x="3cm" svg:y="0.454cm"/>
          <draw:glue-point draw:id="8" svg:x="3cm" svg:y="3.636cm"/>
          <draw:glue-point draw:id="9" svg:x="1cm" svg:y="4.545cm"/>
          <draw:glue-point draw:id="10" svg:x="-3cm" svg:y="3.636cm"/>
          <draw:glue-point draw:id="11" svg:x="-5cm" svg:y="2.727cm"/>
          <draw:glue-point draw:id="12" svg:x="-5cm" svg:y="-3.636cm"/>
          <draw:glue-point draw:id="13" svg:x="-3cm" svg:y="-4.545cm"/>
          <draw:path draw:style-name="gr120" draw:text-style-name="P1" draw:layer="layout" svg:width="0.671cm" svg:height="0.388cm" svg:x="26.411cm" svg:y="10.487cm" svg:viewBox="0 0 672 389" svg:d="M0 389c369 0 672-156 672-234 0-77 0-155-269-155 0 233-403 77-403 389z">
            <text:p/>
          </draw:path>
          <draw:g draw:style-name="gr3">
            <draw:polygon draw:style-name="gr121" draw:text-style-name="P22" draw:layer="layout" svg:width="0.402cm" svg:height="1.32cm" svg:x="26.411cm" svg:y="9.555cm" svg:viewBox="0 0 403 1321" draw:points="0,1321 0,233 403,0 403,1088">
              <text:p/>
            </draw:polygon>
            <draw:polygon draw:style-name="gr122" draw:text-style-name="P16" draw:layer="layout" svg:width="1.075cm" svg:height="0.621cm" svg:x="25.739cm" svg:y="9.166cm" svg:viewBox="0 0 1076 622" draw:points="672,622 0,233 403,0 1076,389">
              <text:p/>
            </draw:polygon>
            <draw:polygon draw:style-name="gr123" draw:text-style-name="P14" draw:layer="layout" svg:width="0.671cm" svg:height="1.476cm" svg:x="25.739cm" svg:y="9.399cm" svg:viewBox="0 0 672 1477" draw:points="0,1088 0,0 672,389 672,1477">
              <text:p/>
            </draw:polygon>
            <draw:polygon draw:style-name="gr124" draw:text-style-name="P5" draw:layer="layout" svg:width="1.075cm" svg:height="1.709cm" svg:x="25.739cm" svg:y="9.166cm" svg:viewBox="0 0 1076 1710" draw:points="0,1321 0,233 403,0 1076,389 1076,1477 672,1710">
              <text:p/>
            </draw:polygon>
          </draw:g>
        </draw:g>
        <draw:g draw:style-name="gr1" xml:id="id9" draw:id="id9">
          <draw:glue-point draw:id="4" svg:x="-2cm" svg:y="-5cm"/>
          <draw:glue-point draw:id="5" svg:x="0cm" svg:y="-4.09cm"/>
          <draw:glue-point draw:id="6" svg:x="3cm" svg:y="-2.727cm"/>
          <draw:glue-point draw:id="7" svg:x="3cm" svg:y="0.454cm"/>
          <draw:glue-point draw:id="8" svg:x="3cm" svg:y="3.636cm"/>
          <draw:glue-point draw:id="9" svg:x="1cm" svg:y="4.545cm"/>
          <draw:glue-point draw:id="10" svg:x="-3cm" svg:y="3.636cm"/>
          <draw:glue-point draw:id="11" svg:x="-5cm" svg:y="2.727cm"/>
          <draw:glue-point draw:id="12" svg:x="-5cm" svg:y="-3.636cm"/>
          <draw:glue-point draw:id="13" svg:x="-3cm" svg:y="-4.545cm"/>
          <draw:path draw:style-name="gr125" draw:text-style-name="P1" draw:layer="layout" svg:width="0.671cm" svg:height="0.388cm" svg:x="26.505cm" svg:y="16.904cm" svg:viewBox="0 0 672 389" svg:d="M0 389c369 0 672-156 672-234 0-77 0-155-269-155 0 233-403 77-403 389z">
            <text:p/>
          </draw:path>
          <draw:g draw:style-name="gr3">
            <draw:polygon draw:style-name="gr126" draw:text-style-name="P22" draw:layer="layout" svg:width="0.402cm" svg:height="1.32cm" svg:x="26.505cm" svg:y="15.972cm" svg:viewBox="0 0 403 1321" draw:points="0,1321 0,233 403,0 403,1088">
              <text:p/>
            </draw:polygon>
            <draw:polygon draw:style-name="gr127" draw:text-style-name="P16" draw:layer="layout" svg:width="1.075cm" svg:height="0.621cm" svg:x="25.833cm" svg:y="15.583cm" svg:viewBox="0 0 1076 622" draw:points="672,622 0,233 403,0 1076,389">
              <text:p/>
            </draw:polygon>
            <draw:polygon draw:style-name="gr128" draw:text-style-name="P14" draw:layer="layout" svg:width="0.671cm" svg:height="1.476cm" svg:x="25.833cm" svg:y="15.816cm" svg:viewBox="0 0 672 1477" draw:points="0,1088 0,0 672,389 672,1477">
              <text:p/>
            </draw:polygon>
            <draw:polygon draw:style-name="gr129" draw:text-style-name="P5" draw:layer="layout" svg:width="1.075cm" svg:height="1.709cm" svg:x="25.833cm" svg:y="15.583cm" svg:viewBox="0 0 1076 1710" draw:points="0,1321 0,233 403,0 1076,389 1076,1477 672,1710">
              <text:p/>
            </draw:polygon>
          </draw:g>
        </draw:g>
        <draw:g draw:style-name="gr1" xml:id="id10" draw:id="id10">
          <draw:glue-point draw:id="4" svg:x="-2cm" svg:y="-5cm"/>
          <draw:glue-point draw:id="5" svg:x="0cm" svg:y="-4.09cm"/>
          <draw:glue-point draw:id="6" svg:x="3cm" svg:y="-2.727cm"/>
          <draw:glue-point draw:id="7" svg:x="3cm" svg:y="0.454cm"/>
          <draw:glue-point draw:id="8" svg:x="3cm" svg:y="3.636cm"/>
          <draw:glue-point draw:id="9" svg:x="1cm" svg:y="4.545cm"/>
          <draw:glue-point draw:id="10" svg:x="-3cm" svg:y="3.636cm"/>
          <draw:glue-point draw:id="11" svg:x="-5cm" svg:y="2.727cm"/>
          <draw:glue-point draw:id="12" svg:x="-5cm" svg:y="-3.636cm"/>
          <draw:glue-point draw:id="13" svg:x="-3cm" svg:y="-4.545cm"/>
          <draw:path draw:style-name="gr130" draw:text-style-name="P1" draw:layer="layout" svg:width="0.671cm" svg:height="0.388cm" svg:x="26.661cm" svg:y="20.487cm" svg:viewBox="0 0 672 389" svg:d="M0 389c369 0 672-156 672-234 0-77 0-155-269-155 0 233-403 77-403 389z">
            <text:p/>
          </draw:path>
          <draw:g draw:style-name="gr3">
            <draw:polygon draw:style-name="gr131" draw:text-style-name="P22" draw:layer="layout" svg:width="0.402cm" svg:height="1.32cm" svg:x="26.661cm" svg:y="19.555cm" svg:viewBox="0 0 403 1321" draw:points="0,1321 0,233 403,0 403,1088">
              <text:p/>
            </draw:polygon>
            <draw:polygon draw:style-name="gr132" draw:text-style-name="P16" draw:layer="layout" svg:width="1.075cm" svg:height="0.621cm" svg:x="25.989cm" svg:y="19.166cm" svg:viewBox="0 0 1076 622" draw:points="672,622 0,233 403,0 1076,389">
              <text:p/>
            </draw:polygon>
            <draw:polygon draw:style-name="gr133" draw:text-style-name="P14" draw:layer="layout" svg:width="0.671cm" svg:height="1.476cm" svg:x="25.989cm" svg:y="19.399cm" svg:viewBox="0 0 672 1477" draw:points="0,1088 0,0 672,389 672,1477">
              <text:p/>
            </draw:polygon>
            <draw:polygon draw:style-name="gr134" draw:text-style-name="P5" draw:layer="layout" svg:width="1.075cm" svg:height="1.709cm" svg:x="25.989cm" svg:y="19.166cm" svg:viewBox="0 0 1076 1710" draw:points="0,1321 0,233 403,0 1076,389 1076,1477 672,1710">
              <text:p/>
            </draw:polygon>
          </draw:g>
        </draw:g>
        <draw:connector draw:style-name="gr118" draw:text-style-name="P20" draw:layer="layout" draw:line-skew="2.723cm" svg:x1="20.333cm" svg:y1="10.083cm" svg:x2="25.739cm" svg:y2="10.021cm" draw:start-shape="id7" draw:start-glue-point="2" draw:end-shape="id8" draw:end-glue-point="3" svg:d="M20333 10083h5417v-62h-11" svg:viewBox="0 0 5418 63">
          <text:p/>
        </draw:connector>
        <draw:connector draw:style-name="gr118" draw:text-style-name="P20" draw:layer="layout" draw:line-skew="-2.507cm" svg:x1="19.847cm" svg:y1="14.934cm" svg:x2="25.833cm" svg:y2="16.438cm" draw:start-shape="id3" draw:end-shape="id9" svg:d="M19847 14934h486v1504h5500" svg:viewBox="0 0 5987 1505">
          <text:p/>
        </draw:connector>
        <draw:connector draw:style-name="gr118" draw:text-style-name="P20" draw:layer="layout" draw:line-skew="-2.585cm" svg:x1="19.847cm" svg:y1="14.934cm" svg:x2="25.989cm" svg:y2="20.021cm" draw:start-shape="id3" draw:end-shape="id10" draw:end-glue-point="3" svg:d="M19847 14934h486v5087h5656" svg:viewBox="0 0 6143 5088">
          <text:p/>
        </draw:connector>
        <draw:frame draw:style-name="gr135" draw:text-style-name="P13" draw:layer="layout" svg:width="6.584cm" svg:height="2.411cm" svg:x="20.249cm" svg:y="14.505cm">
          <draw:text-box>
            <text:p><text:span text:style-name="T1">HW: Tormach 770 S3 mill</text:span></text:p>
            <text:p><text:span text:style-name="T1">IP: 192.168.2.47</text:span></text:p>
            <text:p><text:span text:style-name="T1">Mask: 255.255.255.0</text:span></text:p>
            <text:p><text:span text:style-name="T1">Admin ID, PW: ??, ??</text:span></text:p>
            <text:p><text:span text:style-name="T1"/></text:p>
          </draw:text-box>
        </draw:frame>
        <draw:frame draw:style-name="gr135" draw:text-style-name="P13" draw:layer="layout" svg:width="6.584cm" svg:height="2.411cm" svg:x="20.25cm" svg:y="18cm">
          <draw:text-box>
            <text:p><text:span text:style-name="T1">HW: Tormach 15L slant Pro lathe</text:span></text:p>
            <text:p><text:span text:style-name="T1">IP: 192.168.2.48</text:span></text:p>
            <text:p><text:span text:style-name="T1">Mask: 255.255.255.0</text:span></text:p>
            <text:p><text:span text:style-name="T1">Admin ID, PW: ??, ??</text:span></text:p>
            <text:p><text:span text:style-name="T1"/></text:p>
          </draw:text-box>
        </draw:frame>
        <draw:g draw:style-name="gr1">
          <draw:glue-point draw:id="4" svg:x="0.487cm" svg:y="-5cm"/>
          <draw:glue-point draw:id="5" svg:x="2.194cm" svg:y="-3.6cm"/>
          <draw:glue-point draw:id="6" svg:x="4.145cm" svg:y="-1.9cm"/>
          <draw:glue-point draw:id="7" svg:x="4.145cm" svg:y="-0.1cm"/>
          <draw:glue-point draw:id="8" svg:x="4.145cm" svg:y="2cm"/>
          <draw:glue-point draw:id="9" svg:x="2.56cm" svg:y="3.3cm"/>
          <draw:glue-point draw:id="10" svg:x="0.487cm" svg:y="5cm"/>
          <draw:glue-point draw:id="11" svg:x="-3.171cm" svg:y="-0.2cm"/>
          <draw:glue-point draw:id="12" svg:x="-3.171cm" svg:y="-2cm"/>
          <draw:glue-point draw:id="13" svg:x="-1.342cm" svg:y="-3.5cm"/>
          <draw:path draw:style-name="gr136" draw:text-style-name="P1" draw:layer="layout" svg:width="0.976cm" svg:height="0.566cm" svg:x="25.963cm" svg:y="6.669cm" svg:viewBox="0 0 977 567" svg:d="M1 567c72 0 976-184 976-354s-218-213-290-213c0 43-712 255-686 567z">
            <text:p/>
          </draw:path>
          <draw:g draw:style-name="gr3">
            <draw:polygon draw:style-name="gr137" draw:text-style-name="P14" draw:layer="layout" svg:width="0.791cm" svg:height="0.991cm" svg:x="25.17cm" svg:y="6.258cm" svg:viewBox="0 0 792 992" draw:points="0,567 0,0 792,425 792,992">
              <text:p/>
            </draw:polygon>
            <draw:polygon draw:style-name="gr138" draw:text-style-name="P22" draw:layer="layout" svg:width="0.791cm" svg:height="0.991cm" svg:x="25.963cm" svg:y="6.258cm" svg:viewBox="0 0 792 992" draw:points="0,992 0,425 792,0 792,567">
              <text:p/>
            </draw:polygon>
            <draw:polygon draw:style-name="gr139" draw:text-style-name="P16" draw:layer="layout" svg:width="1.584cm" svg:height="0.849cm" svg:x="25.17cm" svg:y="5.833cm" svg:viewBox="0 0 1585 850" draw:points="792,850 0,425 792,0 1585,425">
              <text:p/>
            </draw:polygon>
            <draw:polygon draw:style-name="gr140" draw:text-style-name="P23" draw:layer="layout" svg:width="0.052cm" svg:height="0.084cm" svg:x="25.857cm" svg:y="6.683cm" svg:viewBox="0 0 53 85" draw:points="0,57 0,0 53,28 53,85">
              <text:p/>
            </draw:polygon>
            <draw:polygon draw:style-name="gr141" draw:text-style-name="P22" draw:layer="layout" svg:width="0.527cm" svg:height="0.282cm" svg:x="25.434cm" svg:y="5.975cm" svg:viewBox="0 0 528 283" draw:points="0,283 528,0 528,113">
              <text:p/>
            </draw:polygon>
            <draw:polygon draw:style-name="gr142" draw:text-style-name="P14" draw:layer="layout" svg:width="0.527cm" svg:height="0.339cm" svg:x="25.963cm" svg:y="5.975cm" svg:viewBox="0 0 528 340" draw:points="0,113 0,0 528,283 423,340">
              <text:p/>
            </draw:polygon>
            <draw:line draw:style-name="gr143" draw:text-style-name="P8" draw:layer="layout" svg:x1="26.439cm" svg:y1="6.287cm" svg:x2="26.016cm" svg:y2="6.06cm">
              <text:p/>
            </draw:line>
            <draw:polygon draw:style-name="gr144" draw:text-style-name="P22" draw:layer="layout" svg:width="0.527cm" svg:height="0.268cm" svg:x="25.302cm" svg:y="6.825cm" svg:viewBox="0 0 528 269" draw:points="0,198 528,0 528,113 0,269">
              <text:p/>
            </draw:polygon>
            <draw:polygon draw:style-name="gr145" draw:text-style-name="P5" draw:layer="layout" svg:width="1.056cm" svg:height="0.566cm" svg:x="25.434cm" svg:y="5.975cm" svg:viewBox="0 0 1057 567" draw:points="0,283 528,0 1057,283 528,567">
              <text:p/>
            </draw:polygon>
            <draw:polygon draw:style-name="gr146" draw:text-style-name="P14" draw:layer="layout" svg:width="0.527cm" svg:height="0.353cm" svg:x="24.774cm" svg:y="6.74cm" svg:viewBox="0 0 528 354" draw:points="0,71 0,0 528,283 528,354">
              <text:p/>
            </draw:polygon>
            <draw:polyline draw:style-name="gr147" draw:text-style-name="P8" draw:layer="layout" svg:width="0.527cm" svg:height="0.325cm" svg:x="25.302cm" svg:y="6.485cm" svg:viewBox="0 0 528 326" draw:points="0,57 0,0 528,283 528,326">
              <text:p/>
            </draw:polyline>
            <draw:polygon draw:style-name="gr148" draw:text-style-name="P16" draw:layer="layout" svg:width="1.056cm" svg:height="0.481cm" svg:x="24.774cm" svg:y="6.542cm" svg:viewBox="0 0 1057 482" draw:points="528,482 0,198 528,0 1057,283">
              <text:p/>
            </draw:polygon>
            <draw:path draw:style-name="gr149" draw:text-style-name="P24" draw:layer="layout" svg:width="0.95cm" svg:height="0.41cm" svg:x="24.8cm" svg:y="6.584cm" svg:viewBox="0 0 951 411" svg:d="M370 411c-106-57-264-142-370-198 132-71 396-170 581-213 106 57 238 128 370 198-159 43-423 142-581 213z">
              <text:p/>
            </draw:path>
            <draw:polygon draw:style-name="gr150" draw:text-style-name="P5" draw:layer="layout" svg:width="1.98cm" svg:height="1.416cm" svg:x="24.774cm" svg:y="5.833cm" svg:viewBox="0 0 1981 1417" draw:points="396,765 396,425 1189,0 1981,425 1981,992 1189,1417 766,1190 528,1261 0,978 0,907">
              <text:p/>
            </draw:polygon>
          </draw:g>
        </draw:g>
        <draw:line draw:style-name="gr151" draw:text-style-name="P25" xml:id="id7" draw:id="id7" draw:layer="layout" svg:x1="20.333cm" svg:y1="7.333cm" svg:x2="20.333cm" svg:y2="10.083cm">
          <text:p/>
        </draw:line>
        <draw:line draw:style-name="gr151" draw:text-style-name="P25" draw:layer="layout" svg:x1="20.333cm" svg:y1="6.333cm" svg:x2="25.166cm" svg:y2="6.333cm">
          <text:p/>
        </draw:line>
        <draw:frame draw:style-name="gr152" draw:text-style-name="P13" draw:layer="layout" svg:width="6.584cm" svg:height="2.843cm" svg:x="20.166cm" svg:y="4.25cm">
          <draw:text-box>
            <text:p><text:span text:style-name="T1">HW: Bambu Labs Carbon X1 </text:span></text:p>
            <text:p><text:span text:style-name="T1">MAC: B8:13:32:8D:99:02</text:span></text:p>
            <text:p><text:span text:style-name="T1">IP: 192.168.2.92</text:span></text:p>
            <text:p><text:span text:style-name="T1">Mask: 255.255.255.0</text:span></text:p>
            <text:p><text:span text:style-name="T1"/></text:p>
            <text:p><text:span text:style-name="T1"/></text:p>
          </draw:text-box>
        </draw:frame>
        <draw:g draw:style-name="gr1">
          <draw:glue-point draw:id="4" svg:x="0.487cm" svg:y="-5cm"/>
          <draw:glue-point draw:id="5" svg:x="2.194cm" svg:y="-3.6cm"/>
          <draw:glue-point draw:id="6" svg:x="4.145cm" svg:y="-1.9cm"/>
          <draw:glue-point draw:id="7" svg:x="4.145cm" svg:y="-0.1cm"/>
          <draw:glue-point draw:id="8" svg:x="4.145cm" svg:y="2cm"/>
          <draw:glue-point draw:id="9" svg:x="2.56cm" svg:y="3.3cm"/>
          <draw:glue-point draw:id="10" svg:x="0.487cm" svg:y="5cm"/>
          <draw:glue-point draw:id="11" svg:x="-3.171cm" svg:y="-0.2cm"/>
          <draw:glue-point draw:id="12" svg:x="-3.171cm" svg:y="-2cm"/>
          <draw:glue-point draw:id="13" svg:x="-1.342cm" svg:y="-3.5cm"/>
          <draw:path draw:style-name="gr153" draw:text-style-name="P1" draw:layer="layout" svg:width="0.976cm" svg:height="0.566cm" svg:x="26.105cm" svg:y="3.419cm" svg:viewBox="0 0 977 567" svg:d="M1 567c72 0 976-184 976-354s-218-213-290-213c0 43-712 255-686 567z">
            <text:p/>
          </draw:path>
          <draw:g draw:style-name="gr3">
            <draw:polygon draw:style-name="gr154" draw:text-style-name="P14" draw:layer="layout" svg:width="0.791cm" svg:height="0.991cm" svg:x="25.312cm" svg:y="3.008cm" svg:viewBox="0 0 792 992" draw:points="0,567 0,0 792,425 792,992">
              <text:p/>
            </draw:polygon>
            <draw:polygon draw:style-name="gr155" draw:text-style-name="P22" draw:layer="layout" svg:width="0.791cm" svg:height="0.991cm" svg:x="26.105cm" svg:y="3.008cm" svg:viewBox="0 0 792 992" draw:points="0,992 0,425 792,0 792,567">
              <text:p/>
            </draw:polygon>
            <draw:polygon draw:style-name="gr156" draw:text-style-name="P16" draw:layer="layout" svg:width="1.584cm" svg:height="0.849cm" svg:x="25.312cm" svg:y="2.583cm" svg:viewBox="0 0 1585 850" draw:points="792,850 0,425 792,0 1585,425">
              <text:p/>
            </draw:polygon>
            <draw:polygon draw:style-name="gr157" draw:text-style-name="P23" draw:layer="layout" svg:width="0.052cm" svg:height="0.084cm" svg:x="25.999cm" svg:y="3.433cm" svg:viewBox="0 0 53 85" draw:points="0,57 0,0 53,28 53,85">
              <text:p/>
            </draw:polygon>
            <draw:polygon draw:style-name="gr158" draw:text-style-name="P22" draw:layer="layout" svg:width="0.527cm" svg:height="0.282cm" svg:x="25.576cm" svg:y="2.725cm" svg:viewBox="0 0 528 283" draw:points="0,283 528,0 528,113">
              <text:p/>
            </draw:polygon>
            <draw:polygon draw:style-name="gr159" draw:text-style-name="P14" draw:layer="layout" svg:width="0.527cm" svg:height="0.339cm" svg:x="26.105cm" svg:y="2.725cm" svg:viewBox="0 0 528 340" draw:points="0,113 0,0 528,283 423,340">
              <text:p/>
            </draw:polygon>
            <draw:line draw:style-name="gr160" draw:text-style-name="P8" draw:layer="layout" svg:x1="26.581cm" svg:y1="3.037cm" svg:x2="26.158cm" svg:y2="2.81cm">
              <text:p/>
            </draw:line>
            <draw:polygon draw:style-name="gr161" draw:text-style-name="P22" draw:layer="layout" svg:width="0.527cm" svg:height="0.268cm" svg:x="25.444cm" svg:y="3.575cm" svg:viewBox="0 0 528 269" draw:points="0,198 528,0 528,113 0,269">
              <text:p/>
            </draw:polygon>
            <draw:polygon draw:style-name="gr162" draw:text-style-name="P5" draw:layer="layout" svg:width="1.056cm" svg:height="0.566cm" svg:x="25.576cm" svg:y="2.725cm" svg:viewBox="0 0 1057 567" draw:points="0,283 528,0 1057,283 528,567">
              <text:p/>
            </draw:polygon>
            <draw:polygon draw:style-name="gr163" draw:text-style-name="P14" draw:layer="layout" svg:width="0.527cm" svg:height="0.353cm" svg:x="24.916cm" svg:y="3.49cm" svg:viewBox="0 0 528 354" draw:points="0,71 0,0 528,283 528,354">
              <text:p/>
            </draw:polygon>
            <draw:polyline draw:style-name="gr164" draw:text-style-name="P8" draw:layer="layout" svg:width="0.527cm" svg:height="0.325cm" svg:x="25.444cm" svg:y="3.235cm" svg:viewBox="0 0 528 326" draw:points="0,57 0,0 528,283 528,326">
              <text:p/>
            </draw:polyline>
            <draw:polygon draw:style-name="gr165" draw:text-style-name="P16" draw:layer="layout" svg:width="1.056cm" svg:height="0.481cm" svg:x="24.916cm" svg:y="3.292cm" svg:viewBox="0 0 1057 482" draw:points="528,482 0,198 528,0 1057,283">
              <text:p/>
            </draw:polygon>
            <draw:path draw:style-name="gr166" draw:text-style-name="P24" draw:layer="layout" svg:width="0.95cm" svg:height="0.41cm" svg:x="24.942cm" svg:y="3.334cm" svg:viewBox="0 0 951 411" svg:d="M370 411c-106-57-264-142-370-198 132-71 396-170 581-213 106 57 238 128 370 198-159 43-423 142-581 213z">
              <text:p/>
            </draw:path>
            <draw:polygon draw:style-name="gr167" draw:text-style-name="P5" draw:layer="layout" svg:width="1.98cm" svg:height="1.416cm" svg:x="24.916cm" svg:y="2.583cm" svg:viewBox="0 0 1981 1417" draw:points="396,765 396,425 1189,0 1981,425 1981,992 1189,1417 766,1190 528,1261 0,978 0,907">
              <text:p/>
            </draw:polygon>
          </draw:g>
        </draw:g>
        <draw:line draw:style-name="gr151" draw:text-style-name="P25" draw:layer="layout" svg:x1="20.333cm" svg:y1="3.083cm" svg:x2="25.333cm" svg:y2="3.083cm">
          <text:p/>
        </draw:line>
        <draw:frame draw:style-name="gr168" draw:text-style-name="P13" draw:layer="layout" svg:width="6.584cm" svg:height="2.843cm" svg:x="20.166cm" svg:y="1.073cm">
          <draw:text-box>
            <text:p><text:span text:style-name="T1">HW: Brother MFC-J5855DW </text:span></text:p>
            <text:p><text:span text:style-name="T1">MAC: CC:5E:F8:43:1A:9C</text:span></text:p>
            <text:p><text:span text:style-name="T1">IP: 192.168.2.179</text:span></text:p>
            <text:p><text:span text:style-name="T1">Mask: 255.255.255.0</text:span></text:p>
            <text:p><text:span text:style-name="T1"/></text:p>
            <text:p><text:span text:style-name="T1"/></text:p>
          </draw:text-box>
        </draw:frame>
        <draw:line draw:style-name="gr151" draw:text-style-name="P25" draw:layer="layout" svg:x1="20.333cm" svg:y1="3.083cm" svg:x2="20.333cm" svg:y2="7.666cm">
          <text:p/>
        </draw:line>
        <draw:frame draw:style-name="gr135" draw:text-style-name="P13" draw:layer="layout" svg:width="6.584cm" svg:height="2.411cm" svg:x="20.166cm" svg:y="8.089cm">
          <draw:text-box>
            <text:p><text:span text:style-name="T1">HW: Raspberry Pi Model B V4</text:span></text:p>
            <text:p><text:span text:style-name="T1">IP: 192.168.2.21</text:span></text:p>
            <text:p><text:span text:style-name="T1">Mask: 255.255.255.0</text:span></text:p>
            <text:p><text:span text:style-name="T1">Admin ID, PW: pi, password</text:span></text:p>
            <text:p><text:span text:style-name="T1"/></text:p>
          </draw:text-box>
        </draw:frame>
        <draw:g draw:style-name="gr1">
          <draw:glue-point draw:id="4" svg:x="-2cm" svg:y="-5cm"/>
          <draw:glue-point draw:id="5" svg:x="0cm" svg:y="-4.09cm"/>
          <draw:glue-point draw:id="6" svg:x="3cm" svg:y="-2.727cm"/>
          <draw:glue-point draw:id="7" svg:x="3cm" svg:y="0.454cm"/>
          <draw:glue-point draw:id="8" svg:x="3cm" svg:y="3.636cm"/>
          <draw:glue-point draw:id="9" svg:x="1cm" svg:y="4.545cm"/>
          <draw:glue-point draw:id="10" svg:x="-3cm" svg:y="3.636cm"/>
          <draw:glue-point draw:id="11" svg:x="-5cm" svg:y="2.727cm"/>
          <draw:glue-point draw:id="12" svg:x="-5cm" svg:y="-3.636cm"/>
          <draw:glue-point draw:id="13" svg:x="-3cm" svg:y="-4.545cm"/>
          <draw:path draw:style-name="gr169" draw:text-style-name="P1" draw:layer="layout" svg:width="0.671cm" svg:height="0.388cm" svg:x="26.422cm" svg:y="14.194cm" svg:viewBox="0 0 672 389" svg:d="M0 389c369 0 672-156 672-234 0-77 0-155-269-155 0 233-403 77-403 389z">
            <text:p/>
          </draw:path>
          <draw:g draw:style-name="gr3">
            <draw:polygon draw:style-name="gr170" draw:text-style-name="P22" draw:layer="layout" svg:width="0.402cm" svg:height="1.32cm" svg:x="26.422cm" svg:y="13.262cm" svg:viewBox="0 0 403 1321" draw:points="0,1321 0,233 403,0 403,1088">
              <text:p/>
            </draw:polygon>
            <draw:polygon draw:style-name="gr171" draw:text-style-name="P16" draw:layer="layout" svg:width="1.075cm" svg:height="0.621cm" svg:x="25.75cm" svg:y="12.873cm" svg:viewBox="0 0 1076 622" draw:points="672,622 0,233 403,0 1076,389">
              <text:p/>
            </draw:polygon>
            <draw:polygon draw:style-name="gr172" draw:text-style-name="P14" draw:layer="layout" svg:width="0.671cm" svg:height="1.476cm" svg:x="25.75cm" svg:y="13.106cm" svg:viewBox="0 0 672 1477" draw:points="0,1088 0,0 672,389 672,1477">
              <text:p/>
            </draw:polygon>
            <draw:polygon draw:style-name="gr173" draw:text-style-name="P5" draw:layer="layout" svg:width="1.075cm" svg:height="1.709cm" svg:x="25.75cm" svg:y="12.873cm" svg:viewBox="0 0 1076 1710" draw:points="0,1321 0,233 403,0 1076,389 1076,1477 672,1710">
              <text:p/>
            </draw:polygon>
          </draw:g>
        </draw:g>
        <draw:frame draw:style-name="gr135" draw:text-style-name="P13" draw:layer="layout" svg:width="6.584cm" svg:height="2.843cm" svg:x="20.25cm" svg:y="11.407cm">
          <draw:text-box>
            <text:p><text:span text:style-name="T1">HW: imac-server (Ununtu)</text:span></text:p>
            <text:p><text:span text:style-name="T1">IP: 192.168.2.10</text:span></text:p>
            <text:p><text:span text:style-name="T1">Mask: 255.255.255.0</text:span></text:p>
            <text:p><text:span text:style-name="T1">Admin ID, PW: andrew, t0ta7r1p0ff$1</text:span></text:p>
            <text:p><text:span text:style-name="T1"/></text:p>
          </draw:text-box>
        </draw:frame>
        <draw:line draw:style-name="gr151" draw:text-style-name="P25" draw:layer="layout" svg:x1="25.666cm" svg:y1="13.833cm" svg:x2="20.333cm" svg:y2="13.833cm">
          <text:p/>
        </draw:line>
        <draw:line draw:style-name="gr151" draw:text-style-name="P25" draw:layer="layout" svg:x1="20.333cm" svg:y1="10.083cm" svg:x2="20.333cm" svg:y2="14.91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Light_20_Grey_20_Linear_20_L" draw:display-name="Light Grey Linear L" draw:style="linear" draw:start-color="#b3b3b3" draw:end-color="#e5e5e5" draw:start-intensity="100%" draw:end-intensity="100%" draw:angle="18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Linear_20_T" draw:display-name="Light Grey Linear T" draw:style="linear" draw:start-color="#b3b3b3" draw:end-color="#e5e5e5" draw:start-intensity="100%" draw:end-intensity="100%" draw:angle="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>
      <loext:gradient-stop svg:offset="0" loext:color-type="rgb" loext:color-value="#b3b3b3"/>
      <loext:gradient-stop svg:offset="1" loext:color-type="rgb" loext:color-value="#e5e5e5"/>
    </draw:gradient>
    <draw:gradient draw:name="Light_20_Red_20_Axial_20_H" draw:display-name="Light Red Axial H" draw:style="axial" draw:start-color="#f8e8ea" draw:end-color="#de8e96" draw:start-intensity="100%" draw:end-intensity="100%" draw:angle="180deg" draw:border="0%">
      <loext:gradient-stop svg:offset="0" loext:color-type="rgb" loext:color-value="#f8e8ea"/>
      <loext:gradient-stop svg:offset="1" loext:color-type="rgb" loext:color-value="#de8e9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VRT_20_Light_20_Linear_20_L" draw:display-name="VRT Light Linear L" draw:style="linear" draw:start-color="#0073bc" draw:end-color="#7fb9dd" draw:start-intensity="100%" draw:end-intensity="100%" draw:angle="180deg" draw:border="10%">
      <loext:gradient-stop svg:offset="0" loext:color-type="rgb" loext:color-value="#0073bc"/>
      <loext:gradient-stop svg:offset="1" loext:color-type="rgb" loext:color-value="#7fb9dd"/>
    </draw:gradient>
    <draw:gradient draw:name="VRT_20_Light_20_Linear_20_T" draw:display-name="VRT Light Linear T" draw:style="linear" draw:start-color="#0073bc" draw:end-color="#7fb9dd" draw:start-intensity="100%" draw:end-intensity="100%" draw:angle="0deg" draw:border="10%">
      <loext:gradient-stop svg:offset="0" loext:color-type="rgb" loext:color-value="#0073bc"/>
      <loext:gradient-stop svg:offset="1" loext:color-type="rgb" loext:color-value="#7fb9dd"/>
    </draw:gradient>
    <draw:gradient draw:name="VRT_20_Light_20_Square_20_BR" draw:display-name="VRT Light Square BR" draw:style="square" draw:cx="30%" draw:cy="30%" draw:start-color="#0073bc" draw:end-color="#7fb9dd" draw:start-intensity="100%" draw:end-intensity="100%" draw:angle="0deg" draw:border="0%">
      <loext:gradient-stop svg:offset="0" loext:color-type="rgb" loext:color-value="#0073bc"/>
      <loext:gradient-stop svg:offset="1" loext:color-type="rgb" loext:color-value="#7fb9dd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13T16:12:40.043709354</meta:creation-date>
    <dc:date>2025-06-30T12:20:25.495452000</dc:date>
    <meta:editing-duration>P6DT20H22M5S</meta:editing-duration>
    <meta:editing-cycles>19</meta:editing-cycles>
    <meta:generator>LibreOffice/25.2.2.2$MacOSX_AARCH64 LibreOffice_project/7370d4be9e3cf6031a51beef54ff3bda878e3fac</meta:generator>
    <meta:print-date>2025-06-30T12:21:21.406668000</meta:print-date>
    <meta:printed-by>PDF files</meta:printed-by>
    <meta:document-statistic meta:object-count="213"/>
  </office:meta>
</office:document-meta>
</file>