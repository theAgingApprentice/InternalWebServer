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17b5b" officeooo:paragraph-rsid="00117b5b"/>
    </style:style>
    <style:style style:name="P2" style:family="paragraph" style:parent-style-name="Standard">
      <style:text-properties officeooo:rsid="00117b5b" officeooo:paragraph-rsid="0014eaf5"/>
    </style:style>
    <style:style style:name="P3" style:family="paragraph" style:parent-style-name="Standard" style:list-style-name="L4">
      <style:text-properties officeooo:rsid="00117b5b" officeooo:paragraph-rsid="0014eaf5"/>
    </style:style>
    <style:style style:name="P4" style:family="paragraph" style:parent-style-name="Standard" style:list-style-name="L4">
      <style:text-properties officeooo:rsid="00117b5b" officeooo:paragraph-rsid="00117b5b"/>
    </style:style>
    <style:style style:name="P5" style:family="paragraph" style:parent-style-name="Standard">
      <style:text-properties officeooo:rsid="0012f9c8" officeooo:paragraph-rsid="0012f9c8"/>
    </style:style>
    <style:style style:name="P6" style:family="paragraph" style:parent-style-name="Standard" style:list-style-name="L1">
      <style:text-properties officeooo:rsid="0012f9c8" officeooo:paragraph-rsid="0012f9c8"/>
    </style:style>
    <style:style style:name="P7" style:family="paragraph" style:parent-style-name="Standard" style:list-style-name="L3">
      <style:text-properties officeooo:rsid="0012f9c8" officeooo:paragraph-rsid="0012f9c8"/>
    </style:style>
    <style:style style:name="P8" style:family="paragraph" style:parent-style-name="Standard" style:list-style-name="L4">
      <style:text-properties officeooo:rsid="0012f9c8" officeooo:paragraph-rsid="0012f9c8"/>
    </style:style>
    <style:style style:name="P9" style:family="paragraph" style:parent-style-name="Standard" style:list-style-name="L1">
      <style:text-properties officeooo:paragraph-rsid="0012f9c8"/>
    </style:style>
    <style:style style:name="P10" style:family="paragraph" style:parent-style-name="Standard" style:list-style-name="L2">
      <style:text-properties officeooo:paragraph-rsid="0012f9c8"/>
    </style:style>
    <style:style style:name="T1" style:family="text">
      <style:text-properties officeooo:rsid="0012f9c8"/>
    </style:style>
    <style:style style:name="T2" style:family="text">
      <style:text-properties officeooo:rsid="0014eaf5"/>
    </style:style>
    <style:style style:name="T3" style:family="text">
      <style:text-properties officeooo:rsid="0015b78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CB Manufacturing</text:p>
      <text:p text:style-name="P1"/>
      <text:p text:style-name="P1">This document outline the process that I use to create PCBs. I have a separate article that discusses how I design PCBs that may also be of interest to you.</text:p>
      <text:p text:style-name="P1"/>
      <text:p text:style-name="P1"/>
      <text:h text:style-name="Heading_20_1" text:outline-level="1">Manufacturing the boards</text:h>
      <text:p text:style-name="P1"/>
      <text:h text:style-name="Heading_20_2" text:outline-level="2">Generating Gerber Files</text:h>
      <text:p text:style-name="P5">Once your design is locked down and you want to send it off to JCCB or PCBWay t<text:span text:style-name="T3">o</text:span> be made, you will need to do the following.</text:p>
      <text:p text:style-name="P5"/>
      <text:list xml:id="list1235601006" text:style-name="L1">
        <text:list-item>
          <text:p text:style-name="P9"><text:span text:style-name="T1">Get the dimensions of the board</text:span></text:p>
        </text:list-item>
      </text:list>
      <text:list xml:id="list3664623002" text:style-name="L3">
        <text:list-item>
          <text:list>
            <text:list-item>
              <text:p text:style-name="P7">Open your electronics design in Fusion360</text:p>
            </text:list-item>
            <text:list-item>
              <text:p text:style-name="P7">Go to the 2D view of the PCB</text:p>
            </text:list-item>
            <text:list-item>
              <text:p text:style-name="P7">Activate the Manufacturing tab</text:p>
            </text:list-item>
            <text:list-item>
              <text:p text:style-name="P7">Select Cam Preview option from the Manufacturing drop down menu</text:p>
            </text:list-item>
            <text:list-item>
              <text:p text:style-name="P7">Select the Board tab</text:p>
            </text:list-item>
            <text:list-item>
              <text:p text:style-name="P7">Expand the Board option</text:p>
            </text:list-item>
            <text:list-item>
              <text:p text:style-name="P7">Note the Width and Height values</text:p>
            </text:list-item>
          </text:list>
        </text:list-item>
      </text:list>
      <text:list xml:id="list93408836511296" text:continue-list="list1235601006" text:style-name="L1">
        <text:list-item>
          <text:p text:style-name="P6">Generate the Gerber files</text:p>
        </text:list-item>
      </text:list>
      <text:list xml:id="list692841" text:style-name="L2">
        <text:list-item>
          <text:list>
            <text:list-item>
              <text:p text:style-name="P10"><text:a xlink:type="simple" xlink:href="https://www.pcbway.com/helpcenter/technical_support/How_to_Generate_Gerber_Files_in_Fusion_360_.html" text:style-name="Internet_20_link" text:visited-style-name="Visited_20_Internet_20_Link"><text:span text:style-name="T1">Fusion360 - how to generate Gerber files.</text:span></text:a></text:p>
            </text:list-item>
          </text:list>
        </text:list-item>
      </text:list>
      <text:p text:style-name="P5"/>
      <text:h text:style-name="Heading_20_2" text:outline-level="2">Order the board</text:h>
      <text:list xml:id="list3537426336" text:style-name="L4">
        <text:list-item>
          <text:p text:style-name="P4">I use JLCPCB <text:span text:style-name="T1">to manufacture my PCBs. <text:s/></text:span></text:p>
        </text:list-item>
        <text:list-item>
          <text:p text:style-name="P8">You must provide the board dimensions as well as the Gerber files</text:p>
        </text:list-item>
        <text:list-item>
          <text:p text:style-name="P3"><text:span text:style-name="T2">Be sure t select the stencil option</text:span></text:p>
        </text:list-item>
      </text:list>
      <text:p text:style-name="P2"/>
      <text:p text:style-name="P1"/>
      <text:h text:style-name="Heading_20_1" text:outline-level="1">Stuffing Boards</text:h>
      <text:p text:style-name="P1"/>
      <text:p text:style-name="P1">Ordering parts using the part list from Fusion360</text:p>
      <text:p text:style-name="P1">I purchase components from Digikey</text:p>
      <text:p text:style-name="P1">I use this solder paste</text:p>
      <text:p text:style-name="P1">I use this flux</text:p>
      <text:p text:style-name="P1">I use this flux remover</text:p>
      <text:p text:style-name="P1">I wash the boards with water</text:p>
      <text:p text:style-name="P1">I used an air compressor to blow the water off</text:p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3-01T16:39:28.243015372</meta:creation-date>
    <dc:date>2025-03-17T09:34:07.237842332</dc:date>
    <meta:editing-duration>PT5M58S</meta:editing-duration>
    <meta:editing-cycles>3</meta:editing-cycles>
    <meta:generator>LibreOffice/7.3.7.2$MacOSX_X86_64 LibreOffice_project/e114eadc50a9ff8d8c8a0567d6da8f454beeb84f</meta:generator>
    <meta:document-statistic meta:table-count="0" meta:image-count="0" meta:object-count="0" meta:page-count="2" meta:paragraph-count="27" meta:word-count="211" meta:character-count="1079" meta:non-whitespace-character-count="906"/>
  </office:meta>
</office:document-meta>
</file>