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59cm" table:align="left" fo:background-color="transparent">
        <style:background-image/>
      </style:table-properties>
    </style:style>
    <style:style style:name="Table1.A" style:family="table-column">
      <style:table-column-properties style:column-width="3.713cm"/>
    </style:style>
    <style:style style:name="Table1.B" style:family="table-column">
      <style:table-column-properties style:column-width="6.6cm"/>
    </style:style>
    <style:style style:name="Table1.C" style:family="table-column">
      <style:table-column-properties style:column-width="7.276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49cm" fo:border="0.75pt solid #cfd9de">
        <style:background-image/>
      </style:table-cell-properties>
    </style:style>
    <style:style style:name="P1" style:family="paragraph" style:parent-style-name="Title">
      <style:paragraph-properties fo:text-align="start" style:justify-single-word="false"/>
    </style:style>
    <style:style style:name="P2" style:family="paragraph" style:parent-style-name="Standard">
      <style:text-properties fo:color="#000000" loext:opacity="100%" style:font-name="sans-serif" officeooo:paragraph-rsid="00230c14" fo:background-color="transparent"/>
    </style:style>
    <style:style style:name="P3" style:family="paragraph" style:parent-style-name="Subtitle">
      <style:paragraph-properties fo:margin-top="0cm" fo:margin-bottom="0cm" style:contextual-spacing="false"/>
    </style:style>
    <style:style style:name="P4" style:family="paragraph" style:parent-style-name="Standard">
      <style:text-properties fo:color="#000000" loext:opacity="100%" style:font-name="sans-serif" officeooo:paragraph-rsid="0024477b" fo:background-color="transparent"/>
    </style:style>
    <style:style style:name="P5" style:family="paragraph" style:parent-style-name="Heading_20_1">
      <style:paragraph-properties fo:margin-top="0cm" fo:margin-bottom="0cm" style:contextual-spacing="false"/>
    </style:style>
    <style:style style:name="P6"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 style:family="paragraph" style:parent-style-name="Heading_20_1">
      <style:text-properties officeooo:paragraph-rsid="0024477b"/>
    </style:style>
    <style:style style:name="P8" style:family="paragraph" style:parent-style-name="Text_20_body">
      <style:paragraph-properties fo:margin-left="0cm" fo:margin-right="0cm" fo:text-indent="0cm" style:auto-text-indent="false"/>
      <style:text-properties fo:color="#000000" loext:opacity="100%" style:font-name="sans-serif" officeooo:paragraph-rsid="002776c3" fo:background-color="transparent"/>
    </style:style>
    <style:style style:name="P9" style:family="paragraph" style:parent-style-name="Heading_20_2">
      <style:paragraph-properties fo:margin-top="0cm" fo:margin-bottom="0cm" style:contextual-spacing="false"/>
    </style:style>
    <style:style style:name="P10"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1"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 style:family="paragraph" style:parent-style-name="Text_20_body">
      <style:paragraph-properties fo:margin-left="0cm" fo:margin-right="0cm" fo:text-indent="0cm" style:auto-text-indent="false"/>
      <style:text-properties fo:color="#000000" loext:opacity="100%" style:font-name="sans-serif" officeooo:paragraph-rsid="00230c14" fo:background-color="transparent"/>
    </style:style>
    <style:style style:name="P13"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4" style:family="paragraph" style:parent-style-name="Text_20_body">
      <style:paragraph-properties fo:margin-left="0cm" fo:margin-right="0cm" fo:text-indent="0cm" style:auto-text-indent="false"/>
      <style:text-properties fo:color="#000000" loext:opacity="100%" style:font-name="sans-serif" fo:background-color="transparent"/>
    </style:style>
    <style:style style:name="P15" style:family="paragraph" style:parent-style-name="Text_20_body">
      <style:paragraph-properties fo:margin-left="0cm" fo:margin-right="0cm" fo:text-indent="0cm" style:auto-text-indent="false"/>
      <style:text-properties fo:color="#000000" loext:opacity="100%" style:font-name="sans-serif" officeooo:paragraph-rsid="0024477b" fo:background-color="transparent"/>
    </style:style>
    <style:style style:name="P16"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7" style:family="paragraph" style:parent-style-name="Standard">
      <style:paragraph-properties fo:margin-left="0cm" fo:margin-right="0cm" fo:text-indent="0cm" style:auto-text-indent="false"/>
      <style:text-properties fo:color="#000000" loext:opacity="100%" style:font-name="sans-serif" officeooo:paragraph-rsid="0024477b" fo:background-color="transparent"/>
    </style:style>
    <style:style style:name="P18"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9" style:family="paragraph" style:parent-style-name="Text_20_body">
      <style:paragraph-properties fo:margin-left="0cm" fo:margin-right="0cm" fo:margin-top="0cm" fo:margin-bottom="0cm" style:contextual-spacing="false" fo:text-indent="0cm" style:auto-text-indent="false"/>
      <style:text-properties fo:color="#000000" loext:opacity="100%" style:font-name="sans-serif" fo:background-color="transparent"/>
    </style:style>
    <style:style style:name="P20" style:family="paragraph" style:parent-style-name="Table_20_Heading">
      <style:paragraph-properties fo:margin-left="0cm" fo:margin-right="0cm" fo:text-indent="0cm" style:auto-text-indent="false"/>
      <style:text-properties fo:color="#000000" loext:opacity="100%" style:font-name="sans-serif" fo:font-weight="bold" fo:background-color="transparent"/>
    </style:style>
    <style:style style:name="P21" style:family="paragraph" style:parent-style-name="Table_20_Contents">
      <style:paragraph-properties fo:margin-left="0cm" fo:margin-right="0cm" fo:text-indent="0cm" style:auto-text-indent="false"/>
      <style:text-properties fo:color="#000000" loext:opacity="100%" style:font-name="sans-serif" fo:background-color="transparent"/>
    </style:style>
    <style:style style:name="P22"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3" style:family="paragraph" style:parent-style-name="Text_20_body">
      <style:paragraph-properties fo:margin-left="0cm" fo:margin-right="0cm" fo:margin-top="0cm" fo:margin-bottom="0cm" style:contextual-spacing="false" fo:text-indent="0cm" style:auto-text-indent="false"/>
      <style:text-properties fo:color="#000000" loext:opacity="100%" style:font-name="sans-serif" officeooo:paragraph-rsid="0024477b" fo:background-color="transparent"/>
    </style:style>
    <style:style style:name="T1" style:family="text">
      <style:text-properties officeooo:rsid="00230c14"/>
    </style:style>
    <style:style style:name="T2" style:family="text">
      <style:text-properties fo:font-weight="bold" style:font-weight-asian="bold" style:font-weight-complex="bold"/>
    </style:style>
    <style:style style:name="T3" style:family="text">
      <style:text-properties fo:color="#000000" loext:opacity="100%" style:font-name="sans-serif" fo:font-weight="bold" style:font-name-asian="sans-serif" style:font-weight-asian="bold" style:font-name-complex="sans-serif" style:font-weight-complex="bold"/>
    </style:style>
    <style:style style:name="T4" style:family="text">
      <style:text-properties fo:color="#000000" loext:opacity="100%" style:font-name="sans-serif" style:font-name-asian="sans-serif" style:font-name-complex="sans-serif"/>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Inline_20_Heading">
      <style:graphic-properties style:vertical-pos="middle" style:vertical-rel="text"/>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derstanding Serial Communication </text:p>
      <text:p text:style-name="P2"><draw:frame draw:style-name="fr1" draw:name="Frame1" text:anchor-type="as-char" draw:z-index="0"><draw:text-box fo:min-height="0.041cm" fo:min-width="0.041cm"><text:p text:style-name="P3"><text:span text:style-name="T1">Mac to </text:span>ESP32 with PlatformIO</text:p></draw:text-box></draw:frame><text:s/></text:p>
      <text:p text:style-name="P2">Published August 30, 2025</text:p>
      <text:p text:style-name="P2"/>
      <text:p text:style-name="P2">The ESP32, a versatile microcontroller from Espressif Systems, is a cornerstone for maker hobbyists building IoT and embedded systems due to its dual-core processor, Wi-Fi, and Bluetooth capabilities. When developing with an ESP32 Arduino development board on a Mac using PlatformIO in Visual Studio Code (VS Code), serial communication is central to two key tasks: uploading firmware and reading serial output. This article explores the protocol stack, clarifies the roles of serial, USB, and UART, and details the handshake process, offering insights for optimizing ESP32 projects.</text:p>
      <text:p text:style-name="P2"/>
      <text:p text:style-name="P4"><draw:frame draw:style-name="fr1" draw:name="Frame5" text:anchor-type="as-char" draw:z-index="4"><draw:text-box fo:min-height="0.041cm" fo:min-width="0.041cm"><text:h text:style-name="P5" text:outline-level="1">Key Concepts: Serial, USB, and UART</text:h></draw:text-box></draw:frame><text:s/></text:p>
      <text:p text:style-name="P4">Serial communication involves transmitting data as a sequential bit stream over a single channel, encompassing protocols like UART, SPI, and I2C. In ESP32 development, serial communication typically refers to UART-based data exchange.</text:p>
      <text:p text:style-name="P2"/>
      <text:list text:style-name="L1">
        <text:list-item>
          <text:p text:style-name="P6">UART (Universal Asynchronous Receiver/Transmitter): A hardware protocol using TX (transmit) and RX (receive) lines for asynchronous data transfer without a shared clock. The ESP32’s UART0 (GPIO1/TX, GPIO3/RX) is commonly used for programming and debugging, typically with 8 data bits, no parity, and 1 stop bit (8N1).</text:p>
        </text:list-item>
        <text:list-item>
          <text:p text:style-name="P6">USB (Universal Serial Bus): A standard defining physical connectors (e.g., USB-C) and a protocol for data transfer and device enumeration. ESP32 boards use a USB-to-UART bridge chip (e.g., CP2102) to convert USB signals to UART, as the ESP32 lacks native USB support.</text:p>
        </text:list-item>
        <text:list-item>
          <text:p text:style-name="P6">Relationship: USB acts as the physical transport layer between the Mac and the ESP32 board, with the bridge chip translating USB packets to 3.3V TTL UART signals for the ESP32.</text:p>
        </text:list-item>
      </text:list>
      <text:h text:style-name="P7" text:outline-level="1">Scenario 1: Uploading Firmware to the ESP32 </text:h>
      <text:h text:style-name="Heading_20_2" text:outline-level="2">Overview </text:h>
      <text:p text:style-name="P8">Uploading firmware to the ESP32 involves transferring compiled code from a Mac to the ESP32’s flash memory. PlatformIO automates this process, managing compilation and communication via a USB-to-UART bridge.</text:p>
      <text:p text:style-name="P8"><draw:frame draw:style-name="fr2" draw:name="Frame9" text:anchor-type="as-char" draw:z-index="8"><draw:text-box fo:min-height="0.041cm" fo:min-width="0.041cm"><text:h text:style-name="P9" text:outline-level="2">Protocol Stack</text:h></draw:text-box></draw:frame><text:s/></text:p>
      <text:p text:style-name="P8">The protocol stack for firmware upload includes:</text:p>
      <text:list text:style-name="L2">
        <text:list-item>
          <text:p text:style-name="P10"><text:soft-page-break/>Application Layer (PlatformIO): Compiles Arduino sketches into binary firmware and uses esptool.py to manage uploads, interacting with the ESP32’s bootloader.</text:p>
        </text:list-item>
        <text:list-item>
          <text:p text:style-name="P10">Transport Layer (USB): The Mac communicates via USB 2.0 (Full Speed, 12 Mbps) using bulk transfers for reliable data exchange.</text:p>
        </text:list-item>
        <text:list-item>
          <text:p text:style-name="P10">USB-to-UART Bridge: The CP2102 chip converts USB packets to UART signals, enumerating as a CDC-ACM device (e.g., /dev/cu.SLAB_USBtoUART).</text:p>
        </text:list-item>
        <text:list-item>
          <text:p text:style-name="P10">UART Layer: UART0 on the ESP32 receives firmware data at a baud rate (e.g., 921600), configured by PlatformIO.</text:p>
        </text:list-item>
        <text:list-item>
          <text:p text:style-name="P10">ESP32 Bootloader: The bootloader, activated via control signals (DTR, RTS), uses Espressif’s serial protocol to receive and write firmware to flash memory.</text:p>
        </text:list-item>
      </text:list>
      <text:p text:style-name="P11"/>
      <text:p text:style-name="P12"><draw:frame draw:style-name="fr1" draw:name="Frame2" text:anchor-type="as-char" draw:z-index="1"><draw:text-box fo:min-height="0.041cm" fo:min-width="0.041cm"><text:h text:style-name="P9" text:outline-level="2">Handshake Process</text:h></draw:text-box></draw:frame><text:s/></text:p>
      <text:p text:style-name="P12">The handshake ensures reliable firmware transfer:</text:p>
      <text:list text:style-name="L3">
        <text:list-item>
          <text:p text:style-name="P13">Reset and Bootloader Entry: PlatformIO toggles DTR and RTS lines to reset the ESP32 (EN pin) and enter bootloader mode (GPIO0 low).</text:p>
        </text:list-item>
        <text:list-item>
          <text:p text:style-name="P13">Synchronization: esptool.py sends SYNC frames (e.g., 0x07 0x07 0x12 0x20), and the ESP32 responds to confirm communication.</text:p>
        </text:list-item>
        <text:list-item>
          <text:p text:style-name="P13">Firmware Transfer: Firmware is sent in chunks with checksums, acknowledged by the ESP32.</text:p>
        </text:list-item>
        <text:list-item>
          <text:p text:style-name="P13">Completion: The bootloader verifies the firmware and resets the ESP32 to run the new program.</text:p>
        </text:list-item>
      </text:list>
      <text:p text:style-name="P14"/>
      <text:p text:style-name="P15"><draw:frame draw:style-name="fr1" draw:name="Frame3" text:anchor-type="as-char" draw:z-index="2"><draw:text-box fo:min-height="0.041cm" fo:min-width="0.041cm"><text:h text:style-name="P9" text:outline-level="2">Visualizing with a Protocol Analyzer</text:h></draw:text-box></draw:frame><text:s/></text:p>
      <text:p text:style-name="P15">A Saleae Logic analyzer connected to UART TX/RX lines reveals the handshake and data transfer, showing reset pulses, SYNC frames, and firmware data as UART frames with decoded bytes.</text:p>
      <text:h text:style-name="Heading_20_2" text:outline-level="2"><draw:frame draw:style-name="fr1" draw:name="Frame6" text:anchor-type="as-char" draw:z-index="5"><draw:text-box fo:min-height="0.041cm" fo:min-width="0.041cm"><text:h text:style-name="P5" text:outline-level="1">Scenario 2: Serial Output to VS Code Terminal</text:h></draw:text-box></draw:frame><text:s/></text:h>
      <text:h text:style-name="Heading_20_2" text:outline-level="2">Overview </text:h>
      <text:p text:style-name="P15">Once running, the ESP32 sends debug or operational data to the Mac’s VS Code terminal via serial communication, typically using Serial.print() statements in Arduino code.</text:p>
      <text:h text:style-name="Heading_20_2" text:outline-level="2">Protocol Stack </text:h>
      <text:p text:style-name="P15">The protocol stack for serial output includes:</text:p>
      <text:list text:style-name="L4">
        <text:list-item>
          <text:p text:style-name="P16">Application Layer (Arduino Code): Uses the Serial library (e.g., Serial.println("Hello, Mac!")) to send ASCII data via UART0.</text:p>
        </text:list-item>
        <text:list-item>
          <text:p text:style-name="P16">UART Layer: Transmits data at a configured baud rate (e.g., 115200) as 8N1 frames.</text:p>
        </text:list-item>
        <text:list-item>
          <text:p text:style-name="P16"><text:soft-page-break/>USB-to-UART Bridge: Converts UART signals to USB packets, routed to the Mac’s serial port.</text:p>
        </text:list-item>
        <text:list-item>
          <text:p text:style-name="P16">Transport Layer (USB): USB carries data to the Mac’s USB driver.</text:p>
        </text:list-item>
        <text:list-item>
          <text:p text:style-name="P16">PlatformIO Serial Monitor: Displays data in VS Code, matching the baud rate set in the Arduino code.</text:p>
        </text:list-item>
      </text:list>
      <text:p text:style-name="P14"/>
      <text:p text:style-name="P15"><draw:frame draw:style-name="fr1" draw:name="Frame4" text:anchor-type="as-char" draw:z-index="3"><draw:text-box fo:min-height="0.041cm" fo:min-width="0.041cm"><text:h text:style-name="P9" text:outline-level="2">Handshake Process</text:h></draw:text-box></draw:frame><text:s/></text:p>
      <text:p text:style-name="P15">No formal UART handshake is required due to asynchronous communication, but USB enumeration ensures the bridge chip is recognized as a serial device. PlatformIO initializes the serial port, setting control lines as needed.</text:p>
      <text:p text:style-name="P15"><draw:frame draw:style-name="fr1" draw:name="Frame7" text:anchor-type="as-char" draw:z-index="6"><draw:text-box fo:min-height="0.041cm" fo:min-width="0.041cm"><text:h text:style-name="P9" text:outline-level="2">Visualizing with a Protocol Analyzer</text:h></draw:text-box></draw:frame><text:s/></text:p>
      <text:p text:style-name="P15">A Saleae Logic analyzer on the TX line shows UART frames with ASCII data (e.g., 0x48 0x65 0x6C for “Hel”), with bit timing based on the baud rate (e.g., ~8.68 µs per bit at 115200 baud).</text:p>
      <text:p text:style-name="P15"><draw:frame draw:style-name="fr1" draw:name="Frame8" text:anchor-type="as-char" draw:z-index="7"><draw:text-box fo:min-height="0.041cm" fo:min-width="0.041cm"><text:h text:style-name="Heading_20_1" text:outline-level="1">Comparing Serial Protocols</text:h></draw:text-box></draw:frame><text:s/></text:p>
      <text:p text:style-name="P17">Comparing Serial ProtocolsSerial communication is time-division multiplexed, sending data bit-by-bit over a single channel. UART, SPI, and I2C are common serial protocols used in microcontroller projects, each with distinct characteristics suited to specific applications:</text:p>
      <text:p text:style-name="P17"/>
      <text:list text:style-name="L5">
        <text:list-item>
          <text:p text:style-name="P18"><text:span text:style-name="T2">UART</text:span>: An asynchronous protocol using TX (transmit) and RX (receive) lines, UART is simple yet timing-sensitive, requiring both devices to agree on a baud rate. It is ideal for ESP32 programming and debugging due to its minimal pin usage and straightforward implementation.</text:p>
        </text:list-item>
        <text:list-item>
          <text:p text:style-name="P18"><text:span text:style-name="T2">SPI</text:span>: A synchronous protocol employing a clock signal (SCK), MOSI (Master Out Slave In), MISO (Master In Slave Out), and Slave Select lines. SPI offers higher speed than UART but requires more pins, making it suitable for high-bandwidth peripheral communication.</text:p>
        </text:list-item>
        <text:list-item>
          <text:p text:style-name="P18"><text:span text:style-name="T2">I2C</text:span>: A synchronous protocol using two wires—SCL (clock) and SDA (data)—with addressing to support multiple devices. I2C, patented by NXP (formerly Philips), is also known as TWI (Two Wire Interface) in Atmel’s AVR microcontrollers, which use the TWI nomenclature to avoid licensing costs. TWI is functionally identical to I2C, enabling the same two-wire communication with addressing for up to 127 devices. I2C/TWI is efficient for connecting multiple peripherals with minimal wiring.</text:p>
        </text:list-item>
        <text:list-item>
          <text:p text:style-name="P18"><text:span text:style-name="T2">RS-232</text:span>: Used for long-distance serial communication, RS-232 employs higher voltages (±12V) for robust signal transmission. It is less common in modern microcontrollers like the ESP32, which favor UART for simplicity.</text:p>
        </text:list-item>
      </text:list>
      <text:p text:style-name="P19"/>
      <text:p text:style-name="P19"><text:span text:style-name="T2">Note on TTL</text:span>: Transistor-Transistor Logic (TTL) is not a protocol but an older digital logic technology, often mistakenly used to describe 5V UART signaling. In the ESP32 context, <text:soft-page-break/>UART operates at 3.3V TTL levels, distinct from the 5V logic historically associated with TTL.UART’s simplicity makes it the preferred choice for ESP32’s programming and debugging tasks, while SPI and I2C/TWI are typically used for communication with sensors and other peripherals.</text:p>
      <text:h text:style-name="Heading_20_2" text:outline-level="2">USB vs. UART: Hardware Protocol vs. Standard</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Aspect<text:span text:style-name="T3"/></text:p>
          </table:table-cell>
          <table:table-cell table:style-name="Table1.A1" office:value-type="string">
            <text:p text:style-name="P20">UART (Hardware Protocol)<text:span text:style-name="T3"/></text:p>
          </table:table-cell>
          <table:table-cell table:style-name="Table1.A1" office:value-type="string">
            <text:p text:style-name="P20">USB (Physical/Protocol Standard)<text:span text:style-name="T3"/></text:p>
          </table:table-cell>
        </table:table-row>
        <table:table-row table:style-name="Table1.1">
          <table:table-cell table:style-name="Table1.A1" office:value-type="string">
            <text:p text:style-name="P21">Scope<text:span text:style-name="T4"/></text:p>
          </table:table-cell>
          <table:table-cell table:style-name="Table1.A1" office:value-type="string">
            <text:p text:style-name="P21">Data exchange rules<text:span text:style-name="T4"/></text:p>
          </table:table-cell>
          <table:table-cell table:style-name="Table1.A1" office:value-type="string">
            <text:p text:style-name="P21">Physical connection and data exchange<text:span text:style-name="T4"/></text:p>
          </table:table-cell>
        </table:table-row>
        <table:table-row table:style-name="Table1.1">
          <table:table-cell table:style-name="Table1.A1" office:value-type="string">
            <text:p text:style-name="P21">Physical Layer<text:span text:style-name="T4"/></text:p>
          </table:table-cell>
          <table:table-cell table:style-name="Table1.A1" office:value-type="string">
            <text:p text:style-name="P21">Not specified; uses TTL signals<text:span text:style-name="T4"/></text:p>
          </table:table-cell>
          <table:table-cell table:style-name="Table1.A1" office:value-type="string">
            <text:p text:style-name="P21">Defines connectors, cables, D+/D- signaling<text:span text:style-name="T4"/></text:p>
          </table:table-cell>
        </table:table-row>
        <table:table-row table:style-name="Table1.1">
          <table:table-cell table:style-name="Table1.A1" office:value-type="string">
            <text:p text:style-name="P21">Protocol Complexity<text:span text:style-name="T4"/></text:p>
          </table:table-cell>
          <table:table-cell table:style-name="Table1.A1" office:value-type="string">
            <text:p text:style-name="P21">Simple, bit-level framing<text:span text:style-name="T4"/></text:p>
          </table:table-cell>
          <table:table-cell table:style-name="Table1.A1" office:value-type="string">
            <text:p text:style-name="P21">Complex, with enumeration and transfer modes<text:span text:style-name="T4"/></text:p>
          </table:table-cell>
        </table:table-row>
        <table:table-row table:style-name="Table1.1">
          <table:table-cell table:style-name="Table1.A1" office:value-type="string">
            <text:p text:style-name="P21">Implementation<text:span text:style-name="T4"/></text:p>
          </table:table-cell>
          <table:table-cell table:style-name="Table1.A1" office:value-type="string">
            <text:p text:style-name="P21">Embedded in hardware (e.g., ESP32 UART)<text:span text:style-name="T4"/></text:p>
          </table:table-cell>
          <table:table-cell table:style-name="Table1.A1" office:value-type="string">
            <text:p text:style-name="P21">Requires hardware (e.g., CP2102) and drivers<text:span text:style-name="T4"/></text:p>
          </table:table-cell>
        </table:table-row>
        <table:table-row table:style-name="Table1.1">
          <table:table-cell table:style-name="Table1.A1" office:value-type="string">
            <text:p text:style-name="P21">ESP32 Role<text:span text:style-name="T4"/></text:p>
          </table:table-cell>
          <table:table-cell table:style-name="Table1.A1" office:value-type="string">
            <text:p text:style-name="P21">Native UART support<text:span text:style-name="T4"/></text:p>
          </table:table-cell>
          <table:table-cell table:style-name="Table1.A1" office:value-type="string">
            <text:p text:style-name="P21">Relies on USB-to-UART bridge<text:span text:style-name="T4"/></text:p>
          </table:table-cell>
        </table:table-row>
      </table:table>
      <text:p text:style-name="P15"/>
      <text:p text:style-name="P15">UART handles low-level data exchange within the ESP32, while USB provides standardized connectivity to the Mac via the CP2102 bridge chip, enabling plug-and-play functionality.</text:p>
      <text:h text:style-name="Heading_20_2" text:outline-level="2">Practical Considerations</text:h>
      <text:list text:style-name="L6">
        <text:list-item>
          <text:p text:style-name="P22">Driver Installation: Install drivers for the USB-to-UART chip (e.g., Silicon Labs CP2102) on macOS to ensure the ESP32 appears as a serial port.</text:p>
        </text:list-item>
        <text:list-item>
          <text:p text:style-name="P22">PlatformIO Configuration: Set up platformio.ini with the correct board, upload speed (e.g., 921600), and monitor speed (e.g., 115200): [env:esp32dev] platform = espressif32 board = esp32dev framework = arduino upload_speed = 921600 monitor_speed = 115200</text:p>
        </text:list-item>
        <text:list-item>
          <text:p text:style-name="P22">Troubleshooting: Use data-capable USB cables, verify port selection, and ensure baud rate consistency between code and PlatformIO settings.</text:p>
        </text:list-item>
        <text:list-item>
          <text:p text:style-name="P22">Protocol Analysis: Connect a Saleae Logic analyzer to TX/RX pins, configuring it for UART decoding at the appropriate baud rate.</text:p>
        </text:list-item>
      </text:list>
      <text:h text:style-name="Heading_20_1" text:outline-level="1">Conclusion </text:h>
      <text:p text:style-name="P23">Serial communication between an ESP32 and a Mac using PlatformIO in VS Code leverages a robust protocol stack involving USB, UART, and application tools. Uploading firmware involves a complex handshake with the ESP32’s bootloader, while serial output is simpler, relying on asynchronous UART data. By understanding these mechanisms and using tools like Saleae Logic for visualization, makers can effectively develop and debug ESP32 projects, harnessing its capabilities for innovative IoT applicatio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0T11:02:58.252626000</meta:creation-date>
    <dc:date>2025-08-30T18:23:13.432876000</dc:date>
    <meta:editing-duration>PT43M50S</meta:editing-duration>
    <meta:editing-cycles>7</meta:editing-cycles>
    <meta:generator>LibreOffice/25.2.2.2$MacOSX_AARCH64 LibreOffice_project/7370d4be9e3cf6031a51beef54ff3bda878e3fac</meta:generator>
    <meta:print-date>2025-08-10T11:22:17.410481000</meta:print-date>
    <meta:printed-by>PDF files</meta:printed-by>
    <meta:document-statistic meta:table-count="1" meta:image-count="0" meta:object-count="0" meta:page-count="4" meta:paragraph-count="84" meta:word-count="1276" meta:character-count="8549" meta:non-whitespace-character-count="7359"/>
  </office:meta>
</office:document-meta>
</file>